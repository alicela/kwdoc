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100000762000007623EBFD7E2.png" manifest:media-type="image/png"/>
  <manifest:file-entry manifest:full-path="Pictures/10000001000001BE00000024910235C1.png" manifest:media-type="image/png"/>
  <manifest:file-entry manifest:full-path="Pictures/1000255900002C0000000ECFE4AF7E9C.svg" manifest:media-type="image/svg+xml"/>
  <manifest:file-entry manifest:full-path="Pictures/1000000100000214000000B355D5A2CE.png" manifest:media-type="image/png"/>
  <manifest:file-entry manifest:full-path="Pictures/TablePreview1.svm" manifest:media-type=""/>
  <manifest:file-entry manifest:full-path="Pictures/100000010000008400000022C7B5F7F4.png" manifest:media-type="image/png"/>
  <manifest:file-entry manifest:full-path="Pictures/10003463000024E2000003033DE7702D.svg" manifest:media-type="image/svg+xml"/>
  <manifest:file-entry manifest:full-path="Pictures/100022CA00001795000007F864728E6F.svg" manifest:media-type="image/svg+xml"/>
  <manifest:file-entry manifest:full-path="Pictures/100000010000011D0000006022A474DC.png" manifest:media-type="image/png"/>
  <manifest:file-entry manifest:full-path="Pictures/100000010000076200000762F1DECCDB.png" manifest:media-type="image/png"/>
  <manifest:file-entry manifest:full-path="Pictures/200000060000037E000006329640F12E.svm" manifest:media-type="image/x-svm"/>
  <manifest:file-entry manifest:full-path="Pictures/100000010000002B0000004C1DD77ADF.png" manifest:media-type="image/png"/>
  <manifest:file-entry manifest:full-path="Pictures/1000000100000762000007623F12FCE6.png" manifest:media-type="image/png"/>
  <manifest:file-entry manifest:full-path="Pictures/100000010000076200000762B837D606.png" manifest:media-type="image/png"/>
  <manifest:file-entry manifest:full-path="Pictures/100000010000076200000762B20A1301.png" manifest:media-type="image/png"/>
  <manifest:file-entry manifest:full-path="Pictures/1000000100000245000001697E9028E8.png" manifest:media-type="image/png"/>
  <manifest:file-entry manifest:full-path="Pictures/1000000100000762000007620C8C27F6.png" manifest:media-type="image/png"/>
  <manifest:file-entry manifest:full-path="Pictures/100000010000076200000762DFA735C4.png" manifest:media-type="image/png"/>
  <manifest:file-entry manifest:full-path="Pictures/10000001000002C000000314337C6AE0.png" manifest:media-type="image/png"/>
  <manifest:file-entry manifest:full-path="Pictures/10000001000004E6000004E6517A0020.png" manifest:media-type="image/png"/>
  <manifest:file-entry manifest:full-path="Pictures/10000001000007620000076288515B49.png" manifest:media-type="image/png"/>
  <manifest:file-entry manifest:full-path="Pictures/100000010000076200000762EE3E0C5B.png" manifest:media-type="image/png"/>
  <manifest:file-entry manifest:full-path="Pictures/100000010000040500000178641460B6.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scadia Code Light" svg:font-family="'Cascadia Code Light'"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Extrabold1"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adornments="Normal" style:font-family-generic="swiss" style:font-pitch="variable"/>
    <style:font-face style:name="Open Sans Semibold1" svg:font-family="'Open Sans Semibold'" style:font-family-generic="swiss" style:font-pitch="variable"/>
    <style:font-face style:name="Open Sans Semibold2" svg:font-family="'Open Sans Semibold'" style:font-adornments="Regular" style:font-family-generic="swiss" style:font-pitch="variable"/>
    <style:font-face style:name="Open Sans1" svg:font-family="'Open Sans'"/>
    <style:font-face style:name="Open Sans2" svg:font-family="'Open Sans'" style:font-adornments="Bold" style:font-family-generic="swiss" style:font-pitch="variable"/>
    <style:font-face style:name="Open Sans3" svg:font-family="'Open Sans'" style:font-family-generic="swiss"/>
    <style:font-face style:name="Open Sans4" svg:font-family="'Open Sans'" style:font-family-generic="swiss"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68dff"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width="0.018cm" draw:stroke-linejoin="miter" svg:stroke-linecap="butt" draw:fill="solid" draw:fill-color="#7d2095" draw:textarea-horizontal-align="justify" draw:textarea-vertical-align="middle" draw:auto-grow-height="false" draw:fit-to-size="false" style:shrink-to-fit="false" fo:min-height="1.335cm" fo:min-width="0.392cm" fo:padding-top="0.125cm" fo:padding-bottom="0.125cm" fo:padding-left="0.25cm" fo:padding-right="0.25cm" fo:wrap-option="wrap" loext:decorative="false"/>
    </style:style>
    <style:style style:name="gr5" style:family="graphic" style:parent-style-name="standard">
      <style:graphic-properties draw:stroke="none" svg:stroke-width="0.018cm" draw:stroke-linejoin="miter" svg:stroke-linecap="butt" draw:fill="solid" draw:fill-color="#d79700" draw:textarea-horizontal-align="justify" draw:textarea-vertical-align="middle" draw:auto-grow-height="false" draw:fit-to-size="false" style:shrink-to-fit="false" fo:min-height="1.335cm" fo:min-width="0.392cm" fo:padding-top="0.125cm" fo:padding-bottom="0.125cm" fo:padding-left="0.25cm" fo:padding-right="0.25cm" fo:wrap-option="wrap"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gradient" draw:fill-color="#fdf0c9" draw:fill-gradient-name="Pastel_20_Bouquet" draw:textarea-horizontal-align="justify" draw:textarea-vertical-align="middle" draw:auto-grow-height="false" fo:min-height="15.5cm" fo:min-width="14.686cm"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4cm, 0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315cm, 0cm, 0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77cm, 5.901cm, 2.287cm, 5.633cm)" draw:image-opacity="100%" style:mirror="none" loext:decorative="false"/>
    </style:style>
    <style:style style:name="gr11" style:family="graphic" style:parent-style-name="standard">
      <style:graphic-properties draw:stroke="none" draw:fill="none" fo:min-height="9.719cm" loext:decorative="false"/>
      <style:paragraph-properties style:writing-mode="lr-tb"/>
    </style:style>
    <style:style style:name="gr12" style:family="graphic" style:parent-style-name="standard">
      <style:graphic-properties draw:stroke="none" draw:fill="none" fo:min-height="2.468cm" loext:decorative="false"/>
      <style:paragraph-properties style:writing-mode="lr-tb"/>
    </style:style>
    <style:style style:name="gr13" style:family="graphic">
      <style:graphic-properties style:writing-mode="lr-tb" loext:decorative="false"/>
    </style:style>
    <style:style style:name="gr14" style:family="graphic" style:parent-style-name="standard" style:list-style-name="L8">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loext:decorative="false"/>
    </style:style>
    <style:style style:name="gr15" style:family="graphic" style:parent-style-name="standard" style:list-style-name="L8">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6" style:family="graphic" style:parent-style-name="standard" style:list-style-name="L8">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7" style:family="graphic" style:parent-style-name="standard" style:list-style-name="L8">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loext:decorative="false"/>
    </style:style>
    <style:style style:name="gr18" style:family="graphic" style:parent-style-name="standard" style:list-style-name="L8">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9" style:family="graphic" style:parent-style-name="standard" style:list-style-name="L8">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0" style:family="graphic" style:parent-style-name="standard" style:list-style-name="L8">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loext:decorative="false"/>
    </style:style>
    <style:style style:name="gr21" style:family="graphic" style:parent-style-name="standard" style:list-style-name="L8">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2" style:family="graphic">
      <style:graphic-properties loext:decorative="false"/>
    </style:style>
    <style:style style:name="gr23" style:family="graphic" style:parent-style-name="standard" style:list-style-name="L8">
      <style:graphic-properties draw:stroke="solid" draw:stroke-dash="Dashed_20__28_var_29__20_4" svg:stroke-width="0.028cm" svg:stroke-color="#ffd428" draw:marker-start="" draw:marker-start-width="0.242cm" draw:marker-start-center="false" draw:marker-end="" draw:marker-end-width="0.242cm" draw:marker-end-center="false" draw:stroke-linejoin="round" svg:stroke-linecap="round" draw:fill="solid" draw:fill-color="#ffd428" draw:textarea-horizontal-align="center" draw:textarea-vertical-align="middle" fo:padding-top="0.139cm" fo:padding-bottom="0.139cm" fo:padding-left="0.264cm" fo:padding-right="0.264cm" fo:wrap-option="wrap" draw:shadow="hidden" draw:shadow-offset-x="0.2cm" draw:shadow-offset-y="0.2cm" draw:shadow-color="#808080" loext:decorative="false"/>
    </style:style>
    <style:style style:name="gr24" style:family="graphic" style:parent-style-name="standard" style:list-style-name="L8">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8">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loext:decorative="false"/>
    </style:style>
    <style:style style:name="gr26" style:family="graphic" style:parent-style-name="standard" style:list-style-name="L8">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7" style:family="graphic" style:parent-style-name="standard" style:list-style-name="L8">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8" style:family="graphic" style:parent-style-name="standard" style:list-style-name="L8">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loext:decorative="false"/>
    </style:style>
    <style:style style:name="gr29" style:family="graphic" style:parent-style-name="standard" style:list-style-name="L8">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30" style:family="graphic" style:parent-style-name="standard" style:list-style-name="L8">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loext:decorative="false"/>
    </style:style>
    <style:style style:name="gr31" style:family="graphic" style:parent-style-name="standard" style:list-style-name="L8">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32" style:family="graphic" style:parent-style-name="standard">
      <style:graphic-properties draw:stroke="none" svg:stroke-width="0.018cm" draw:stroke-linejoin="miter" svg:stroke-linecap="butt" draw:fill="solid" draw:fill-color="#ffffff" draw:textarea-horizontal-align="justify" draw:textarea-vertical-align="middle" draw:auto-grow-height="false" draw:fit-to-size="false" style:shrink-to-fit="false" fo:min-height="1.657cm" fo:min-width="1.454cm" fo:padding-top="0.125cm" fo:padding-bottom="0.125cm" fo:padding-left="0.25cm" fo:padding-right="0.25cm" fo:wrap-option="wrap" loext:decorative="false"/>
    </style:style>
    <style:style style:name="gr33" style:family="graphic" style:parent-style-name="standard">
      <style:graphic-properties draw:stroke="none" svg:stroke-width="0.018cm" draw:stroke-linejoin="miter" svg:stroke-linecap="butt" draw:fill="solid" draw:fill-color="#ffffff" draw:textarea-horizontal-align="justify" draw:textarea-vertical-align="middle" draw:auto-grow-height="false" draw:fit-to-size="false" style:shrink-to-fit="false" fo:min-height="1.232cm" fo:min-width="0.881cm" fo:padding-top="0.125cm" fo:padding-bottom="0.125cm" fo:padding-left="0.25cm" fo:padding-right="0.25cm" fo:wrap-option="wrap" loext:decorative="false"/>
    </style:style>
    <style:style style:name="gr34" style:family="graphic" style:parent-style-name="standard">
      <style:graphic-properties draw:stroke="none" svg:stroke-width="0.018cm" draw:stroke-linejoin="miter" svg:stroke-linecap="butt" draw:fill="solid" draw:fill-color="#ffffff" draw:textarea-horizontal-align="justify" draw:textarea-vertical-align="middle" draw:auto-grow-height="false" draw:fit-to-size="false" style:shrink-to-fit="false" fo:min-height="1.15cm" fo:min-width="0.391cm" fo:padding-top="0.125cm" fo:padding-bottom="0.125cm" fo:padding-left="0.25cm" fo:padding-right="0.25cm" fo:wrap-option="wrap" loext:decorative="false"/>
    </style:style>
    <style:style style:name="gr35" style:family="graphic" style:parent-style-name="standard">
      <style:graphic-properties draw:stroke="none" svg:stroke-width="0.018cm" draw:stroke-linejoin="miter" svg:stroke-linecap="butt" draw:fill="solid" draw:fill-color="#ffffff" draw:textarea-horizontal-align="justify" draw:textarea-vertical-align="middle" draw:auto-grow-height="false" draw:fit-to-size="false" style:shrink-to-fit="false" fo:min-height="1.232cm" fo:min-width="0.849cm" fo:padding-top="0.125cm" fo:padding-bottom="0.125cm" fo:padding-left="0.25cm" fo:padding-right="0.25cm" fo:wrap-option="wrap" loext:decorative="false"/>
    </style:style>
    <style:style style:name="gr36" style:family="graphic" style:parent-style-name="standard">
      <style:graphic-properties draw:stroke="none" svg:stroke-width="0.018cm" draw:stroke-linejoin="miter" svg:stroke-linecap="butt" draw:fill="solid" draw:fill-color="#ffffff" draw:textarea-horizontal-align="justify" draw:textarea-vertical-align="middle" draw:auto-grow-height="false" draw:fit-to-size="false" style:shrink-to-fit="false" fo:min-height="1.821cm" fo:min-width="0.045cm" fo:padding-top="0.125cm" fo:padding-bottom="0.125cm" fo:padding-left="0.25cm" fo:padding-right="0.25cm" fo:wrap-option="wrap" loext:decorative="false"/>
    </style:style>
    <style:style style:name="pr1" style:family="presentation" style:parent-style-name="Page_20_de_20_garde-title">
      <style:graphic-properties draw:textarea-horizontal-align="center" fo:min-height="3.432cm" loext:decorative="false"/>
      <style:paragraph-properties style:writing-mode="lr-tb"/>
    </style:style>
    <style:style style:name="pr2" style:family="presentation" style:parent-style-name="Page_20_de_20_garde-outline1">
      <style:graphic-properties fo:min-height="1.982cm" loext:decorative="false"/>
      <style:paragraph-properties style:writing-mode="lr-tb"/>
    </style:style>
    <style:style style:name="pr3" style:family="presentation" style:parent-style-name="Page_20_de_20_garde-notes">
      <style:graphic-properties draw:fill-color="#ffffff" draw:auto-grow-height="true" fo:min-height="16.562cm" loext:decorative="false"/>
      <style:paragraph-properties style:writing-mode="lr-tb"/>
    </style:style>
    <style:style style:name="pr4" style:family="presentation" style:parent-style-name="Base-title">
      <style:graphic-properties fo:min-height="2.379cm" loext:decorative="false"/>
      <style:paragraph-properties style:writing-mode="lr-tb"/>
    </style:style>
    <style:style style:name="pr5" style:family="presentation" style:parent-style-name="Base-notes">
      <style:graphic-properties draw:auto-grow-height="true" fo:min-height="16.562cm" loext:decorative="false"/>
      <style:paragraph-properties style:writing-mode="lr-tb"/>
    </style:style>
    <style:style style:name="pr6" style:family="presentation" style:parent-style-name="Chapitre_20_B-title">
      <style:graphic-properties fo:min-height="6.75cm" loext:decorative="false"/>
      <style:paragraph-properties style:writing-mode="lr-tb"/>
    </style:style>
    <style:style style:name="pr7" style:family="presentation" style:parent-style-name="Chapitre_20_B-outline1">
      <style:graphic-properties fo:min-height="6.45cm" loext:decorative="false"/>
      <style:paragraph-properties style:writing-mode="lr-tb"/>
    </style:style>
    <style:style style:name="pr8" style:family="presentation" style:parent-style-name="Chapitre_20_B-notes">
      <style:graphic-properties draw:fill-color="#ffffff" draw:auto-grow-height="false" fo:min-height="16.562cm" loext:decorative="false"/>
      <style:paragraph-properties style:writing-mode="lr-tb"/>
    </style:style>
    <style:style style:name="pr9" style:family="presentation" style:parent-style-name="Base-outline1">
      <style:graphic-properties fo:min-height="5.369cm" loext:decorative="false"/>
      <style:paragraph-properties style:writing-mode="lr-tb"/>
    </style:style>
    <style:style style:name="pr10" style:family="presentation" style:parent-style-name="Base-notes">
      <style:graphic-properties draw:fill-color="#ffffff" draw:auto-grow-height="true" fo:min-height="16.562cm" loext:decorative="false"/>
      <style:paragraph-properties style:writing-mode="lr-tb"/>
    </style:style>
    <style:style style:name="pr11" style:family="presentation" style:parent-style-name="Base-title">
      <style:graphic-properties fo:min-height="2.93cm" loext:decorative="false"/>
      <style:paragraph-properties style:writing-mode="lr-tb"/>
    </style:style>
    <style:style style:name="pr12" style:family="presentation" style:parent-style-name="Base-outline1">
      <style:graphic-properties fo:min-height="12.25cm" loext:decorative="false"/>
      <style:paragraph-properties style:writing-mode="lr-tb"/>
    </style:style>
    <style:style style:name="pr13" style:family="presentation" style:parent-style-name="Base_20_G1-title">
      <style:graphic-properties fo:min-height="2.379cm" loext:decorative="false"/>
      <style:paragraph-properties style:writing-mode="lr-tb"/>
    </style:style>
    <style:style style:name="pr14" style:family="presentation" style:parent-style-name="Base_20_G1-outline1">
      <style:graphic-properties fo:min-height="10.381cm" loext:decorative="false"/>
      <style:paragraph-properties style:writing-mode="lr-tb"/>
    </style:style>
    <style:style style:name="pr15" style:family="presentation" style:parent-style-name="Base_20_G1-notes">
      <style:graphic-properties draw:fill-color="#ffffff" draw:auto-grow-height="true" fo:min-height="16.562cm" loext:decorative="false"/>
      <style:paragraph-properties style:writing-mode="lr-tb"/>
    </style:style>
    <style:style style:name="pr16" style:family="presentation" style:parent-style-name="Chapitre_20_V-title">
      <style:graphic-properties fo:min-height="6.75cm" loext:decorative="false"/>
      <style:paragraph-properties style:writing-mode="lr-tb"/>
    </style:style>
    <style:style style:name="pr17" style:family="presentation" style:parent-style-name="Chapitre_20_V-outline1">
      <style:graphic-properties fo:min-height="6.45cm" loext:decorative="false"/>
      <style:paragraph-properties style:writing-mode="lr-tb"/>
    </style:style>
    <style:style style:name="pr18" style:family="presentation" style:parent-style-name="Chapitre_20_V-notes">
      <style:graphic-properties draw:fill-color="#ffffff" draw:auto-grow-height="true" fo:min-height="16.562cm" loext:decorative="false"/>
      <style:paragraph-properties style:writing-mode="lr-tb"/>
    </style:style>
    <style:style style:name="pr19" style:family="presentation" style:parent-style-name="Base_20_G1-notes">
      <style:graphic-properties draw:fill-color="#ffffff" draw:auto-grow-height="false" fo:min-height="16.563cm" loext:decorative="false"/>
      <style:paragraph-properties style:writing-mode="lr-tb"/>
    </style:style>
    <style:style style:name="pr20" style:family="presentation" style:parent-style-name="_31__5f_Base_20_G1-title">
      <style:graphic-properties fo:min-height="2.379cm" loext:decorative="false"/>
      <style:paragraph-properties style:writing-mode="lr-tb"/>
    </style:style>
    <style:style style:name="pr21" style:family="presentation" style:parent-style-name="_31__5f_Base_20_G1-notes">
      <style:graphic-properties draw:fill-color="#ffffff" draw:auto-grow-height="false" fo:min-height="16.563cm" loext:decorative="false"/>
      <style:paragraph-properties style:writing-mode="lr-tb"/>
    </style:style>
    <style:style style:name="pr22" style:family="presentation" style:parent-style-name="_31__5f_Base_20_G1-outline1">
      <style:graphic-properties fo:min-height="10.381cm" loext:decorative="false"/>
      <style:paragraph-properties style:writing-mode="lr-tb"/>
    </style:style>
    <style:style style:name="pr23" style:family="presentation" style:parent-style-name="_31__5f_Base_20_G1-notes">
      <style:graphic-properties draw:fill-color="#ffffff" draw:auto-grow-height="true" fo:min-height="16.562cm" loext:decorative="false"/>
      <style:paragraph-properties style:writing-mode="lr-tb"/>
    </style:style>
    <style:style style:name="pr24" style:family="presentation" style:parent-style-name="_32__5f_Base_20_G1-title">
      <style:graphic-properties fo:min-height="2.379cm" loext:decorative="false"/>
      <style:paragraph-properties style:writing-mode="lr-tb"/>
    </style:style>
    <style:style style:name="pr25" style:family="presentation" style:parent-style-name="_32__5f_Base_20_G1-outline1">
      <style:graphic-properties fo:min-height="10.381cm" loext:decorative="false"/>
      <style:paragraph-properties style:writing-mode="lr-tb"/>
    </style:style>
    <style:style style:name="pr26" style:family="presentation" style:parent-style-name="_32__5f_Base_20_G1-notes">
      <style:graphic-properties draw:fill-color="#ffffff" draw:auto-grow-height="true" fo:min-height="16.562cm" loext:decorative="false"/>
      <style:paragraph-properties style:writing-mode="lr-tb"/>
    </style:style>
    <style:style style:name="pr27" style:family="presentation" style:parent-style-name="_33__5f_Base_20_G1-title">
      <style:graphic-properties fo:min-height="2.379cm" loext:decorative="false"/>
      <style:paragraph-properties style:writing-mode="lr-tb"/>
    </style:style>
    <style:style style:name="pr28" style:family="presentation" style:parent-style-name="_33__5f_Base_20_G1-outline1">
      <style:graphic-properties fo:min-height="10.381cm" loext:decorative="false"/>
      <style:paragraph-properties style:writing-mode="lr-tb"/>
    </style:style>
    <style:style style:name="pr29" style:family="presentation" style:parent-style-name="_33__5f_Base_20_G1-notes">
      <style:graphic-properties draw:fill-color="#ffffff" draw:auto-grow-height="true" fo:min-height="16.562cm" loext:decorative="false"/>
      <style:paragraph-properties style:writing-mode="lr-tb"/>
    </style:style>
    <style:style style:name="pr30" style:family="presentation" style:parent-style-name="Chapitre_20_J-title">
      <style:graphic-properties fo:min-height="6.75cm" loext:decorative="false"/>
      <style:paragraph-properties style:writing-mode="lr-tb"/>
    </style:style>
    <style:style style:name="pr31" style:family="presentation" style:parent-style-name="Chapitre_20_J-outline1">
      <style:graphic-properties fo:min-height="6.45cm" loext:decorative="false"/>
      <style:paragraph-properties style:writing-mode="lr-tb"/>
    </style:style>
    <style:style style:name="pr32" style:family="presentation" style:parent-style-name="Chapitre_20_J-notes">
      <style:graphic-properties draw:fill-color="#ffffff" draw:auto-grow-height="true" fo:min-height="16.562cm" loext:decorative="false"/>
      <style:paragraph-properties style:writing-mode="lr-tb"/>
    </style:style>
    <style:style style:name="pr33" style:family="presentation" style:parent-style-name="Merci_5f_2-outline1">
      <style:graphic-properties fo:min-height="9.519cm" loext:decorative="false"/>
      <style:paragraph-properties style:writing-mode="lr-tb"/>
    </style:style>
    <style:style style:name="pr34" style:family="presentation" style:parent-style-name="Merci_5f_2-notes">
      <style:graphic-properties draw:fill-color="#ffffff" draw:auto-grow-height="true" fo:min-height="16.56cm" loext:decorative="false"/>
      <style:paragraph-properties style:writing-mode="lr-tb"/>
    </style:style>
    <style:style style:name="co1" style:family="table-column">
      <style:table-column-properties style:column-width="1.597cm" style:use-optimal-column-width="false"/>
    </style:style>
    <style:style style:name="co2" style:family="table-column">
      <style:table-column-properties style:column-width="2.017cm" style:use-optimal-column-width="false"/>
    </style:style>
    <style:style style:name="co3" style:family="table-column">
      <style:table-column-properties style:column-width="22.146cm" style:use-optimal-column-width="false"/>
    </style:style>
    <style:style style:name="ro1" style:family="table-row">
      <style:table-row-properties style:row-height="2.32cm" style:use-optimal-row-height="false"/>
    </style:style>
    <style:style style:name="ce1" style:family="table-cell">
      <loext:graphic-properties draw:textarea-vertical-align="middle"/>
      <style:paragraph-properties fo:border="none"/>
      <style:text-properties style:font-name="Open Sans Semibold1" fo:font-size="22pt" style:font-size-asian="22pt" style:font-size-complex="22pt"/>
    </style:style>
    <style:style style:name="ce2" style:family="table-cell">
      <loext:graphic-properties draw:textarea-vertical-align="middle"/>
      <style:paragraph-properties fo:text-align="center" fo:border="none"/>
      <style:text-properties style:font-name="Open Sans Semibold2" fo:font-size="36pt" style:font-size-asian="36pt" style:font-size-complex="36pt"/>
    </style:style>
    <style:style style:name="ce3" style:family="table-cell">
      <loext:graphic-properties draw:textarea-vertical-align="middle"/>
      <style:paragraph-properties fo:margin-left="0.5cm" fo:margin-right="0cm" fo:text-align="start" fo:text-indent="0cm" fo:border="none"/>
      <style:text-properties fo:color="#2d363f" loext:opacity="100%" style:font-name="Open Sans Semibold1" fo:font-size="20pt" fo:font-weight="normal" style:font-size-asian="20pt" style:font-weight-asian="normal" style:font-size-complex="20pt" style:font-weight-complex="normal"/>
    </style:style>
    <style:style style:name="P1" style:family="paragraph">
      <style:paragraph-properties fo:line-height="90%" fo:text-align="center" style:punctuation-wrap="hanging" loext:tab-stop-distance="0cm" style:writing-mode="lr-tb">
        <style:tab-stops/>
      </style:paragraph-properties>
      <style:text-properties fo:hyphenate="false"/>
    </style:style>
    <style:style style:name="P2" style:family="paragraph">
      <style:text-properties fo:font-size="22pt" style:font-size-asian="22pt" style:font-size-complex="22pt"/>
    </style:style>
    <style:style style:name="P3" style:family="paragraph">
      <style:paragraph-properties loext:tab-stop-distance="0cm">
        <style:tab-stops/>
      </style:paragraph-properties>
    </style:style>
    <style:style style:name="P4" style:family="paragraph">
      <loext:graphic-properties draw:fill-color="#ffffff"/>
    </style:style>
    <style:style style:name="P5" style:family="paragraph">
      <style:paragraph-properties fo:text-align="center"/>
      <style:text-properties style:font-name="Open Sans Semibold2" fo:font-size="36pt" style:font-size-asian="36pt" style:font-size-complex="36pt"/>
    </style:style>
    <style:style style:name="P6" style:family="paragraph">
      <style:paragraph-properties fo:margin-left="0.5cm" fo:margin-right="0cm" fo:text-align="start" fo:text-indent="0cm"/>
      <style:text-properties fo:color="#2d363f" loext:opacity="100%" style:font-name="Open Sans Semibold1" fo:font-size="20pt" fo:font-weight="normal" style:font-size-asian="20pt" style:font-weight-asian="normal" style:font-size-complex="20pt" style:font-weight-complex="normal"/>
    </style:style>
    <style:style style:name="P7" style:family="paragraph">
      <loext:graphic-properties draw:fill="none"/>
      <style:paragraph-properties fo:text-align="center"/>
    </style:style>
    <style:style style:name="P8" style:family="paragraph">
      <loext:graphic-properties draw:fill="solid" draw:fill-color="#7d209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9" style:family="paragraph">
      <loext:graphic-properties draw:fill="solid" draw:fill-color="#d797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0" style:family="paragraph">
      <style:paragraph-properties fo:line-height="90%" fo:text-align="start" style:punctuation-wrap="hanging" loext:tab-stop-distance="0cm" style:writing-mode="lr-tb">
        <style:tab-stops/>
      </style:paragraph-properties>
      <style:text-properties fo:hyphenate="false"/>
    </style:style>
    <style:style style:name="P11" style:family="paragraph">
      <style:paragraph-properties fo:text-align="center"/>
    </style:style>
    <style:style style:name="P12" style:family="paragraph">
      <loext:graphic-properties draw:fill="gradient" draw:fill-color="#fdf0c9" draw:fill-gradient-name="Pastel_20_Bouquet"/>
      <style:paragraph-properties fo:text-align="center"/>
    </style:style>
    <style:style style:name="P13" style:family="paragraph">
      <style:paragraph-properties fo:line-height="90%" fo:text-align="start" style:punctuation-wrap="hanging" style:writing-mode="lr-tb"/>
      <style:text-properties fo:hyphenate="false"/>
    </style:style>
    <style:style style:name="P14" style:family="paragraph">
      <style:paragraph-properties fo:margin-left="0cm" fo:margin-right="0cm" fo:margin-top="0.273cm" fo:margin-bottom="0cm" fo:line-height="90%" fo:text-align="start" fo:text-indent="0cm" style:punctuation-wrap="hanging" loext:tab-stop-distance="0cm" style:writing-mode="lr-tb">
        <style:tab-stops/>
      </style:paragraph-properties>
      <style:text-properties fo:hyphenate="false" loext:hyphenation-no-caps="false" loext:hyphenation-no-last-word="false"/>
    </style:style>
    <style:style style:name="P15"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hyphenate="false" loext:hyphenation-no-caps="false" loext:hyphenation-no-last-word="false"/>
    </style:style>
    <style:style style:name="P16" style:family="paragraph">
      <style:paragraph-properties fo:margin-left="0cm" fo:margin-right="0cm" fo:margin-top="0.12cm" fo:margin-bottom="0.05cm" fo:line-height="90%" fo:text-align="start" fo:text-indent="0cm" style:punctuation-wrap="hanging" loext:tab-stop-distance="0cm" style:writing-mode="lr-tb">
        <style:tab-stops/>
      </style:paragraph-properties>
      <style:text-properties fo:hyphenate="false" loext:hyphenation-no-caps="false" loext:hyphenation-no-last-word="false"/>
    </style:style>
    <style:style style:name="P17" style:family="paragraph">
      <style:paragraph-properties fo:margin-top="0.42cm" fo:margin-bottom="0.35cm"/>
    </style:style>
    <style:style style:name="P18" style:family="paragraph">
      <style:paragraph-properties fo:margin-left="0cm" fo:margin-right="0cm" fo:margin-top="0.42cm" fo:margin-bottom="0.35cm" fo:line-height="90%" fo:text-align="start" fo:text-indent="0cm" style:punctuation-wrap="hanging" loext:tab-stop-distance="0cm" style:writing-mode="lr-tb">
        <style:tab-stops/>
      </style:paragraph-properties>
      <style:text-properties fo:font-size="16pt" fo:font-weight="bold" style:font-size-asian="16pt" style:font-weight-asian="bold" style:font-size-complex="16pt" style:font-weight-complex="bold" fo:hyphenate="false" loext:hyphenation-no-caps="false" loext:hyphenation-no-last-word="false"/>
    </style:style>
    <style:style style:name="P19" style:family="paragraph">
      <style:paragraph-properties fo:margin-left="0cm" fo:margin-right="0cm" fo:margin-top="0.42cm" fo:margin-bottom="0.35cm" fo:line-height="100%" fo:text-indent="0cm"/>
    </style:style>
    <style:style style:name="P20" style:family="paragraph">
      <loext:graphic-properties draw:fill="none"/>
      <style:paragraph-properties fo:margin-top="0.42cm" fo:margin-bottom="0.35cm"/>
      <style:text-properties fo:font-size="10pt" style:font-size-asian="10pt" style:font-size-complex="10pt"/>
    </style:style>
    <style:style style:name="P21" style:family="paragraph">
      <style:paragraph-properties fo:margin-top="0.42cm" fo:margin-bottom="0.35cm"/>
      <style:text-properties fo:font-size="10pt" style:font-size-asian="10pt" style:font-size-complex="10pt"/>
    </style:style>
    <style:style style:name="P22" style:family="paragraph">
      <style:paragraph-properties fo:margin-left="0cm" fo:margin-right="0cm" fo:margin-top="0.42cm" fo:margin-bottom="0.35cm" fo:line-height="100%" fo:text-indent="0cm"/>
      <style:text-properties fo:font-size="10pt" style:font-size-asian="10pt" style:font-size-complex="10pt"/>
    </style:style>
    <style:style style:name="P23"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style:font-name="Open Sans Semibold2" fo:font-size="36pt" style:font-size-asian="36pt" style:font-size-complex="36pt"/>
    </style:style>
    <style:style style:name="T4" style:family="text">
      <style:text-properties fo:color="#2d363f" loext:opacity="100%" style:font-name="Open Sans Semibold1" fo:font-size="20pt" fo:font-weight="normal" style:font-size-asian="20pt" style:font-weight-asian="normal" style:font-size-complex="20pt" style:font-weight-complex="normal"/>
    </style:style>
    <style:style style:name="T5" style:family="text">
      <style:text-properties fo:font-size="18pt" style:font-size-asian="18pt" style:font-size-complex="18pt"/>
    </style:style>
    <style:style style:name="T6" style:family="text">
      <style:text-properties fo:font-size="15.3000001907349pt" style:font-size-asian="15.3000001907349pt" style:font-size-complex="15.3000001907349pt"/>
    </style:style>
    <style:style style:name="T7" style:family="text">
      <style:text-properties fo:color="#006666" loext:opacity="100%" fo:font-size="18pt" style:font-size-asian="18pt" style:font-size-complex="18pt"/>
    </style:style>
    <style:style style:name="T8" style:family="text">
      <style:text-properties fo:font-size="11pt" style:font-size-asian="11pt" style:font-size-complex="11pt"/>
    </style:style>
    <style:style style:name="T9" style:family="text">
      <style:text-properties fo:color="#042f80" loext:opacity="100%" fo:font-size="18pt" style:font-size-asian="18pt" style:font-size-complex="18pt"/>
    </style:style>
    <style:style style:name="T10" style:family="text">
      <style:text-properties fo:font-size="12pt" style:font-size-asian="12pt" style:font-size-complex="12pt"/>
    </style:style>
    <style:style style:name="T11" style:family="text">
      <style:text-properties fo:font-size="44pt" style:font-size-asian="44pt" style:font-size-complex="44pt"/>
    </style:style>
    <style:style style:name="T12" style:family="text">
      <style:text-properties fo:font-size="44pt" fo:font-weight="normal" style:font-size-asian="44pt" style:font-weight-asian="normal" style:font-size-complex="44pt" style:font-weight-complex="normal"/>
    </style:style>
    <style:style style:name="T13" style:family="text">
      <style:text-properties style:font-name="Open Sans4" fo:font-size="44pt" fo:font-weight="normal" style:font-size-asian="44pt" style:font-weight-asian="normal" style:font-size-complex="44pt" style:font-weight-complex="normal"/>
    </style:style>
    <style:style style:name="T14" style:family="text">
      <style:text-properties fo:color="#80047b" loext:opacity="100%" fo:font-size="18pt" style:font-size-asian="18pt" style:font-size-complex="18pt"/>
    </style:style>
    <style:style style:name="T15" style:family="text">
      <style:text-properties fo:font-size="4.40000009536743pt" style:font-size-asian="4pt" style:font-size-complex="4pt"/>
    </style:style>
    <style:style style:name="T16" style:family="text">
      <style:text-properties fo:font-style="italic" style:font-style-asian="italic" style:font-style-complex="italic"/>
    </style:style>
    <style:style style:name="T17" style:family="text">
      <style:text-properties fo:font-variant="normal" fo:text-transform="none" fo:color="#000000" loext:opacity="100%" style:text-outline="false" style:text-line-through-style="none" style:text-line-through-type="none" style:text-position="0% 100%" style:font-name="Open Sans1" fo:font-size="18.5pt" fo:letter-spacing="normal" fo:language="fr" fo:country="FR" fo:font-style="normal" fo:text-shadow="none" style:text-underline-style="none" fo:font-weight="normal" style:letter-kerning="true" fo:background-color="transparent" style:font-name-asian="Microsoft YaHei" style:font-size-asian="18.5pt" style:font-style-asian="normal" style:font-weight-asian="normal" style:font-name-complex="Arial" style:font-size-complex="18.5pt" style:font-style-complex="normal"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Open Sans4" fo:font-size="20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Open Sans4" fo:font-size="18.5pt" fo:letter-spacing="normal" fo:language="fr" fo:country="FR" fo:font-style="normal" fo:text-shadow="none" style:text-underline-style="none" fo:font-weight="normal" style:letter-kerning="true" fo:background-color="transparent" style:font-name-asian="Microsoft YaHei" style:font-size-asian="18.5pt" style:font-style-asian="normal" style:font-weight-asian="normal" style:font-name-complex="Arial" style:font-size-complex="18.5pt" style:font-style-complex="normal"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font-size="10pt" style:font-size-asian="10pt" style:font-size-complex="10pt"/>
    </style:style>
    <style:style style:name="T21" style:family="text">
      <style:text-properties fo:font-variant="normal" fo:text-transform="none" fo:color="#000000" loext:opacity="100%" style:text-outline="false" style:text-line-through-style="none" style:text-line-through-type="none" style:text-position="0% 100%" style:font-name="Open Sans1" fo:font-size="2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22" style:family="text">
      <style:text-properties style:font-name="Open Sans1" fo:font-size="18pt" fo:font-weight="normal" style:font-size-asian="18pt" style:font-size-complex="18pt"/>
    </style:style>
    <style:style style:name="T23" style:family="text">
      <style:text-properties style:font-name="Open Sans4" fo:font-size="20pt" fo:font-weight="normal" style:font-size-asian="20pt" style:font-weight-asian="normal" style:font-size-complex="20pt" style:font-weight-complex="normal"/>
    </style:style>
    <style:style style:name="T24" style:family="text">
      <style:text-properties fo:font-size="20pt" style:font-size-asian="20pt" style:font-size-complex="20pt"/>
    </style:style>
    <style:style style:name="T25" style:family="text">
      <style:text-properties style:font-name="Open Sans1" fo:font-size="20pt" fo:font-weight="normal" style:font-size-asian="20pt" style:font-size-complex="20pt"/>
    </style:style>
    <style:style style:name="T26"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27" style:family="text">
      <style:text-properties fo:font-size="15pt" style:font-size-asian="15pt" style:font-size-complex="15pt"/>
    </style:style>
    <style:style style:name="T28"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name-asian="Microsoft YaHei"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9" style:family="text">
      <style:text-properties fo:font-size="15pt" fo:font-weight="bold" style:font-size-asian="15pt" style:font-weight-asian="bold" style:font-size-complex="15pt" style:font-weight-complex="bold"/>
    </style:style>
    <style:style style:name="T30" style:family="text">
      <style:text-properties fo:color="#006666" loext:opacity="100%" fo:font-size="16pt" fo:font-weight="bold" style:font-size-asian="16pt" style:font-weight-asian="bold" style:font-size-complex="16pt" style:font-weight-complex="bold"/>
    </style:style>
    <style:style style:name="T31" style:family="text">
      <style:text-properties fo:color="#729fcf" loext:opacity="100%" fo:font-size="15pt" fo:font-style="italic" fo:font-weight="bold" style:font-size-asian="15pt" style:font-style-asian="italic" style:font-weight-asian="bold" style:font-size-complex="15pt" style:font-style-complex="italic" style:font-weight-complex="bold"/>
    </style:style>
    <style:style style:name="T32" style:family="text">
      <style:text-properties fo:font-size="15pt" fo:font-style="italic" style:font-size-asian="15pt" style:font-style-asian="italic" style:font-size-complex="15pt" style:font-style-complex="italic"/>
    </style:style>
    <style:style style:name="T33" style:family="text">
      <style:text-properties fo:color="#006666" loext:opacity="100%" fo:font-size="16pt" fo:font-style="italic" fo:font-weight="bold" style:font-size-asian="16pt" style:font-style-asian="italic" style:font-weight-asian="bold" style:font-size-complex="16pt" style:font-style-complex="italic" style:font-weight-complex="bold"/>
    </style:style>
    <style:style style:name="T34" style:family="text">
      <style:text-properties fo:font-size="15pt" fo:font-style="italic" fo:font-weight="normal" style:font-size-asian="15pt" style:font-style-asian="italic" style:font-weight-asian="normal" style:font-size-complex="15pt" style:font-style-complex="italic" style:font-weight-complex="normal"/>
    </style:style>
    <style:style style:name="T35" style:family="text">
      <style:text-properties fo:color="#006666" loext:opacity="100%" fo:font-size="16pt" fo:font-style="italic" fo:font-weight="normal" style:font-size-asian="16pt" style:font-style-asian="italic" style:font-weight-asian="normal" style:font-size-complex="16pt" style:font-style-complex="italic" style:font-weight-complex="normal"/>
    </style:style>
    <style:style style:name="T36" style:family="text">
      <style:text-properties fo:font-size="15pt" fo:font-style="normal" fo:font-weight="normal" style:font-size-asian="15pt" style:font-style-asian="normal" style:font-weight-asian="normal" style:font-size-complex="15pt" style:font-style-complex="normal" style:font-weight-complex="normal"/>
    </style:style>
    <style:style style:name="T3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ize="13pt" style:font-size-asian="13pt" style:font-size-complex="13pt"/>
    </style:style>
    <style:style style:name="T3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40" style:family="text">
      <style:text-properties fo:color="#006666" loext:opacity="100%" fo:font-size="15pt" fo:font-style="normal" fo:font-weight="normal" style:font-size-asian="15pt" style:font-style-asian="normal" style:font-weight-asian="normal" style:font-size-complex="15pt" style:font-style-complex="normal" style:font-weight-complex="normal"/>
    </style:style>
    <style:style style:name="T41" style:family="text">
      <style:text-properties fo:font-weight="normal" style:font-weight-asian="normal" style:font-weight-complex="normal"/>
    </style:style>
    <style:style style:name="T42" style:family="text">
      <style:text-properties fo:font-size="15pt" fo:font-style="normal" style:font-size-asian="15pt" style:font-style-asian="normal" style:font-size-complex="15pt" style:font-style-complex="normal"/>
    </style:style>
    <style:style style:name="T43" style:family="text">
      <style:text-properties fo:color="#006666" loext:opacity="100%" fo:font-size="16pt" fo:font-style="normal" fo:font-weight="bold" style:font-size-asian="16pt" style:font-style-asian="normal" style:font-weight-asian="bold" style:font-size-complex="16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2cm" text:min-label-width="0.4cm"/>
        <style:text-properties fo:font-family="Marianne" style:font-style-name="Regular" style:use-window-font-color="true" fo:font-size="50%"/>
      </text:list-level-style-bullet>
      <text:list-level-style-number text:level="5" style:num-format="">
        <style:list-level-properties/>
        <style:text-properties style:use-window-font-color="true" fo:font-size="25%"/>
      </text:list-level-style-number>
      <text:list-level-style-number text:level="6" style:num-format="">
        <style:list-level-properties/>
        <style:text-properties style:use-window-font-color="true" fo:font-size="25%"/>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L6">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L7">
      <text:list-level-style-number text:level="1" style:num-format="">
        <style:list-level-properties/>
        <style:text-properties style:use-window-font-color="true" fo:font-size="100%"/>
      </text:list-level-style-number>
      <text:list-level-style-number text:level="2" style:num-format="">
        <style:list-level-properties/>
        <style:text-properties style:use-window-font-color="true" fo:font-size="100%"/>
      </text:list-level-style-number>
      <text:list-level-style-number text:level="3" style:num-format="">
        <style:list-level-properties/>
        <style:text-properties style:use-window-font-color="true" fo:font-size="100%"/>
      </text:list-level-style-number>
      <text:list-level-style-number text:level="4" style:num-format="">
        <style:list-level-properties/>
        <style:text-properties style:use-window-font-color="true" fo:font-size="100%"/>
      </text:list-level-style-number>
      <text:list-level-style-number text:level="5" style:num-format="">
        <style:list-level-properties/>
        <style:text-properties style:use-window-font-color="true" fo:font-size="25%"/>
      </text:list-level-style-number>
      <text:list-level-style-number text:level="6" style:num-format="">
        <style:list-level-properties/>
        <style:text-properties style:use-window-font-color="true" fo:font-size="25%"/>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efonte de Kraftwerk</presentation:footer-decl>
      <presentation:date-time-decl presentation:name="dtd1" presentation:source="fixed">01/07/2026</presentation:date-time-decl>
      <draw:page draw:name="page1" draw:style-name="dp1" draw:master-page-name="Page_20_de_20_garde" presentation:presentation-page-layout-name="AL1T1" presentation:use-footer-name="ftr1" presentation:use-date-time-name="dtd1">
        <office:forms form:automatic-focus="false" form:apply-design-mode="false"/>
        <draw:frame presentation:style-name="pr1" draw:text-style-name="P2" draw:layer="layout" svg:width="17cm" svg:height="5.5cm" svg:x="1cm" svg:y="5cm" presentation:class="title" presentation:user-transformed="true">
          <draw:text-box>
            <text:p text:style-name="P1"><text:span text:style-name="T1">Refonte de Kraftwerk</text:span><text:span text:style-name="T1"><text:line-break/></text:span><text:span text:style-name="T1"><text:line-break/></text:span><text:span text:style-name="T2">ou</text:span><text:span text:style-name="T2"><text:line-break/></text:span><text:span text:style-name="T2"><text:line-break/></text:span><text:span text:style-name="T2"> « Construire le moteur post-collecte de demain »</text:span></text:p>
          </draw:text-box>
        </draw:frame>
        <draw:frame presentation:style-name="pr2" draw:layer="layout" svg:width="14.469cm" svg:height="2.232cm" svg:x="2cm" svg:y="12.768cm" presentation:class="outline" presentation:user-transformed="true">
          <draw:text-box>
            <text:list text:style-name="L2">
              <text:list-item>
                <text:p text:style-name="P3">Pilotée par l’IA</text:p>
              </text:list-item>
            </text:list>
            <text:p text:style-name="P3"/>
            <text:p text:style-name="P3"/>
          </draw:text-box>
        </draw:frame>
        <presentation:notes draw:style-name="dp2">
          <draw:page-thumbnail draw:style-name="gr1" draw:layer="layout" svg:width="19.6cm" svg:height="11.67cm" svg:x="0.7cm" svg:y="0.699cm" draw:page-number="1" presentation:class="page"/>
          <draw:frame presentation:style-name="pr3" draw:text-style-name="P4" draw:layer="layout" svg:width="19.6cm" svg:height="16.562cm" svg:x="0.7cm" svg:y="12.599cm" presentation:class="notes" presentation:placeholder="true" presentation:user-transformed="true">
            <draw:text-box/>
          </draw:frame>
        </presentation:notes>
      </draw:page>
      <draw:page draw:name="page2" draw:style-name="dp3" draw:master-page-name="Base" presentation:presentation-page-layout-name="AL1T1" presentation:use-footer-name="ftr1" presentation:use-date-time-name="dtd1">
        <office:forms form:automatic-focus="false" form:apply-design-mode="false"/>
        <draw:frame presentation:style-name="pr4" draw:layer="layout" svg:width="25.701cm" svg:height="2.629cm" svg:x="1.299cm" svg:y="0.628cm" presentation:class="title">
          <draw:text-box>
            <text:p>Sommaire</text:p>
          </draw:text-box>
        </draw:frame>
        <draw:frame draw:style-name="gr2" draw:layer="layout" svg:width="25.759cm" svg:height="6.959cm" svg:x="1.24cm" svg:y="3.72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5"><text:span text:style-name="T3">01</text:span></text:p>
              </table:table-cell>
              <table:table-cell table:style-name="ce3">
                <text:p text:style-name="P6"><text:span text:style-name="T4">Démarche et objectifs</text:span></text:p>
              </table:table-cell>
            </table:table-row>
            <table:table-row table:style-name="ro1">
              <table:table-cell table:style-name="ce1"/>
              <table:table-cell table:style-name="ce2">
                <text:p text:style-name="P5"><text:span text:style-name="T3">02</text:span></text:p>
              </table:table-cell>
              <table:table-cell table:style-name="ce3">
                <text:p text:style-name="P6"><text:span text:style-name="T4">Architecture cible</text:span></text:p>
              </table:table-cell>
            </table:table-row>
            <table:table-row table:style-name="ro1">
              <table:table-cell table:style-name="ce1"/>
              <table:table-cell table:style-name="ce2">
                <text:p text:style-name="P5"><text:span text:style-name="T3">03</text:span></text:p>
              </table:table-cell>
              <table:table-cell table:style-name="ce3">
                <text:p text:style-name="P6"><text:span text:style-name="T4">Roadmap</text:span></text:p>
              </table:table-cell>
            </table:table-row>
          </table:table>
          <draw:image xlink:href="Pictures/TablePreview1.svm" xlink:type="simple" xlink:show="embed" xlink:actuate="onLoad"/>
        </draw:frame>
        <draw:frame draw:style-name="gr3" draw:text-style-name="P7" draw:layer="layout" svg:width="0.893cm" svg:height="1.585cm" svg:x="1.944cm" svg:y="3.743cm">
          <draw:image xlink:href="Pictures/200000060000037E000006329640F12E.svm" xlink:type="simple" xlink:show="embed" xlink:actuate="onLoad" draw:mime-type="image/x-svm">
            <text:p/>
          </draw:image>
          <draw:image xlink:href="Pictures/100000010000002B0000004C1DD77ADF.png" xlink:type="simple" xlink:show="embed" xlink:actuate="onLoad" draw:mime-type="image/png"/>
        </draw:frame>
        <draw:custom-shape draw:name="Freeform: Shape 1" draw:style-name="gr4" draw:text-style-name="P8" draw:layer="layout" svg:width="0.891cm" svg:height="1.584cm" svg:x="1.972cm" svg:y="6.028cm">
          <text:p/>
          <draw:enhanced-geometry draw:mirror-horizontal="false" draw:mirror-vertical="false" svg:viewBox="0 0 0 0" draw:glue-points="?f0 ?f1 ?f2 ?f3 ?f4 ?f5 ?f6 ?f7 ?f8 ?f9 ?f10 ?f11" drawooo:sub-view-size="388600 690230" draw:text-areas="0 0 ?f12 ?f13" draw:type="ooxml-non-primitive" draw:enhanced-path="M 0 690231 L 28905 690231 388600 293753 388600 0 0 0 0 690231 Z N">
            <draw:equation draw:name="f0" draw:formula="0*logwidth/388600"/>
            <draw:equation draw:name="f1" draw:formula="690231*logheight/690230"/>
            <draw:equation draw:name="f2" draw:formula="28905*logwidth/388600"/>
            <draw:equation draw:name="f3" draw:formula="690231*logheight/690230"/>
            <draw:equation draw:name="f4" draw:formula="388600*logwidth/388600"/>
            <draw:equation draw:name="f5" draw:formula="293753*logheight/690230"/>
            <draw:equation draw:name="f6" draw:formula="388600*logwidth/388600"/>
            <draw:equation draw:name="f7" draw:formula="0*logheight/690230"/>
            <draw:equation draw:name="f8" draw:formula="0*logwidth/388600"/>
            <draw:equation draw:name="f9" draw:formula="0*logheight/690230"/>
            <draw:equation draw:name="f10" draw:formula="0*logwidth/388600"/>
            <draw:equation draw:name="f11" draw:formula="690231*logheight/690230"/>
            <draw:equation draw:name="f12" draw:formula="logwidth"/>
            <draw:equation draw:name="f13" draw:formula="logheight"/>
          </draw:enhanced-geometry>
        </draw:custom-shape>
        <draw:custom-shape draw:name="Freeform: Shape 3" draw:style-name="gr5" draw:text-style-name="P9" draw:layer="layout" svg:width="0.891cm" svg:height="1.584cm" svg:x="1.972cm" svg:y="8.36cm">
          <text:p/>
          <draw:enhanced-geometry draw:mirror-horizontal="false" draw:mirror-vertical="false" svg:viewBox="0 0 0 0" draw:glue-points="?f0 ?f1 ?f2 ?f3 ?f4 ?f5 ?f6 ?f7 ?f8 ?f9 ?f10 ?f11" drawooo:sub-view-size="388600 690230" draw:text-areas="0 0 ?f12 ?f13" draw:type="ooxml-non-primitive" draw:enhanced-path="M 0 690231 L 28905 690231 388600 293753 388600 0 0 0 0 690231 Z N">
            <draw:equation draw:name="f0" draw:formula="0*logwidth/388600"/>
            <draw:equation draw:name="f1" draw:formula="690231*logheight/690230"/>
            <draw:equation draw:name="f2" draw:formula="28905*logwidth/388600"/>
            <draw:equation draw:name="f3" draw:formula="690231*logheight/690230"/>
            <draw:equation draw:name="f4" draw:formula="388600*logwidth/388600"/>
            <draw:equation draw:name="f5" draw:formula="293753*logheight/690230"/>
            <draw:equation draw:name="f6" draw:formula="388600*logwidth/388600"/>
            <draw:equation draw:name="f7" draw:formula="0*logheight/690230"/>
            <draw:equation draw:name="f8" draw:formula="0*logwidth/388600"/>
            <draw:equation draw:name="f9" draw:formula="0*logheight/690230"/>
            <draw:equation draw:name="f10" draw:formula="0*logwidth/388600"/>
            <draw:equation draw:name="f11" draw:formula="690231*logheight/690230"/>
            <draw:equation draw:name="f12" draw:formula="logwidth"/>
            <draw:equation draw:name="f13" draw:formula="logheight"/>
          </draw:enhanced-geometry>
        </draw:custom-shape>
        <presentation:notes draw:style-name="dp2">
          <draw:page-thumbnail draw:style-name="gr1" draw:layer="layout" svg:width="19.6cm" svg:height="11.56cm" svg:x="0.7cm" svg:y="0.7cm" draw:page-number="2" presentation:class="page"/>
          <draw:frame presentation:style-name="pr5" draw:layer="layout" svg:width="19.6cm" svg:height="16.562cm" svg:x="0.7cm" svg:y="12.599cm" presentation:class="notes">
            <draw:text-box>
              <text:p>Le sommaire en ligne utilise la page maîtresse de base, avec un tableau aux bordures transparentes. Ce n’est pas idéal, mais ça garanti les alignements.</text:p>
              <text:p>On pourrait peut-être créer un style de tableau dédié ?</text:p>
            </draw:text-box>
          </draw:frame>
        </presentation:notes>
      </draw:page>
      <draw:page draw:name="page3" draw:style-name="dp3" draw:master-page-name="Chapitre_20_B" presentation:presentation-page-layout-name="AL1T1" presentation:use-footer-name="ftr1" presentation:use-date-time-name="dtd1">
        <office:forms form:automatic-focus="false" form:apply-design-mode="false"/>
        <draw:frame presentation:style-name="pr6" draw:layer="layout" svg:width="10cm" svg:height="7cm" svg:x="3cm" svg:y="1.4cm" presentation:class="title" presentation:user-transformed="true">
          <draw:text-box>
            <text:p text:style-name="P10">01<text:tab/></text:p>
          </draw:text-box>
        </draw:frame>
        <draw:frame presentation:style-name="pr7" draw:layer="layout" svg:width="20cm" svg:height="6.7cm" svg:x="3cm" svg:y="8.7cm" presentation:class="outline">
          <draw:text-box>
            <text:list text:style-name="L5">
              <text:list-item>
                <text:p>Démarche et objectifs</text:p>
                <text:list>
                  <text:list-item>
                    <text:p>Pourquoi et comment on construit la cible</text:p>
                  </text:list-item>
                </text:list>
              </text:list-item>
            </text:list>
          </draw:text-box>
        </draw:frame>
        <presentation:notes draw:style-name="dp2">
          <draw:page-thumbnail draw:style-name="gr1" draw:layer="layout" svg:width="19.6cm" svg:height="11.67cm" svg:x="0.7cm" svg:y="0.699cm" draw:page-number="3" presentation:class="page"/>
          <draw:frame presentation:style-name="pr8" draw:text-style-name="P4" draw:layer="layout" svg:width="19.6cm" svg:height="16.562cm" svg:x="0.7cm" svg:y="12.599cm" presentation:class="notes" presentation:placeholder="true" presentation:user-transformed="true">
            <draw:text-box/>
          </draw:frame>
        </presentation:notes>
      </draw:page>
      <draw:page draw:name="page4" draw:style-name="dp3" draw:master-page-name="Base" presentation:presentation-page-layout-name="AL2T34" presentation:use-footer-name="ftr1" presentation:use-date-time-name="dtd1">
        <office:forms form:automatic-focus="false" form:apply-design-mode="false"/>
        <draw:frame presentation:style-name="pr4" draw:layer="layout" svg:width="11.921cm" svg:height="2.629cm" svg:x="1.421cm" svg:y="0.645cm" presentation:class="title" presentation:user-transformed="true">
          <draw:text-box>
            <text:p>Les problèmes actuels</text:p>
          </draw:text-box>
        </draw:frame>
        <draw:frame presentation:style-name="pr9" draw:layer="layout" svg:width="8.252cm" svg:height="6.403cm" svg:x="1.24cm" svg:y="2.22cm" presentation:class="outline" presentation:user-transformed="true">
          <draw:text-box>
            <text:list text:style-name="L6">
              <text:list-header>
                <text:p><text:span text:style-name="T5"/></text:p>
                <text:list>
                  <text:list-header>
                    <text:p><text:span text:style-name="T6">Complexité technique</text:span></text:p>
                  </text:list-header>
                </text:list>
              </text:list-header>
            </text:list>
          </draw:text-box>
        </draw:frame>
        <draw:frame presentation:style-name="pr9" draw:layer="layout" svg:width="8.252cm" svg:height="5.619cm" svg:x="19.578cm" svg:y="5.69cm" presentation:class="outline" presentation:user-transformed="true">
          <draw:text-box>
            <text:list text:style-name="L6">
              <text:list-item>
                <text:list>
                  <text:list-item>
                    <text:p/>
                  </text:list-item>
                  <text:list-item>
                    <text:p><text:span text:style-name="T7">Surcharge mémoire</text:span></text:p>
                    <text:list>
                      <text:list-item>
                        <text:p><text:span text:style-name="T8">Nécessité de gérer les enquêtes de façon plus efficace (enquêtes infra-annuelles avec des périodes de collecte plus courtes donc 12h de retard = <text:s/>risques accrus)</text:span></text:p>
                      </text:list-item>
                    </text:list>
                  </text:list-item>
                </text:list>
              </text:list-item>
            </text:list>
          </draw:text-box>
        </draw:frame>
        <draw:frame presentation:style-name="pr9" draw:layer="layout" svg:width="8.252cm" svg:height="5.619cm" svg:x="9.906cm" svg:y="8.374cm" presentation:class="outline" presentation:user-transformed="true">
          <draw:text-box>
            <text:list text:style-name="L6">
              <text:list-item>
                <text:list>
                  <text:list-item>
                    <text:p/>
                  </text:list-item>
                  <text:list-item>
                    <text:p><text:span text:style-name="T9">Automatisation et passage par « lot / partitionId »</text:span></text:p>
                    <text:list>
                      <text:list-item>
                        <text:p><text:span text:style-name="T10">QuestionnaireModelId n’est plus la référence </text:span></text:p>
                      </text:list-item>
                      <text:list-item>
                        <text:p><text:span text:style-name="T10">Période de transition avec des enquêtes automatisées et d’autres non donc complexité</text:span></text:p>
                      </text:list-item>
                    </text:list>
                  </text:list-item>
                </text:list>
              </text:list-item>
            </text:list>
          </draw:text-box>
        </draw:frame>
        <draw:frame draw:style-name="gr3" draw:text-style-name="P7" draw:layer="layout" svg:width="4.145cm" svg:height="4.145cm" svg:x="21.886cm" svg:y="9.934cm">
          <draw:image xlink:href="Pictures/1000000100000762000007623EBFD7E2.png" xlink:type="simple" xlink:show="embed" xlink:actuate="onLoad" draw:mime-type="image/png">
            <text:p/>
          </draw:image>
        </draw:frame>
        <draw:frame draw:style-name="gr3" draw:text-style-name="P7" draw:layer="layout" svg:width="6.18cm" svg:height="6.18cm" svg:x="0.975cm" svg:y="8.279cm">
          <draw:image xlink:href="Pictures/1000000100000762000007623F12FCE6.png" xlink:type="simple" xlink:show="embed" xlink:actuate="onLoad" draw:mime-type="image/png">
            <text:p/>
          </draw:image>
        </draw:frame>
        <draw:frame draw:style-name="gr3" draw:text-style-name="P7" draw:layer="layout" svg:width="3.765cm" svg:height="3.765cm" svg:x="11.658cm" svg:y="5.578cm">
          <draw:image xlink:href="Pictures/100000010000076200000762B837D606.png" xlink:type="simple" xlink:show="embed" xlink:actuate="onLoad" draw:mime-type="image/png">
            <text:p/>
          </draw:image>
        </draw:frame>
        <draw:frame presentation:style-name="pr9" draw:layer="layout" svg:width="8.252cm" svg:height="6.403cm" svg:x="1.275cm" svg:y="2.846cm" presentation:class="outline" presentation:user-transformed="true">
          <draw:text-box>
            <text:list text:style-name="L6">
              <text:list-header>
                <text:p><text:span text:style-name="T5"/></text:p>
                <text:list>
                  <text:list-header>
                    <text:p><text:span text:style-name="T6"/></text:p>
                    <text:list>
                      <text:list-item>
                        <text:p><text:span text:style-name="T11">Conception sur une cible différente de la cible actuelle (fichiers plats versus base par exemple)</text:span><text:span text:style-name="T11"><text:line-break/></text:span><text:span text:style-name="T11"><text:line-break/></text:span><text:span text:style-name="T11">Bugs récurrents</text:span><text:span text:style-name="T11"><text:line-break/></text:span><text:span text:style-name="T11"><text:line-break/></text:span><text:span text:style-name="T11">Run coûteux</text:span><text:span text:style-name="T12"> car des parties de codes qui ne font plus sens</text:span></text:p>
                      </text:list-item>
                    </text:list>
                  </text:list-header>
                </text:list>
              </text:list-header>
            </text:list>
            <text:p><text:span text:style-name="T13">Pertinence de l’outil pour des opérations « simples » (mise en forme des reporting data)</text:span></text:p>
          </draw:text-box>
        </draw:frame>
        <draw:frame presentation:style-name="pr9" draw:layer="layout" svg:width="8.252cm" svg:height="5.619cm" svg:x="14.157cm" svg:y="0.914cm" presentation:class="outline" presentation:user-transformed="true">
          <draw:text-box>
            <text:list text:style-name="L6">
              <text:list-item>
                <text:list>
                  <text:list-item>
                    <text:p/>
                  </text:list-item>
                  <text:list-item>
                    <text:p><text:span text:style-name="T14">Pas de cohérence aval</text:span></text:p>
                    <text:list>
                      <text:list-item>
                        <text:p><text:span text:style-name="T10">Calculs basés sur des agrégats (sum, first, filter…) non recalculés</text:span></text:p>
                      </text:list-item>
                    </text:list>
                  </text:list-item>
                </text:list>
              </text:list-item>
            </text:list>
          </draw:text-box>
        </draw:frame>
        <draw:frame draw:style-name="gr6" draw:text-style-name="P11" draw:layer="layout" svg:width="3.787cm" svg:height="3.787cm" svg:x="21.926cm" svg:y="1.366cm">
          <draw:image xlink:href="Pictures/100000010000076200000762B20A1301.png" xlink:type="simple" xlink:show="embed" xlink:actuate="onLoad" draw:mime-type="image/png">
            <text:p/>
          </draw:image>
        </draw:frame>
        <presentation:notes draw:style-name="dp2">
          <draw:page-thumbnail draw:style-name="gr1" draw:layer="layout" svg:width="19.6cm" svg:height="11.56cm" svg:x="0.7cm" svg:y="0.7cm" draw:page-number="4" presentation:class="page"/>
          <draw:frame presentation:style-name="pr10" draw:text-style-name="P4" draw:layer="layout" svg:width="19.6cm" svg:height="16.562cm" svg:x="0.7cm" svg:y="12.599cm" presentation:class="notes" presentation:placeholder="true">
            <draw:text-box/>
          </draw:frame>
        </presentation:notes>
      </draw:page>
      <draw:page draw:name="page5" draw:style-name="dp3" draw:master-page-name="Base" presentation:presentation-page-layout-name="AL3T3" presentation:use-footer-name="ftr1" presentation:use-date-time-name="dtd1">
        <office:forms form:automatic-focus="false" form:apply-design-mode="false"/>
        <draw:frame presentation:style-name="pr11" draw:layer="layout" svg:width="10.587cm" svg:height="2.629cm" svg:x="1.399cm" svg:y="0.628cm" presentation:class="title" presentation:user-transformed="true">
          <draw:text-box>
            <text:p>Un couplage fort avec VTL</text:p>
          </draw:text-box>
        </draw:frame>
        <draw:frame presentation:style-name="pr12" draw:layer="layout" svg:width="11.16cm" svg:height="9.508cm" svg:x="0.736cm" svg:y="3.854cm" presentation:class="outline" presentation:user-transformed="true">
          <draw:text-box>
            <text:list text:style-name="L6">
              <text:list-item>
                <text:list>
                  <text:list-item>
                    <text:list>
                      <text:list-item>
                        <text:p/>
                        <text:list>
                          <text:list-item>
                            <text:p>À plusieurs étapes</text:p>
                          </text:list-item>
                          <text:list-item>
                            <text:p>Par l’utilisateur ou automatique</text:p>
                          </text:list-item>
                          <text:list-item>
                            <text:p>Variables calculées</text:p>
                          </text:list-item>
                        </text:list>
                      </text:list-item>
                    </text:list>
                  </text:list-item>
                </text:list>
              </text:list-item>
            </text:list>
            <text:p/>
            <text:p>&gt; des utilisateurs qui ne comprennent pas les incohérences collecte/aval</text:p>
          </draw:text-box>
        </draw:frame>
        <draw:custom-shape draw:style-name="gr7" draw:text-style-name="P12" draw:layer="layout" svg:width="15.186cm" svg:height="15.75cm" svg:x="13.317cm" svg:y="-0.018cm">
          <text:p/>
          <draw:enhanced-geometry svg:viewBox="0 0 21600 21600" draw:type="rectangle" draw:enhanced-path="M 0 0 L 21600 0 21600 21600 0 21600 0 0 Z N"/>
        </draw:custom-shape>
        <draw:frame draw:style-name="gr3" draw:text-style-name="P7" draw:layer="layout" svg:width="12.226cm" svg:height="7.595cm" svg:x="14.633cm" svg:y="1.614cm">
          <draw:image xlink:href="Pictures/1000000100000245000001697E9028E8.png" xlink:type="simple" xlink:show="embed" xlink:actuate="onLoad" draw:mime-type="image/png">
            <text:p/>
          </draw:image>
        </draw:frame>
        <draw:frame draw:style-name="gr6" draw:text-style-name="P11" draw:layer="layout" svg:width="2.139cm" svg:height="2.139cm" svg:x="9.812cm" svg:y="9.763cm">
          <draw:image xlink:href="Pictures/100000010000076200000762F1DECCDB.png" xlink:type="simple" xlink:show="embed" xlink:actuate="onLoad" draw:mime-type="image/png">
            <text:p/>
          </draw:image>
        </draw:frame>
        <presentation:notes draw:style-name="dp2">
          <draw:page-thumbnail draw:style-name="gr1" draw:layer="layout" svg:width="19.6cm" svg:height="11.56cm" svg:x="0.7cm" svg:y="0.7cm" draw:page-number="5" presentation:class="page"/>
          <draw:frame presentation:style-name="pr10" draw:text-style-name="P4" draw:layer="layout" svg:width="19.6cm" svg:height="16.562cm" svg:x="0.7cm" svg:y="12.599cm" presentation:class="notes" presentation:placeholder="true">
            <draw:text-box/>
          </draw:frame>
        </presentation:notes>
      </draw:page>
      <draw:page draw:name="page6" draw:style-name="dp3" draw:master-page-name="Base_20_G1" presentation:presentation-page-layout-name="AL1T1" presentation:use-footer-name="ftr1" presentation:use-date-time-name="dtd1">
        <office:forms form:automatic-focus="false" form:apply-design-mode="false"/>
        <draw:frame presentation:style-name="pr13" draw:layer="layout" svg:width="19.201cm" svg:height="2.629cm" svg:x="1.299cm" svg:y="0.628cm" presentation:class="title" presentation:user-transformed="true">
          <draw:text-box>
            <text:p text:style-name="P13">Démarche de construction</text:p>
          </draw:text-box>
        </draw:frame>
        <draw:frame presentation:style-name="pr14" draw:layer="layout" svg:width="19.26cm" svg:height="10.5cm" svg:x="1.196cm" svg:y="1.843cm" presentation:class="outline" presentation:user-transformed="true">
          <draw:text-box>
            <text:list text:style-name="L6">
              <text:list-item>
                <text:p>Pilotée par l’IA (Mistral, puis Claude)</text:p>
                <text:list>
                  <text:list-item>
                    <text:list>
                      <text:list-item>
                        <text:p><text:span text:style-name="T15"/></text:p>
                      </text:list-item>
                    </text:list>
                  </text:list-item>
                  <text:list-item>
                    <text:p>À partir :<text:line-break/>- du code (github) <text:line-break/>- de la documentation utilisateur (gitlab)<text:line-break/></text:p>
                  </text:list-item>
                </text:list>
              </text:list-item>
            </text:list>
            <text:p>Avec comme objectifs :</text:p>
            <text:list text:continue-numbering="true" text:style-name="L6">
              <text:list-item>
                <text:list>
                  <text:list-item>
                    <text:list>
                      <text:list-item>
                        <text:list>
                          <text:list-item>
                            <text:p>documenter l’existant</text:p>
                          </text:list-item>
                          <text:list-item>
                            <text:p>analyser les incohérences code/tests/doc</text:p>
                          </text:list-item>
                          <text:list-item>
                            <text:p>dessiner la cible et le chemin pour l’atteindre</text:p>
                          </text:list-item>
                        </text:list>
                      </text:list-item>
                      <text:list-item>
                        <text:p/>
                      </text:list-item>
                    </text:list>
                  </text:list-item>
                </text:list>
              </text:list-item>
            </text:list>
          </draw:text-box>
        </draw:frame>
        <draw:frame draw:style-name="gr3" draw:text-style-name="P7" draw:layer="layout" svg:width="6.626cm" svg:height="6.626cm" svg:x="14.52cm" svg:y="8.318cm">
          <draw:image xlink:href="Pictures/1000000100000762000007620C8C27F6.png" xlink:type="simple" xlink:show="embed" xlink:actuate="onLoad" draw:mime-type="image/png">
            <text:p/>
          </draw:image>
        </draw:frame>
        <presentation:notes draw:style-name="dp2">
          <draw:page-thumbnail draw:style-name="gr1" draw:layer="layout" svg:width="19.6cm" svg:height="11.56cm" svg:x="0.7cm" svg:y="0.7cm" draw:page-number="6" presentation:class="page"/>
          <draw:frame presentation:style-name="pr15" draw:text-style-name="P4" draw:layer="layout" svg:width="19.6cm" svg:height="16.562cm" svg:x="0.7cm" svg:y="12.599cm" presentation:class="notes" presentation:placeholder="true" presentation:user-transformed="true">
            <draw:text-box/>
          </draw:frame>
        </presentation:notes>
      </draw:page>
      <draw:page draw:name="page7" draw:style-name="dp3" draw:master-page-name="Chapitre_20_V" presentation:presentation-page-layout-name="AL1T1" presentation:use-footer-name="ftr1" presentation:use-date-time-name="dtd1">
        <office:forms form:automatic-focus="false" form:apply-design-mode="false"/>
        <draw:frame presentation:style-name="pr16" draw:layer="layout" svg:width="10cm" svg:height="7cm" svg:x="3cm" svg:y="1.4cm" presentation:class="title" presentation:user-transformed="true">
          <draw:text-box>
            <text:p>02</text:p>
          </draw:text-box>
        </draw:frame>
        <draw:frame presentation:style-name="pr17" draw:layer="layout" svg:width="20cm" svg:height="6.7cm" svg:x="3cm" svg:y="8.7cm" presentation:class="outline" presentation:user-transformed="true">
          <draw:text-box>
            <text:list text:style-name="L5">
              <text:list-item>
                <text:p>Architecture cible</text:p>
                <text:list>
                  <text:list-item>
                    <text:p>À valider</text:p>
                  </text:list-item>
                </text:list>
              </text:list-item>
            </text:list>
          </draw:text-box>
        </draw:frame>
        <presentation:notes draw:style-name="dp2">
          <draw:page-thumbnail draw:style-name="gr1" draw:layer="layout" svg:width="19.6cm" svg:height="11.67cm" svg:x="0.7cm" svg:y="0.699cm" draw:page-number="7" presentation:class="page"/>
          <draw:frame presentation:style-name="pr18" draw:text-style-name="P4" draw:layer="layout" svg:width="19.6cm" svg:height="16.562cm" svg:x="0.7cm" svg:y="12.599cm" presentation:class="notes" presentation:placeholder="true">
            <draw:text-box/>
          </draw:frame>
        </presentation:notes>
      </draw:page>
      <draw:page draw:name="page8" draw:style-name="dp3" draw:master-page-name="Base_20_G1" presentation:presentation-page-layout-name="AL1T1" presentation:use-footer-name="ftr1" presentation:use-date-time-name="dtd1">
        <office:forms form:automatic-focus="false" form:apply-design-mode="false"/>
        <draw:frame presentation:style-name="pr13" draw:layer="layout" svg:width="19.201cm" svg:height="2.629cm" svg:x="1.299cm" svg:y="0.628cm" presentation:class="title" presentation:user-transformed="true">
          <draw:text-box>
            <text:p text:style-name="P13">Propositions : </text:p>
          </draw:text-box>
        </draw:frame>
        <draw:frame presentation:style-name="pr14" draw:layer="layout" svg:width="19.26cm" svg:height="10.5cm" svg:x="1.134cm" svg:y="2.722cm" presentation:class="outline" presentation:user-transformed="true">
          <draw:text-box>
            <text:p text:style-name="P14">Hypothèses de travail</text:p>
            <text:list text:style-name="L6">
              <text:list-item>
                <text:list>
                  <text:list-item>
                    <text:list>
                      <text:list-item>
                        <text:p>- Suppression de la lecture de données en fichier (base du KW actuel)</text:p>
                      </text:list-item>
                      <text:list-item>
                        <text:p>- Les <text:span text:style-name="T16">calculated</text:span> sont stockées dans Genesis (cf plus loin)</text:p>
                      </text:list-item>
                      <text:list-item>
                        <text:p>- Les paradata ne sont pas traitées</text:p>
                      </text:list-item>
                    </text:list>
                  </text:list-item>
                </text:list>
              </text:list-item>
            </text:list>
            <text:p/>
            <text:p>À valider/discuter :</text:p>
            <text:p text:style-name="P15"><text:span text:style-name="T17">- Faut il un mode API ?</text:span></text:p>
            <text:p text:style-name="P16"><text:span text:style-name="T17">- Intérêt de maintenir la sortie « Reporting Sabiane ? »</text:span></text:p>
            <text:p text:style-name="P16"><text:span text:style-name="T17">- SQL ? Java ? … R ?</text:span></text:p>
            <text:p text:style-name="P16"><text:span text:style-name="T18">-</text:span><text:span text:style-name="T19"> Utilisation de scripts "aval" pour les exports ?</text:span></text:p>
            <text:p text:style-name="P15"><text:span text:style-name="T17"/></text:p>
            <text:p text:style-name="P15"><text:span text:style-name="T20"/></text:p>
            <text:p text:style-name="P17"><text:span text:style-name="T20"/></text:p>
          </draw:text-box>
        </draw:frame>
        <draw:frame draw:style-name="gr3" draw:text-style-name="P7" draw:layer="layout" svg:width="8.827cm" svg:height="8.827cm" svg:x="15.556cm" svg:y="5.989cm">
          <draw:image xlink:href="Pictures/100000010000076200000762DFA735C4.png" xlink:type="simple" xlink:show="embed" xlink:actuate="onLoad" draw:mime-type="image/png">
            <text:p/>
          </draw:image>
        </draw:frame>
        <presentation:notes draw:style-name="dp2">
          <draw:page-thumbnail draw:style-name="gr1" draw:layer="layout" svg:width="19.6cm" svg:height="11.56cm" svg:x="0.7cm" svg:y="0.7cm" draw:page-number="8" presentation:class="page"/>
          <draw:frame presentation:style-name="pr15" draw:text-style-name="P4" draw:layer="layout" svg:width="19.6cm" svg:height="16.562cm" svg:x="0.7cm" svg:y="12.599cm" presentation:class="notes" presentation:placeholder="true" presentation:user-transformed="true">
            <draw:text-box/>
          </draw:frame>
        </presentation:notes>
      </draw:page>
      <draw:page draw:name="page9" draw:style-name="dp3" draw:master-page-name="Base_20_G1" presentation:presentation-page-layout-name="AL1T1" presentation:use-footer-name="ftr1" presentation:use-date-time-name="dtd1">
        <office:forms form:automatic-focus="false" form:apply-design-mode="false"/>
        <draw:frame presentation:style-name="pr13" draw:layer="layout" svg:width="19.201cm" svg:height="2.629cm" svg:x="1.299cm" svg:y="0.628cm" presentation:class="title">
          <draw:text-box>
            <text:p>Actuel</text:p>
          </draw:text-box>
        </draw:frame>
        <draw:frame draw:style-name="gr8" draw:text-style-name="P11" draw:layer="layout" svg:width="24.524cm" svg:height="11.976cm" svg:x="1.657cm" svg:y="2.359cm">
          <draw:image xlink:href="Pictures/10000001000002C000000314337C6AE0.png" xlink:type="simple" xlink:show="embed" xlink:actuate="onLoad" draw:mime-type="image/png">
            <text:p/>
          </draw:image>
        </draw:frame>
        <presentation:notes draw:style-name="dp2">
          <draw:page-thumbnail draw:style-name="gr1" draw:layer="layout" svg:width="19.6cm" svg:height="11.56cm" svg:x="0.7cm" svg:y="0.7cm" draw:page-number="9" presentation:class="page"/>
          <draw:frame presentation:style-name="pr19" draw:text-style-name="P4" draw:layer="layout" svg:width="19.6cm" svg:height="16.562cm" svg:x="0.7cm" svg:y="12.599cm" presentation:class="notes" presentation:placeholder="true">
            <draw:text-box/>
          </draw:frame>
        </presentation:notes>
      </draw:page>
      <draw:page draw:name="page10" draw:style-name="dp3" draw:master-page-name="_31__5f_Base_20_G1" presentation:presentation-page-layout-name="AL1T1" presentation:use-footer-name="ftr1" presentation:use-date-time-name="dtd1">
        <office:forms form:automatic-focus="false" form:apply-design-mode="false"/>
        <draw:frame draw:style-name="gr9" draw:text-style-name="P11" draw:layer="layout" svg:width="25.062cm" svg:height="14.064cm" svg:x="1.101cm" svg:y="1.043cm">
          <draw:image xlink:href="Pictures/10000001000002C000000314337C6AE0.png" xlink:type="simple" xlink:show="embed" xlink:actuate="onLoad" draw:mime-type="image/png">
            <text:p/>
          </draw:image>
        </draw:frame>
        <draw:frame presentation:style-name="pr20" draw:layer="layout" svg:width="19.201cm" svg:height="2.629cm" svg:x="1.299cm" svg:y="0.628cm" presentation:class="title">
          <draw:text-box>
            <text:p>Cible</text:p>
          </draw:text-box>
        </draw:frame>
        <presentation:notes draw:style-name="dp2">
          <draw:page-thumbnail draw:style-name="gr1" draw:layer="layout" svg:width="19.6cm" svg:height="11.56cm" svg:x="0.7cm" svg:y="0.7cm" draw:page-number="10" presentation:class="page"/>
          <draw:frame presentation:style-name="pr21" draw:text-style-name="P4" draw:layer="layout" svg:width="19.6cm" svg:height="16.562cm" svg:x="0.7cm" svg:y="12.599cm" presentation:class="notes" presentation:placeholder="true">
            <draw:text-box/>
          </draw:frame>
        </presentation:notes>
      </draw:page>
      <draw:page draw:name="page11" draw:style-name="dp3" draw:master-page-name="_31__5f_Base_20_G1" presentation:presentation-page-layout-name="AL1T1" presentation:use-footer-name="ftr1" presentation:use-date-time-name="dtd1">
        <office:forms form:automatic-focus="false" form:apply-design-mode="false"/>
        <draw:frame presentation:style-name="pr20" draw:layer="layout" svg:width="19.201cm" svg:height="2.629cm" svg:x="1.299cm" svg:y="0.628cm" presentation:class="title" presentation:user-transformed="true">
          <draw:text-box>
            <text:p text:style-name="P14"><text:span text:style-name="T21">Zoom VTL - </text:span><text:span text:style-name="T16">calculated</text:span></text:p>
          </draw:text-box>
        </draw:frame>
        <draw:frame draw:style-name="gr6" draw:text-style-name="P11" draw:layer="layout" svg:width="10.79cm" svg:height="10.79cm" svg:x="16.986cm" svg:y="2.205cm">
          <draw:image xlink:href="Pictures/10000001000004E6000004E6517A0020.png" xlink:type="simple" xlink:show="embed" xlink:actuate="onLoad" draw:mime-type="image/png">
            <text:p/>
          </draw:image>
        </draw:frame>
        <draw:frame presentation:style-name="pr22" draw:layer="layout" svg:width="19.26cm" svg:height="11.311cm" svg:x="0.929cm" svg:y="2.632cm" presentation:class="outline" presentation:user-transformed="true">
          <draw:text-box>
            <text:p>Plusieurs pistes : </text:p>
            <text:p>- Conserver les calculées dans les PF de collecte ? Bof</text:p>
            <text:p>- Les calculer en amont et non plus en aval</text:p>
            <text:list text:style-name="L6">
              <text:list-item>
                <text:list>
                  <text:list-item>
                    <text:list>
                      <text:list-item>
                        <text:list>
                          <text:list-item>
                            <text:list>
                              <text:list-item>
                                <text:p>calculées au process et par Perret</text:p>
                              </text:list-item>
                              <text:list-item>
                                <text:p>stockées dans Genesis</text:p>
                              </text:list-item>
                              <text:list-item>
                                <text:p>Envoyées à KW au même format que les collected, external.</text:p>
                              </text:list-item>
                            </text:list>
                          </text:list-item>
                        </text:list>
                      </text:list-item>
                    </text:list>
                  </text:list-item>
                </text:list>
              </text:list-item>
            </text:list>
            <text:p/>
            <text:p>À valider :</text:p>
            <text:list text:continue-numbering="true" text:style-name="L6">
              <text:list-item>
                <text:list>
                  <text:list-item>
                    <text:list>
                      <text:list-item>
                        <text:list>
                          <text:list-item>
                            <text:p><text:span text:style-name="T22">Collection à part ?</text:span></text:p>
                          </text:list-item>
                          <text:list-item>
                            <text:p><text:span text:style-name="T22">Pas de stockage de l’historique (recalculable)</text:span></text:p>
                          </text:list-item>
                          <text:list-item>
                            <text:p><text:span text:style-name="T22">Pas de nécessité de calcul en mode batch </text:span></text:p>
                          </text:list-item>
                        </text:list>
                      </text:list-item>
                    </text:list>
                  </text:list-item>
                </text:list>
              </text:list-item>
            </text:list>
            <text:p text:style-name="P17"><text:span text:style-name="T20"/></text:p>
          </draw:text-box>
        </draw:frame>
        <draw:frame draw:style-name="gr10" draw:text-style-name="P7" draw:layer="layout" svg:width="3.035cm" svg:height="4.719cm" svg:x="13.724cm" svg:y="9.126cm">
          <draw:image xlink:href="Pictures/10000001000007620000076288515B49.png" xlink:type="simple" xlink:show="embed" xlink:actuate="onLoad" draw:mime-type="image/png">
            <text:p/>
          </draw:image>
        </draw:frame>
        <presentation:notes draw:style-name="dp2">
          <draw:page-thumbnail draw:style-name="gr1" draw:layer="layout" svg:width="19.6cm" svg:height="11.56cm" svg:x="0.7cm" svg:y="0.7cm" draw:page-number="11" presentation:class="page"/>
          <draw:frame presentation:style-name="pr23" draw:text-style-name="P4" draw:layer="layout" svg:width="19.6cm" svg:height="16.562cm" svg:x="0.7cm" svg:y="12.599cm" presentation:class="notes" presentation:placeholder="true" presentation:user-transformed="true">
            <draw:text-box/>
          </draw:frame>
        </presentation:notes>
      </draw:page>
      <draw:page draw:name="page12" draw:style-name="dp3" draw:master-page-name="_32__5f_Base_20_G1" presentation:presentation-page-layout-name="AL1T1" presentation:use-footer-name="ftr1" presentation:use-date-time-name="dtd1">
        <office:forms form:automatic-focus="false" form:apply-design-mode="false"/>
        <draw:frame presentation:style-name="pr24" draw:layer="layout" svg:width="19.201cm" svg:height="2.629cm" svg:x="1.299cm" svg:y="0.628cm" presentation:class="title" presentation:user-transformed="true">
          <draw:text-box>
            <text:p text:style-name="P14"><text:span text:style-name="T21">Zoom VTL - </text:span><text:span text:style-name="T16">Traitements à la demande</text:span> </text:p>
          </draw:text-box>
        </draw:frame>
        <draw:frame presentation:style-name="pr25" draw:layer="layout" svg:width="19.26cm" svg:height="10.5cm" svg:x="1.24cm" svg:y="3.72cm" presentation:class="outline" presentation:user-transformed="true">
          <draw:text-box>
            <text:p text:style-name="P14">Constats actuels :</text:p>
            <text:p text:style-name="P14"><text:span text:style-name="T23">- fonctionnel proposé historiquement par le POC initial</text:span></text:p>
            <text:p text:style-name="P14"><text:span text:style-name="T23">- au final : peu utilisé, ou alors pour faire de « l’anonymisation » (suppression de colonnes) ou du rattrapage de données mal calculées par VTL</text:span></text:p>
            <text:p text:style-name="P14"/>
            <text:p text:style-name="P14">Proposition : </text:p>
            <text:list text:style-name="L6">
              <text:list-item>
                <text:list>
                  <text:list-item>
                    <text:list>
                      <text:list-item>
                        <text:list>
                          <text:list-item>
                            <text:p>SQL standard <text:span text:style-name="T24">pour</text:span> supprimer des colonnes (anonymisation)</text:p>
                          </text:list-item>
                        </text:list>
                      </text:list-item>
                    </text:list>
                  </text:list-item>
                </text:list>
              </text:list-item>
            </text:list>
            <text:p/>
            <text:p>À valider :</text:p>
            <text:list text:continue-numbering="true" text:style-name="L6">
              <text:list-item>
                <text:list>
                  <text:list-item>
                    <text:list>
                      <text:list-item>
                        <text:list>
                          <text:list-item>
                            <text:p><text:span text:style-name="T25">Nécessité de passer un script personnalisé ? SQL ? R ?</text:span></text:p>
                          </text:list-item>
                        </text:list>
                      </text:list-item>
                    </text:list>
                  </text:list-item>
                </text:list>
              </text:list-item>
            </text:list>
            <text:p text:style-name="P17"><text:span text:style-name="T20"/></text:p>
          </draw:text-box>
        </draw:frame>
        <draw:frame draw:style-name="gr3" draw:text-style-name="P7" draw:layer="layout" svg:width="4.614cm" svg:height="4.614cm" svg:x="18.099cm" svg:y="4.869cm">
          <draw:image xlink:href="Pictures/100000010000076200000762EE3E0C5B.png" xlink:type="simple" xlink:show="embed" xlink:actuate="onLoad" draw:mime-type="image/png">
            <text:p/>
          </draw:image>
        </draw:frame>
        <presentation:notes draw:style-name="dp2">
          <draw:page-thumbnail draw:style-name="gr1" draw:layer="layout" svg:width="19.6cm" svg:height="11.56cm" svg:x="0.7cm" svg:y="0.7cm" draw:page-number="12" presentation:class="page"/>
          <draw:frame presentation:style-name="pr26" draw:text-style-name="P4" draw:layer="layout" svg:width="19.6cm" svg:height="16.562cm" svg:x="0.7cm" svg:y="12.599cm" presentation:class="notes" presentation:placeholder="true" presentation:user-transformed="true">
            <draw:text-box/>
          </draw:frame>
        </presentation:notes>
      </draw:page>
      <draw:page draw:name="page13" draw:style-name="dp3" draw:master-page-name="_33__5f_Base_20_G1" presentation:presentation-page-layout-name="AL1T1" presentation:use-footer-name="ftr1" presentation:use-date-time-name="dtd1">
        <office:forms form:automatic-focus="false" form:apply-design-mode="false"/>
        <draw:frame presentation:style-name="pr27" draw:layer="layout" svg:width="19.201cm" svg:height="2.629cm" svg:x="1.299cm" svg:y="0.628cm" presentation:class="title" presentation:user-transformed="true">
          <draw:text-box>
            <text:p text:style-name="P14"><text:span text:style-name="T21">Zoom VTL - </text:span><text:span text:style-name="T16">Traitements automatiques</text:span></text:p>
          </draw:text-box>
        </draw:frame>
        <draw:frame presentation:style-name="pr28" draw:layer="layout" svg:width="19.26cm" svg:height="10.5cm" svg:x="1.24cm" svg:y="3.72cm" presentation:class="outline" presentation:user-transformed="true">
          <draw:text-box>
            <text:p>Autres traitements VTL</text:p>
            <text:list text:style-name="L6">
              <text:list-item>
                <text:list>
                  <text:list-item>
                    <text:list>
                      <text:list-item>
                        <text:list>
                          <text:list-item>
                            <text:p>Éclatement en tables =&gt; SQL d’insertion</text:p>
                          </text:list-item>
                          <text:list-item>
                            <text:p>Liens 2 à 2 déjà calculés en Java (BPM)</text:p>
                            <text:p/>
                          </text:list-item>
                        </text:list>
                      </text:list-item>
                    </text:list>
                  </text:list-item>
                </text:list>
              </text:list-item>
            </text:list>
            <text:p/>
            <text:p>À valider :</text:p>
            <text:list text:continue-numbering="true" text:style-name="L6">
              <text:list-item>
                <text:list>
                  <text:list-item>
                    <text:list>
                      <text:list-item>
                        <text:list>
                          <text:list-item>
                            <text:p><text:span text:style-name="T22">?</text:span></text:p>
                          </text:list-item>
                        </text:list>
                      </text:list-item>
                    </text:list>
                  </text:list-item>
                </text:list>
              </text:list-item>
            </text:list>
            <text:p text:style-name="P17"><text:span text:style-name="T20"/></text:p>
          </draw:text-box>
        </draw:frame>
        <presentation:notes draw:style-name="dp2">
          <draw:page-thumbnail draw:style-name="gr1" draw:layer="layout" svg:width="19.6cm" svg:height="11.56cm" svg:x="0.7cm" svg:y="0.7cm" draw:page-number="13" presentation:class="page"/>
          <draw:frame presentation:style-name="pr29" draw:text-style-name="P4" draw:layer="layout" svg:width="19.6cm" svg:height="16.562cm" svg:x="0.7cm" svg:y="12.599cm" presentation:class="notes" presentation:placeholder="true" presentation:user-transformed="true">
            <draw:text-box/>
          </draw:frame>
        </presentation:notes>
      </draw:page>
      <draw:page draw:name="page14" draw:style-name="dp3" draw:master-page-name="_33__5f_Base_20_G1" presentation:presentation-page-layout-name="AL1T1" presentation:use-footer-name="ftr1" presentation:use-date-time-name="dtd1">
        <office:forms form:automatic-focus="false" form:apply-design-mode="false"/>
        <draw:frame presentation:style-name="pr27" draw:layer="layout" svg:width="19.201cm" svg:height="2.629cm" svg:x="1.299cm" svg:y="0.628cm" presentation:class="title" presentation:user-transformed="true">
          <draw:text-box>
            <text:p text:style-name="P18">Ce que la refonte change</text:p>
          </draw:text-box>
        </draw:frame>
        <draw:frame draw:style-name="gr6" draw:text-style-name="P11" draw:layer="layout" svg:width="26.853cm" svg:height="9.81cm" svg:x="0.623cm" svg:y="2.56cm">
          <draw:image xlink:href="Pictures/100000010000040500000178641460B6.png" xlink:type="simple" xlink:show="embed" xlink:actuate="onLoad" draw:mime-type="image/png">
            <text:p/>
          </draw:image>
        </draw:frame>
        <presentation:notes draw:style-name="dp4">
          <office:forms form:automatic-focus="false" form:apply-design-mode="false"/>
          <draw:page-thumbnail draw:style-name="gr1" draw:layer="layout" svg:width="19.6cm" svg:height="11.56cm" svg:x="0.7cm" svg:y="0.7cm" draw:page-number="14" presentation:class="page"/>
          <draw:frame presentation:style-name="pr29" draw:text-style-name="P4" draw:layer="layout" svg:width="19.6cm" svg:height="16.562cm" svg:x="0.7cm" svg:y="12.599cm" presentation:class="notes" presentation:placeholder="true" presentation:user-transformed="true">
            <draw:text-box/>
          </draw:frame>
        </presentation:notes>
      </draw:page>
      <draw:page draw:name="page15" draw:style-name="dp3" draw:master-page-name="Chapitre_20_J" presentation:presentation-page-layout-name="AL1T1" presentation:use-footer-name="ftr1" presentation:use-date-time-name="dtd1">
        <office:forms form:automatic-focus="false" form:apply-design-mode="false"/>
        <draw:frame presentation:style-name="pr30" draw:layer="layout" svg:width="10cm" svg:height="7cm" svg:x="3cm" svg:y="1.4cm" presentation:class="title" presentation:user-transformed="true">
          <draw:text-box>
            <text:p>03</text:p>
          </draw:text-box>
        </draw:frame>
        <draw:frame presentation:style-name="pr31" draw:layer="layout" svg:width="20cm" svg:height="6.7cm" svg:x="3cm" svg:y="8.7cm" presentation:class="outline" presentation:user-transformed="true">
          <draw:text-box>
            <text:list text:style-name="L5">
              <text:list-item>
                <text:p>Roadmap</text:p>
                <text:list>
                  <text:list-item>
                    <text:p>Pas de big bang</text:p>
                  </text:list-item>
                </text:list>
              </text:list-item>
            </text:list>
          </draw:text-box>
        </draw:frame>
        <presentation:notes draw:style-name="dp2">
          <draw:page-thumbnail draw:style-name="gr1" draw:layer="layout" svg:width="19.6cm" svg:height="11.67cm" svg:x="0.7cm" svg:y="0.699cm" draw:page-number="15" presentation:class="page"/>
          <draw:frame presentation:style-name="pr32" draw:text-style-name="P4" draw:layer="layout" svg:width="19.6cm" svg:height="16.562cm" svg:x="0.7cm" svg:y="12.599cm" presentation:class="notes" presentation:placeholder="true">
            <draw:text-box/>
          </draw:frame>
        </presentation:notes>
      </draw:page>
      <draw:page draw:name="page16" draw:style-name="dp3" draw:master-page-name="Base_20_G1" presentation:presentation-page-layout-name="AL1T1" presentation:use-footer-name="ftr1" presentation:use-date-time-name="dtd1">
        <office:forms form:automatic-focus="false" form:apply-design-mode="false"/>
        <draw:frame presentation:style-name="pr13" draw:layer="layout" svg:width="19.201cm" svg:height="2.629cm" svg:x="1.299cm" svg:y="0.628cm" presentation:class="title" presentation:user-transformed="true">
          <draw:text-box>
            <text:p text:style-name="P13">Versions prévues</text:p>
          </draw:text-box>
        </draw:frame>
        <draw:frame draw:style-name="gr11" draw:text-style-name="P20" draw:layer="layout" svg:width="16.567cm" svg:height="9.969cm" svg:x="2.335cm" svg:y="3.255cm">
          <draw:text-box>
            <text:p text:style-name="P17"><text:span text:style-name="T26">🏗 V0</text:span><text:span text:style-name="T27"> – Fondations techniques (non livrable en production)</text:span></text:p>
            <text:p text:style-name="P17"><text:span text:style-name="T28">⭐ V1</text:span><text:span text:style-name="T29"> – Export Json depuis Genesis par partition</text:span><text:span text:style-name="T29"><text:line-break/></text:span><text:span text:style-name="T29">(MVP enquêtes de conjoncture) </text:span></text:p>
            <text:p text:style-name="P17"><text:span text:style-name="T27">📤 V2 – Exports CSV et parquet, variables d’états, liens 2 à 2</text:span></text:p>
            <text:p text:style-name="P19"><text:span text:style-name="T26">🔒 V3 – API (si besoin), reporting data, </text:span><text:span text:style-name="T27">multimode</text:span></text:p>
            <text:p text:style-name="P19"><text:span text:style-name="T26">🚀 V4 – Chiffrement et anonymisation</text:span></text:p>
            <text:p text:style-name="P17"><text:span text:style-name="T27">🌱 V5 – Évolutions futures (codification, export à date, ...)</text:span></text:p>
            <text:p text:style-name="P17"><text:span text:style-name="T20"/></text:p>
          </draw:text-box>
        </draw:frame>
        <presentation:notes draw:style-name="dp2">
          <draw:page-thumbnail draw:style-name="gr1" draw:layer="layout" svg:width="19.6cm" svg:height="11.56cm" svg:x="0.7cm" svg:y="0.7cm" draw:page-number="16" presentation:class="page"/>
          <draw:frame presentation:style-name="pr15" draw:text-style-name="P4" draw:layer="layout" svg:width="19.6cm" svg:height="16.562cm" svg:x="0.7cm" svg:y="12.599cm" presentation:class="notes" presentation:placeholder="true" presentation:user-transformed="true">
            <draw:text-box/>
          </draw:frame>
        </presentation:notes>
      </draw:page>
      <draw:page draw:name="page17" draw:style-name="dp3" draw:master-page-name="_31__5f_Base_20_G1" presentation:presentation-page-layout-name="AL1T1" presentation:use-footer-name="ftr1" presentation:use-date-time-name="dtd1">
        <office:forms form:automatic-focus="false" form:apply-design-mode="false"/>
        <draw:frame presentation:style-name="pr20" draw:layer="layout" svg:width="19.201cm" svg:height="2.629cm" svg:x="1.299cm" svg:y="0.628cm" presentation:class="title" presentation:user-transformed="true">
          <draw:text-box>
            <text:p text:style-name="P13">Impact sur les autres briques</text:p>
          </draw:text-box>
        </draw:frame>
        <draw:frame draw:style-name="gr11" draw:text-style-name="P20" draw:layer="layout" svg:width="16.567cm" svg:height="12.214cm" svg:x="2.018cm" svg:y="2.747cm">
          <draw:text-box>
            <text:p text:style-name="P21"><text:span text:style-name="T30">BPM</text:span><text:span text:style-name="T27"> : Gérer les liens 2 à 2 </text:span><text:span text:style-name="T31">(déjà fait ?)</text:span></text:p>
            <text:p text:style-name="P21"><text:span text:style-name="T27"/></text:p>
            <text:p text:style-name="P21"><text:span text:style-name="T30">Genesis</text:span><text:span text:style-name="T27"> :</text:span></text:p>
            <text:p text:style-name="P21"><text:span text:style-name="T27">- Endpoint /partitions/{partitionId} </text:span><text:span text:style-name="T31">(nécessaire même sans refonte)</text:span><text:span text:style-name="T27"> </text:span></text:p>
            <text:p text:style-name="P21"><text:span text:style-name="T27">- Module VTL JS à intégrer dans le process pour les </text:span><text:span text:style-name="T32">calculated <text:s/></text:span><text:span text:style-name="T31">(nécessaire MVP)</text:span></text:p>
            <text:p text:style-name="P21"><text:span text:style-name="T32"/></text:p>
            <text:p text:style-name="P21"><text:span text:style-name="T30">Perret</text:span><text:span text:style-name="T27"> : <text:s/>Enregistrement des calculated dans Genesis</text:span></text:p>
            <text:p text:style-name="P21"><text:span text:style-name="T27"/></text:p>
            <text:p text:style-name="P17"><text:span text:style-name="T20"/></text:p>
          </draw:text-box>
        </draw:frame>
        <presentation:notes draw:style-name="dp4">
          <office:forms form:automatic-focus="false" form:apply-design-mode="false"/>
          <draw:page-thumbnail draw:style-name="gr1" draw:layer="layout" svg:width="19.6cm" svg:height="11.56cm" svg:x="0.7cm" svg:y="0.7cm" draw:page-number="17" presentation:class="page"/>
          <draw:frame presentation:style-name="pr23" draw:text-style-name="P4" draw:layer="layout" svg:width="19.6cm" svg:height="16.562cm" svg:x="0.7cm" svg:y="12.599cm" presentation:class="notes" presentation:placeholder="true" presentation:user-transformed="true">
            <draw:text-box/>
          </draw:frame>
        </presentation:notes>
      </draw:page>
      <draw:page draw:name="page18" draw:style-name="dp3" draw:master-page-name="_32__5f_Base_20_G1" presentation:presentation-page-layout-name="AL1T1" presentation:use-footer-name="ftr1" presentation:use-date-time-name="dtd1">
        <office:forms form:automatic-focus="false" form:apply-design-mode="false"/>
        <draw:frame presentation:style-name="pr24" draw:layer="layout" svg:width="19.201cm" svg:height="2.629cm" svg:x="1.299cm" svg:y="0.628cm" presentation:class="title" presentation:user-transformed="true">
          <draw:text-box>
            <text:p text:style-name="P13">Estimations - existant</text:p>
          </draw:text-box>
        </draw:frame>
        <draw:frame draw:style-name="gr12" draw:text-style-name="P20" draw:layer="layout" svg:width="16.567cm" svg:height="8.289cm" svg:x="2.018cm" svg:y="2.747cm">
          <draw:text-box>
            <text:p text:style-name="P21"><text:span text:style-name="T33">- </text:span><text:span text:style-name="T30">Genesis</text:span><text:span text:style-name="T27"> : Endpoint /partitions/{partitionId} - 13</text:span></text:p>
            <text:p text:style-name="P21"><text:span text:style-name="T34">- </text:span><text:span text:style-name="T30">Krafwerk actuel</text:span><text:span text:style-name="T35"> </text:span><text:span text:style-name="T36">: adapter au partitionId – 1 sprint</text:span></text:p>
            <text:p text:style-name="P22"><text:span text:style-name="T37"/></text:p>
            <text:p text:style-name="P22"><text:span text:style-name="T37"/></text:p>
            <text:p text:style-name="P22"><text:span text:style-name="T37"/></text:p>
            <text:p text:style-name="P21"><text:span text:style-name="T36"/></text:p>
            <text:p text:style-name="P17"><text:span text:style-name="T20"/></text:p>
          </draw:text-box>
        </draw:frame>
        <draw:g draw:name="status-error" draw:style-name="gr13">
          <draw:custom-shape draw:style-name="gr14" draw:text-style-name="P23" draw:layer="layout" svg:width="0.5cm" svg:height="0.5cm" svg:x="4.625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24" draw:layer="layout" svg:width="0.362cm" svg:height="0cm" draw:transform="skewX (0.00383972435438748) rotate (0.788190690200639) translate (4.74662872628727cm 8.21337398373984cm)" svg:viewBox="0 0 363 1" svg:d="M0 0c121 0 241 1 363 1">
            <text:p/>
          </draw:path>
          <draw:path draw:style-name="gr16" draw:text-style-name="P24" draw:layer="layout" svg:width="0.362cm" svg:height="-0.001cm" draw:transform="rotate (2.35619449019235) translate (5.00337398373984cm 8.21337398373984cm)" svg:viewBox="0 0 363 0" svg:d="M0 0c121 0 241 0 363 0">
            <text:p/>
          </draw:path>
        </draw:g>
        <draw:frame draw:style-name="gr12" draw:text-style-name="P20" draw:layer="layout" svg:width="16.567cm" svg:height="4.609cm" svg:x="5.125cm" svg:y="7.661cm">
          <draw:text-box>
            <text:p text:style-name="P21"><text:span text:style-name="T38">Augmentation du coût de maintenance / run</text:span></text:p>
            <text:p text:style-name="P21"><text:span text:style-name="T38">Pas de cohérence aval des calculs VTL (sum, first, filter, ...)</text:span></text:p>
            <text:p text:style-name="P21"><text:span text:style-name="T38">Pas d’investissement supplémentaire</text:span></text:p>
            <text:p text:style-name="P21"><text:span text:style-name="T38">Coût d’adaptation pour la codification élevé</text:span></text:p>
          </draw:text-box>
        </draw:frame>
        <draw:g draw:name="status-error 1" draw:style-name="gr13">
          <draw:custom-shape draw:style-name="gr17" draw:text-style-name="P23" draw:layer="layout" svg:width="0.5cm" svg:height="0.5cm" svg:x="4.6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24" draw:layer="layout" svg:width="0.362cm" svg:height="0cm" draw:transform="skewX (0.00383972435438747) rotate (0.788190690200639) translate (4.74662872628727cm 9.41337398373984cm)" svg:viewBox="0 0 363 1" svg:d="M0 0c121 0 241 1 363 1">
            <text:p/>
          </draw:path>
          <draw:path draw:style-name="gr19" draw:text-style-name="P24" draw:layer="layout" svg:width="0.362cm" svg:height="-0.001cm" draw:transform="rotate (2.35619449019235) translate (5.00337398373984cm 9.41337398373984cm)" svg:viewBox="0 0 363 0" svg:d="M0 0c121 0 241 0 363 0">
            <text:p/>
          </draw:path>
        </draw:g>
        <draw:g draw:name="status-ok" draw:style-name="gr13">
          <draw:custom-shape draw:style-name="gr20" draw:text-style-name="P25" draw:layer="layout" svg:width="0.5cm" svg:height="0.5cm" svg:x="4.582cm" svg:y="1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1" draw:text-style-name="P24" draw:layer="layout" svg:width="0.239cm" svg:height="0.182cm" svg:x="4.712cm" svg:y="10.475cm" svg:viewBox="0 0 240 183" draw:points="0,102 82,183 240,0">
            <text:p/>
          </draw:polyline>
        </draw:g>
        <draw:g draw:name="status-warning" draw:style-name="gr22">
          <draw:path draw:style-name="gr23" draw:text-style-name="P26" draw:layer="layout" svg:width="0.499cm" svg:height="0.499cm" svg:x="4.639cm" svg:y="11.521cm" svg:viewBox="0 0 500 500" svg:d="M0 500c167 0 333 0 500 0-83-167-167-333-249-500-84 167-168 333-251 500z">
            <text:p/>
          </draw:path>
          <draw:path draw:style-name="gr24" draw:text-style-name="P27" draw:layer="layout" svg:width="0.065cm" svg:height="0.332cm" draw:transform="rotate (-3.14159265358979) translate (4.92240672737225cm 11.9796899371382cm)" svg:viewBox="0 0 66 333" svg:d="M66 0c0 23 0 44 0 67-22 0-45 0-66 0 0-23 0-44 0-67 21 0 44 0 66 0zM66 100c0 77 0 155 0 233-22 0-45 0-66 0 0-78 0-156 0-233 21 0 44 0 66 0z">
            <text:p/>
          </draw:path>
        </draw:g>
        <presentation:notes draw:style-name="dp4">
          <office:forms form:automatic-focus="false" form:apply-design-mode="false"/>
          <draw:page-thumbnail draw:style-name="gr1" draw:layer="layout" svg:width="19.6cm" svg:height="11.56cm" svg:x="0.7cm" svg:y="0.7cm" draw:page-number="18" presentation:class="page"/>
          <draw:frame presentation:style-name="pr26" draw:text-style-name="P4" draw:layer="layout" svg:width="19.6cm" svg:height="16.562cm" svg:x="0.7cm" svg:y="12.599cm" presentation:class="notes" presentation:placeholder="true" presentation:user-transformed="true">
            <draw:text-box/>
          </draw:frame>
        </presentation:notes>
      </draw:page>
      <draw:page draw:name="page19" draw:style-name="dp3" draw:master-page-name="_32__5f_Base_20_G1" presentation:presentation-page-layout-name="AL1T1" presentation:use-footer-name="ftr1" presentation:use-date-time-name="dtd1">
        <office:forms form:automatic-focus="false" form:apply-design-mode="false"/>
        <draw:frame presentation:style-name="pr24" draw:layer="layout" svg:width="19.201cm" svg:height="2.629cm" svg:x="1.299cm" svg:y="0.628cm" presentation:class="title" presentation:user-transformed="true">
          <draw:text-box>
            <text:p text:style-name="P13">Estimations - refonte</text:p>
          </draw:text-box>
        </draw:frame>
        <draw:frame draw:style-name="gr11" draw:text-style-name="P20" draw:layer="layout" svg:width="16.567cm" svg:height="9.969cm" svg:x="2.018cm" svg:y="2.747cm">
          <draw:text-box>
            <text:p text:style-name="P21"><text:span text:style-name="T33">- </text:span><text:span text:style-name="T30">Genesis</text:span><text:span text:style-name="T27"> : Endpoint /partitions/{partitionId} - 13</text:span></text:p>
            <text:p text:style-name="P21"><text:span text:style-name="T26">- </text:span><text:span text:style-name="T30">Genesis </text:span><text:span text:style-name="T27">Module VTL JS à intégrer dans le process pour les </text:span><text:span text:style-name="T32">calculated – 13 + 5 de création du module</text:span></text:p>
            <text:p text:style-name="P21"><text:span text:style-name="T39">- </text:span><text:span text:style-name="T30">Kraftwerk🏗 V0 </text:span><text:span text:style-name="T40">+</text:span><text:span text:style-name="T30">⭐ V1 </text:span><text:span text:style-name="T36">– Export Json depuis Genesis par partition – 4 sprints (1série)</text:span></text:p>
            <text:p text:style-name="P22"><text:span text:style-name="T30">- Kraftwerk🚀 V2+3+4 </text:span><text:span text:style-name="T27">– Iso-fonctionnel – 4 sprints (1série)</text:span></text:p>
            <text:p text:style-name="P22"><text:span text:style-name="T37"/></text:p>
            <text:p text:style-name="P21"><text:span text:style-name="T36"/></text:p>
            <text:p text:style-name="P17"><text:span text:style-name="T20"/></text:p>
          </draw:text-box>
        </draw:frame>
        <draw:g draw:name="status-error 2" draw:style-name="gr13">
          <draw:custom-shape draw:style-name="gr25" draw:text-style-name="P23" draw:layer="layout" svg:width="0.5cm" svg:height="0.5cm" svg:x="5.007cm" svg:y="10.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 draw:text-style-name="P24" draw:layer="layout" svg:width="0.362cm" svg:height="0cm" draw:transform="skewX (0.00383972435438754) rotate (0.788190690200639) translate (5.12862872628727cm 10.5733739837398cm)" svg:viewBox="0 0 363 1" svg:d="M0 0c121 0 241 1 363 1">
            <text:p/>
          </draw:path>
          <draw:path draw:style-name="gr27" draw:text-style-name="P24" draw:layer="layout" svg:width="0.362cm" svg:height="-0.001cm" draw:transform="rotate (2.35619449019235) translate (5.38537398373984cm 10.5733739837398cm)" svg:viewBox="0 0 363 0" svg:d="M0 0c121 0 241 0 363 0">
            <text:p/>
          </draw:path>
        </draw:g>
        <draw:frame draw:style-name="gr12" draw:text-style-name="P20" draw:layer="layout" svg:width="16.567cm" svg:height="3.327cm" svg:x="5.507cm" svg:y="10.021cm">
          <draw:text-box>
            <text:p text:style-name="P21"><text:span text:style-name="T38">Investissement de 2 séries</text:span></text:p>
            <text:p text:style-name="P21"><text:span text:style-name="T38">Cohérence aval des calculs VTL (sum, first, filter, ...)</text:span></text:p>
            <text:p text:style-name="P21"><text:span text:style-name="T38">Coût d’adaptation pour la codification très réduit</text:span></text:p>
          </draw:text-box>
        </draw:frame>
        <draw:g draw:name="status-ok 1" draw:style-name="gr13">
          <draw:custom-shape draw:style-name="gr28" draw:text-style-name="P25" draw:layer="layout" svg:width="0.5cm" svg:height="0.5cm" svg:x="4.981cm" svg:y="1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9" draw:text-style-name="P24" draw:layer="layout" svg:width="0.239cm" svg:height="0.182cm" svg:x="5.111cm" svg:y="11.569cm" svg:viewBox="0 0 240 183" draw:points="0,102 82,183 240,0">
            <text:p/>
          </draw:polyline>
        </draw:g>
        <draw:g draw:name="status-ok 2" draw:style-name="gr13">
          <draw:custom-shape draw:style-name="gr30" draw:text-style-name="P25" draw:layer="layout" svg:width="0.5cm" svg:height="0.5cm" svg:x="4.964cm" svg:y="12.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31" draw:text-style-name="P24" draw:layer="layout" svg:width="0.239cm" svg:height="0.182cm" svg:x="5.094cm" svg:y="12.853cm" svg:viewBox="0 0 240 183" draw:points="0,102 82,183 240,0">
            <text:p/>
          </draw:polyline>
        </draw:g>
        <presentation:notes draw:style-name="dp4">
          <office:forms form:automatic-focus="false" form:apply-design-mode="false"/>
          <draw:page-thumbnail draw:style-name="gr1" draw:layer="layout" svg:width="19.6cm" svg:height="11.56cm" svg:x="0.7cm" svg:y="0.7cm" draw:page-number="19" presentation:class="page"/>
          <draw:frame presentation:style-name="pr26" draw:text-style-name="P4" draw:layer="layout" svg:width="19.6cm" svg:height="16.562cm" svg:x="0.7cm" svg:y="12.599cm" presentation:class="notes" presentation:placeholder="true" presentation:user-transformed="true">
            <draw:text-box/>
          </draw:frame>
        </presentation:notes>
      </draw:page>
      <draw:page draw:name="page20" draw:style-name="dp5" draw:master-page-name="Merci_5f_2" presentation:presentation-page-layout-name="AL1T1" presentation:use-footer-name="ftr1" presentation:use-date-time-name="dtd1">
        <office:forms form:automatic-focus="false" form:apply-design-mode="false"/>
        <draw:frame presentation:style-name="pr33" draw:layer="layout" svg:width="7cm" svg:height="5.7cm" svg:x="2cm" svg:y="7.9cm" presentation:class="outline" presentation:user-transformed="true">
          <draw:text-box>
            <text:p>Claude Mistral</text:p>
            <text:p><text:span text:style-name="T41">Développeur expérimenté</text:span></text:p>
            <text:p><text:span text:style-name="T41">Service IA</text:span></text:p>
            <text:p><text:span text:style-name="T41"/></text:p>
            <text:p><text:span text:style-name="T41"><text:s/></text:span></text:p>
            <text:p><text:span text:style-name="T41"/></text:p>
          </draw:text-box>
        </draw:frame>
        <draw:g draw:name="Group 13" draw:style-name="gr13">
          <draw:custom-shape draw:name="Freeform: Shape 5" draw:style-name="gr32" draw:text-style-name="P28" draw:layer="layout" svg:width="1.953cm" svg:height="1.906cm" svg:x="10.474cm" svg:y="6.614cm">
            <text:p/>
            <draw:enhanced-geometry draw:mirror-horizontal="false" draw:mirror-vertical="false" svg:viewBox="0 0 0 0" draw:glue-points="?f0 ?f1 ?f2 ?f3 ?f4 ?f5 ?f6 ?f7 ?f8 ?f9 ?f10 ?f11 ?f12 ?f13 ?f14 ?f15 ?f16 ?f17 ?f18 ?f19 ?f20 ?f21 ?f22 ?f23 ?f24 ?f25 ?f26 ?f27" drawooo:sub-view-size="703313 686572" draw:text-areas="0 0 ?f28 ?f29" draw:type="ooxml-non-primitive" draw:enhanced-path="M 0 0 L 217762 0 351172 235407 485552 0 703314 0 703314 686573 528730 686573 528730 251114 411026 451230 292353 451230 174649 251114 174649 686573 0 686573 0 0 Z N">
              <draw:equation draw:name="f0" draw:formula="0*logwidth/703313"/>
              <draw:equation draw:name="f1" draw:formula="0*logheight/686572"/>
              <draw:equation draw:name="f2" draw:formula="217762*logwidth/703313"/>
              <draw:equation draw:name="f3" draw:formula="0*logheight/686572"/>
              <draw:equation draw:name="f4" draw:formula="351172*logwidth/703313"/>
              <draw:equation draw:name="f5" draw:formula="235407*logheight/686572"/>
              <draw:equation draw:name="f6" draw:formula="485552*logwidth/703313"/>
              <draw:equation draw:name="f7" draw:formula="0*logheight/686572"/>
              <draw:equation draw:name="f8" draw:formula="703314*logwidth/703313"/>
              <draw:equation draw:name="f9" draw:formula="0*logheight/686572"/>
              <draw:equation draw:name="f10" draw:formula="703314*logwidth/703313"/>
              <draw:equation draw:name="f11" draw:formula="686573*logheight/686572"/>
              <draw:equation draw:name="f12" draw:formula="528730*logwidth/703313"/>
              <draw:equation draw:name="f13" draw:formula="686573*logheight/686572"/>
              <draw:equation draw:name="f14" draw:formula="528730*logwidth/703313"/>
              <draw:equation draw:name="f15" draw:formula="251114*logheight/686572"/>
              <draw:equation draw:name="f16" draw:formula="411026*logwidth/703313"/>
              <draw:equation draw:name="f17" draw:formula="451230*logheight/686572"/>
              <draw:equation draw:name="f18" draw:formula="292353*logwidth/703313"/>
              <draw:equation draw:name="f19" draw:formula="451230*logheight/686572"/>
              <draw:equation draw:name="f20" draw:formula="174649*logwidth/703313"/>
              <draw:equation draw:name="f21" draw:formula="251114*logheight/686572"/>
              <draw:equation draw:name="f22" draw:formula="174649*logwidth/703313"/>
              <draw:equation draw:name="f23" draw:formula="686573*logheight/686572"/>
              <draw:equation draw:name="f24" draw:formula="0*logwidth/703313"/>
              <draw:equation draw:name="f25" draw:formula="686573*logheight/686572"/>
              <draw:equation draw:name="f26" draw:formula="0*logwidth/703313"/>
              <draw:equation draw:name="f27" draw:formula="0*logheight/686572"/>
              <draw:equation draw:name="f28" draw:formula="logwidth"/>
              <draw:equation draw:name="f29" draw:formula="logheight"/>
            </draw:enhanced-geometry>
          </draw:custom-shape>
          <draw:custom-shape draw:name="Freeform: Shape 6" draw:style-name="gr33" draw:text-style-name="P28" draw:layer="layout" svg:width="1.38cm" svg:height="1.481cm" svg:x="12.757cm" svg:y="7.093cm">
            <text:p/>
            <draw:enhanced-geometry draw:mirror-horizontal="false" draw:mirror-vertical="false" svg:viewBox="0 0 0 0" draw:glue-points="?f0 ?f1 ?f2 ?f3 ?f4 ?f5 ?f6 ?f7 ?f8 ?f9 ?f10 ?f11 ?f12 ?f13 ?f14 ?f15 ?f16 ?f17 ?f18 ?f19 ?f20 ?f21 ?f22 ?f23 ?f24 ?f25 ?f26 ?f27" drawooo:sub-view-size="497186 533577" draw:text-areas="0 0 ?f28 ?f29" draw:type="ooxml-non-primitive" draw:enhanced-path="M 277551 533513 C 96115 533513 0 410897 0 266756 0 122616 89263 0 256932 0 397193 0 489366 93142 489366 227522 489366 260874 484453 292223 479541 309934 L 159782 309934 C 172516 366814 214724 394285 280395 394285 326481 394285 364746 375669 387304 347229 L 497187 434489 C 450131 496282 372631 533577 277486 533577 Z M 165729 195139 L 336370 195139 C 334431 162756 310839 128433 256932 128433 210845 128433 180401 147049 165729 195139 Z N">
              <draw:equation draw:name="f0" draw:formula="277551*logwidth/497186"/>
              <draw:equation draw:name="f1" draw:formula="533513*logheight/533577"/>
              <draw:equation draw:name="f2" draw:formula="0*logwidth/497186"/>
              <draw:equation draw:name="f3" draw:formula="266756*logheight/533577"/>
              <draw:equation draw:name="f4" draw:formula="256932*logwidth/497186"/>
              <draw:equation draw:name="f5" draw:formula="0*logheight/533577"/>
              <draw:equation draw:name="f6" draw:formula="489366*logwidth/497186"/>
              <draw:equation draw:name="f7" draw:formula="227522*logheight/533577"/>
              <draw:equation draw:name="f8" draw:formula="479541*logwidth/497186"/>
              <draw:equation draw:name="f9" draw:formula="309934*logheight/533577"/>
              <draw:equation draw:name="f10" draw:formula="159782*logwidth/497186"/>
              <draw:equation draw:name="f11" draw:formula="309934*logheight/533577"/>
              <draw:equation draw:name="f12" draw:formula="280395*logwidth/497186"/>
              <draw:equation draw:name="f13" draw:formula="394285*logheight/533577"/>
              <draw:equation draw:name="f14" draw:formula="387304*logwidth/497186"/>
              <draw:equation draw:name="f15" draw:formula="347229*logheight/533577"/>
              <draw:equation draw:name="f16" draw:formula="497187*logwidth/497186"/>
              <draw:equation draw:name="f17" draw:formula="434489*logheight/533577"/>
              <draw:equation draw:name="f18" draw:formula="277486*logwidth/497186"/>
              <draw:equation draw:name="f19" draw:formula="533577*logheight/533577"/>
              <draw:equation draw:name="f20" draw:formula="165729*logwidth/497186"/>
              <draw:equation draw:name="f21" draw:formula="195139*logheight/533577"/>
              <draw:equation draw:name="f22" draw:formula="336370*logwidth/497186"/>
              <draw:equation draw:name="f23" draw:formula="195139*logheight/533577"/>
              <draw:equation draw:name="f24" draw:formula="256932*logwidth/497186"/>
              <draw:equation draw:name="f25" draw:formula="128433*logheight/533577"/>
              <draw:equation draw:name="f26" draw:formula="165729*logwidth/497186"/>
              <draw:equation draw:name="f27" draw:formula="195139*logheight/533577"/>
              <draw:equation draw:name="f28" draw:formula="logwidth"/>
              <draw:equation draw:name="f29" draw:formula="logheight"/>
            </draw:enhanced-geometry>
          </draw:custom-shape>
          <draw:custom-shape draw:name="Freeform: Shape 11" draw:style-name="gr34" draw:text-style-name="P28" draw:layer="layout" svg:width="0.89cm" svg:height="1.399cm" svg:x="14.41cm" svg:y="7.12cm">
            <text:p/>
            <draw:enhanced-geometry draw:mirror-horizontal="false" draw:mirror-vertical="false" svg:viewBox="0 0 0 0" draw:glue-points="?f0 ?f1 ?f2 ?f3 ?f4 ?f5 ?f6 ?f7 ?f8 ?f9 ?f10 ?f11 ?f12 ?f13 ?f14 ?f15 ?f16 ?f17 ?f18 ?f19 ?f20 ?f21" drawooo:sub-view-size="320728 504102" draw:text-areas="0 0 ?f22 ?f23" draw:type="ooxml-non-primitive" draw:enhanced-path="M 0 9825 L 155969 9825 155969 50029 C 186348 21589 224613 0 275612 0 293257 0 308964 2973 320728 6852 L 320728 170641 C 304052 166698 285436 163790 259905 163790 203024 163790 165729 197142 155969 213819 L 155969 504103 0 504103 0 9825 Z N">
              <draw:equation draw:name="f0" draw:formula="0*logwidth/320728"/>
              <draw:equation draw:name="f1" draw:formula="9825*logheight/504102"/>
              <draw:equation draw:name="f2" draw:formula="155969*logwidth/320728"/>
              <draw:equation draw:name="f3" draw:formula="9825*logheight/504102"/>
              <draw:equation draw:name="f4" draw:formula="155969*logwidth/320728"/>
              <draw:equation draw:name="f5" draw:formula="50029*logheight/504102"/>
              <draw:equation draw:name="f6" draw:formula="275612*logwidth/320728"/>
              <draw:equation draw:name="f7" draw:formula="0*logheight/504102"/>
              <draw:equation draw:name="f8" draw:formula="320728*logwidth/320728"/>
              <draw:equation draw:name="f9" draw:formula="6852*logheight/504102"/>
              <draw:equation draw:name="f10" draw:formula="320728*logwidth/320728"/>
              <draw:equation draw:name="f11" draw:formula="170641*logheight/504102"/>
              <draw:equation draw:name="f12" draw:formula="259905*logwidth/320728"/>
              <draw:equation draw:name="f13" draw:formula="163790*logheight/504102"/>
              <draw:equation draw:name="f14" draw:formula="155969*logwidth/320728"/>
              <draw:equation draw:name="f15" draw:formula="213819*logheight/504102"/>
              <draw:equation draw:name="f16" draw:formula="155969*logwidth/320728"/>
              <draw:equation draw:name="f17" draw:formula="504103*logheight/504102"/>
              <draw:equation draw:name="f18" draw:formula="0*logwidth/320728"/>
              <draw:equation draw:name="f19" draw:formula="504103*logheight/504102"/>
              <draw:equation draw:name="f20" draw:formula="0*logwidth/320728"/>
              <draw:equation draw:name="f21" draw:formula="9825*logheight/504102"/>
              <draw:equation draw:name="f22" draw:formula="logwidth"/>
              <draw:equation draw:name="f23" draw:formula="logheight"/>
            </draw:enhanced-geometry>
          </draw:custom-shape>
          <draw:custom-shape draw:name="Freeform: Shape 32" draw:style-name="gr35" draw:text-style-name="P28" draw:layer="layout" svg:width="1.348cm" svg:height="1.481cm" svg:x="15.437cm" svg:y="7.093cm">
            <text:p/>
            <draw:enhanced-geometry draw:mirror-horizontal="false" draw:mirror-vertical="false" svg:viewBox="0 0 0 0" draw:glue-points="?f0 ?f1 ?f2 ?f3 ?f4 ?f5 ?f6 ?f7 ?f8 ?f9 ?f10 ?f11 ?f12 ?f13 ?f14 ?f15 ?f16 ?f17 ?f18 ?f19 ?f20 ?f21" drawooo:sub-view-size="485487 533512" draw:text-areas="0 0 ?f22 ?f23" draw:type="ooxml-non-primitive" draw:enhanced-path="M 361902 340248 L 485487 434424 C 439401 495248 365845 533513 274642 533513 100058 533513 0 410897 0 266756 0 122616 100058 0 274642 0 365845 0 439401 38265 485487 99088 L 361902 193264 C 344256 166763 314846 146209 272638 146209 208906 146209 161786 194298 161786 266821 161786 339344 208842 387433 275547 387433 313812 387433 344191 366814 361837 340378 Z N">
              <draw:equation draw:name="f0" draw:formula="361902*logwidth/485487"/>
              <draw:equation draw:name="f1" draw:formula="340248*logheight/533512"/>
              <draw:equation draw:name="f2" draw:formula="485487*logwidth/485487"/>
              <draw:equation draw:name="f3" draw:formula="434424*logheight/533512"/>
              <draw:equation draw:name="f4" draw:formula="274642*logwidth/485487"/>
              <draw:equation draw:name="f5" draw:formula="533513*logheight/533512"/>
              <draw:equation draw:name="f6" draw:formula="0*logwidth/485487"/>
              <draw:equation draw:name="f7" draw:formula="266756*logheight/533512"/>
              <draw:equation draw:name="f8" draw:formula="274642*logwidth/485487"/>
              <draw:equation draw:name="f9" draw:formula="0*logheight/533512"/>
              <draw:equation draw:name="f10" draw:formula="485487*logwidth/485487"/>
              <draw:equation draw:name="f11" draw:formula="99088*logheight/533512"/>
              <draw:equation draw:name="f12" draw:formula="361902*logwidth/485487"/>
              <draw:equation draw:name="f13" draw:formula="193264*logheight/533512"/>
              <draw:equation draw:name="f14" draw:formula="272638*logwidth/485487"/>
              <draw:equation draw:name="f15" draw:formula="146209*logheight/533512"/>
              <draw:equation draw:name="f16" draw:formula="161786*logwidth/485487"/>
              <draw:equation draw:name="f17" draw:formula="266821*logheight/533512"/>
              <draw:equation draw:name="f18" draw:formula="275547*logwidth/485487"/>
              <draw:equation draw:name="f19" draw:formula="387433*logheight/533512"/>
              <draw:equation draw:name="f20" draw:formula="361837*logwidth/485487"/>
              <draw:equation draw:name="f21" draw:formula="340378*logheight/533512"/>
              <draw:equation draw:name="f22" draw:formula="logwidth"/>
              <draw:equation draw:name="f23" draw:formula="logheight"/>
            </draw:enhanced-geometry>
          </draw:custom-shape>
          <draw:custom-shape draw:name="Freeform: Shape 33" draw:style-name="gr36" draw:text-style-name="P28" draw:layer="layout" svg:width="0.544cm" svg:height="2.07cm" svg:x="16.944cm" svg:y="6.45cm">
            <text:p/>
            <draw:enhanced-geometry draw:mirror-horizontal="false" draw:mirror-vertical="false" svg:viewBox="0 0 0 0" draw:glue-points="?f0 ?f1 ?f2 ?f3 ?f4 ?f5 ?f6 ?f7 ?f8 ?f9 ?f10 ?f11 ?f12 ?f13 ?f14 ?f15 ?f16 ?f17 ?f18 ?f19" drawooo:sub-view-size="196172 745392" draw:text-areas="0 0 ?f20 ?f21" draw:type="ooxml-non-primitive" draw:enhanced-path="M 0 98054 C 0 45117 45116 0 99088 0 153060 0 196173 45117 196173 98054 196173 150992 151056 197078 99088 197078 47120 197078 0 150992 0 98054 Z M 19650 251050 L 175618 251050 175618 745392 19650 745392 19650 251050 Z N">
              <draw:equation draw:name="f0" draw:formula="0*logwidth/196172"/>
              <draw:equation draw:name="f1" draw:formula="98054*logheight/745392"/>
              <draw:equation draw:name="f2" draw:formula="99088*logwidth/196172"/>
              <draw:equation draw:name="f3" draw:formula="0*logheight/745392"/>
              <draw:equation draw:name="f4" draw:formula="196173*logwidth/196172"/>
              <draw:equation draw:name="f5" draw:formula="98054*logheight/745392"/>
              <draw:equation draw:name="f6" draw:formula="99088*logwidth/196172"/>
              <draw:equation draw:name="f7" draw:formula="197078*logheight/745392"/>
              <draw:equation draw:name="f8" draw:formula="0*logwidth/196172"/>
              <draw:equation draw:name="f9" draw:formula="98054*logheight/745392"/>
              <draw:equation draw:name="f10" draw:formula="19650*logwidth/196172"/>
              <draw:equation draw:name="f11" draw:formula="251050*logheight/745392"/>
              <draw:equation draw:name="f12" draw:formula="175618*logwidth/196172"/>
              <draw:equation draw:name="f13" draw:formula="251050*logheight/745392"/>
              <draw:equation draw:name="f14" draw:formula="175618*logwidth/196172"/>
              <draw:equation draw:name="f15" draw:formula="745392*logheight/745392"/>
              <draw:equation draw:name="f16" draw:formula="19650*logwidth/196172"/>
              <draw:equation draw:name="f17" draw:formula="745392*logheight/745392"/>
              <draw:equation draw:name="f18" draw:formula="19650*logwidth/196172"/>
              <draw:equation draw:name="f19" draw:formula="251050*logheight/745392"/>
              <draw:equation draw:name="f20" draw:formula="logwidth"/>
              <draw:equation draw:name="f21" draw:formula="logheight"/>
            </draw:enhanced-geometry>
          </draw:custom-shape>
        </draw:g>
        <presentation:notes draw:style-name="dp4">
          <office:forms form:automatic-focus="false" form:apply-design-mode="false"/>
          <draw:page-thumbnail draw:style-name="gr1" draw:layer="layout" svg:width="19.6cm" svg:height="11.67cm" svg:x="0.7cm" svg:y="0.7cm" draw:page-number="20" presentation:class="page"/>
          <draw:frame presentation:style-name="pr34" draw:text-style-name="P4" draw:layer="layout" svg:width="19.6cm" svg:height="16.56cm" svg:x="0.7cm" svg:y="12.6cm" presentation:class="notes" presentation:placeholder="true">
            <draw:text-box/>
          </draw:frame>
        </presentation:notes>
      </draw:page>
      <draw:page draw:name="page21" draw:style-name="dp3" draw:master-page-name="_32__5f_Base_20_G1" presentation:presentation-page-layout-name="AL1T1" presentation:use-footer-name="ftr1" presentation:use-date-time-name="dtd1">
        <office:forms form:automatic-focus="false" form:apply-design-mode="false"/>
        <draw:frame presentation:style-name="pr24" draw:layer="layout" svg:width="19.201cm" svg:height="2.629cm" svg:x="1.299cm" svg:y="0.628cm" presentation:class="title" presentation:user-transformed="true">
          <draw:text-box>
            <text:p text:style-name="P13">Estimations – refonte fine</text:p>
          </draw:text-box>
        </draw:frame>
        <draw:frame draw:style-name="gr11" draw:text-style-name="P20" draw:layer="layout" svg:width="16.567cm" svg:height="13.85cm" svg:x="2.018cm" svg:y="2.747cm">
          <draw:text-box>
            <text:p text:style-name="P21"><text:span text:style-name="T33">- </text:span><text:span text:style-name="T30">Genesis</text:span><text:span text:style-name="T27"> : Endpoint /partitions/{partitionId} - 13</text:span></text:p>
            <text:p text:style-name="P21"><text:span text:style-name="T26">- </text:span><text:span text:style-name="T30">Genesis </text:span><text:span text:style-name="T27">Module VTL JS à intégrer dans le process pour les </text:span><text:span text:style-name="T32">calculated </text:span><text:span text:style-name="T42">et stockage</text:span><text:span text:style-name="T32">– 13 </text:span></text:p>
            <text:p text:style-name="P21"><text:span text:style-name="T32">- Module VTL : 5 </text:span></text:p>
            <text:p text:style-name="P21"><text:span text:style-name="T39">- </text:span><text:span text:style-name="T30">Kraftwerkv2🏗 V0 </text:span><text:span text:style-name="T36">– Fondations techniques - 13</text:span></text:p>
            <text:p text:style-name="P22"><text:span text:style-name="T39">- </text:span><text:span text:style-name="T30">Kraftwerkv2⭐ V1 </text:span><text:span text:style-name="T36">– Export Json depuis Genesis par partition – 3 sprints</text:span></text:p>
            <text:p text:style-name="P22"><text:span text:style-name="T39">- </text:span><text:span text:style-name="T43">Kraftwerkv2⭐ V2+3+4 </text:span><text:span text:style-name="T36">– <text:s/>4 sprints</text:span></text:p>
            <text:p text:style-name="P22"><text:span text:style-name="T37">- Perret pour les calculated : 8 (3front +5back)</text:span></text:p>
            <text:p text:style-name="P22"><text:span text:style-name="T37"/></text:p>
            <text:p text:style-name="P21"><text:span text:style-name="T36"/></text:p>
            <text:p text:style-name="P17"><text:span text:style-name="T20"/></text:p>
          </draw:text-box>
        </draw:frame>
        <presentation:notes draw:style-name="dp4">
          <office:forms form:automatic-focus="false" form:apply-design-mode="false"/>
          <draw:page-thumbnail draw:style-name="gr1" draw:layer="layout" svg:width="19.6cm" svg:height="11.56cm" svg:x="0.7cm" svg:y="0.7cm" draw:page-number="21" presentation:class="page"/>
          <draw:frame presentation:style-name="pr26" draw:text-style-name="P4" draw:layer="layout" svg:width="19.6cm" svg:height="16.562cm" svg:x="0.7cm" svg:y="12.5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scadia Code Light" svg:font-family="'Cascadia Code Light'"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Extrabold1"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adornments="Normal" style:font-family-generic="swiss" style:font-pitch="variable"/>
    <style:font-face style:name="Open Sans Semibold1" svg:font-family="'Open Sans Semibold'" style:font-family-generic="swiss" style:font-pitch="variable"/>
    <style:font-face style:name="Open Sans Semibold2" svg:font-family="'Open Sans Semibold'" style:font-adornments="Regular" style:font-family-generic="swiss" style:font-pitch="variable"/>
    <style:font-face style:name="Open Sans1" svg:font-family="'Open Sans'"/>
    <style:font-face style:name="Open Sans2" svg:font-family="'Open Sans'" style:font-adornments="Bold" style:font-family-generic="swiss" style:font-pitch="variable"/>
    <style:font-face style:name="Open Sans3" svg:font-family="'Open Sans'" style:font-family-generic="swiss"/>
    <style:font-face style:name="Open Sans4" svg:font-family="'Open Sans'" style:font-family-generic="swiss"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rectangular" draw:cx="50%" draw:cy="50%" draw:start-color="#ffb9bb" draw:end-color="#d6f8f8" draw:start-intensity="100%" draw:end-intensity="100%" draw:angle="45deg" draw:border="0%">
      <loext:gradient-stop svg:offset="0" loext:color-type="rgb" loext:color-value="#ffb9bb"/>
      <loext:gradient-stop svg:offset="1" loext:color-type="rgb" loext:color-value="#d6f8f8"/>
    </draw:gradient>
    <draw:gradient draw:name="Pastel_20_Bouquet" draw:display-name="Pastel Bouquet" draw:style="linear" draw:start-color="#fdf0c9" draw:end-color="#b5e1ff" draw:start-intensity="100%" draw:end-intensity="100%" draw:angle="30deg" draw:border="0%">
      <loext:gradient-stop svg:offset="0" loext:color-type="rgb" loext:color-value="#fdf0c9"/>
      <loext:gradient-stop svg:offset="1" loext:color-type="rgb" loext:color-value="#b5e1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oc_20_de_20_citation" style:display-name="Bloc de citation" style:family="graphic">
      <style:paragraph-properties fo:margin-left="0cm" fo:margin-right="1.764cm" fo:margin-top="1.413cm" fo:margin-bottom="1.413cm" fo:text-indent="0cm" style:text-autospace="none"/>
      <style:text-properties style:font-name="Open Sans Semibold1" fo:font-family="'Open Sans Semibold'" style:font-family-generic="swiss" style:font-pitch="variable" fo:font-size="12pt" fo:font-weight="normal" style:font-name-asian="Open Sans Semibold1" style:font-family-asian="'Open Sans Semibold'" style:font-family-generic-asian="swiss" style:font-pitch-asian="variable" style:font-size-asian="12pt" style:font-weight-asian="normal" style:font-name-complex="Open Sans Semibold1" style:font-family-complex="'Open Sans Semibold'" style:font-family-generic-complex="swiss" style:font-pitch-complex="variable" style:font-size-complex="12pt" style:font-weight-complex="normal"/>
    </style:style>
    <style:style style:name="Body_20_Text" style:display-name="Body Text" style:family="graphic">
      <style:paragraph-properties fo:margin-top="0cm" fo:margin-bottom="0.436cm" fo:line-height="115%" style:text-autospace="none"/>
      <style:text-properties fo:font-size="10pt"/>
    </style:style>
    <style:style style:name="Body_20_Text_20_Indent" style:display-name="Body Text Indent" style:family="graphic">
      <style:paragraph-properties fo:margin-top="0cm" fo:margin-bottom="0.436cm" fo:line-height="115%" style:text-autospace="none"/>
      <style:text-properties fo:font-size="10pt"/>
    </style:style>
    <style:style style:name="Caractères_20_de_20_numérotation" style:display-name="Caractères de numérotation" style:family="graphic">
      <style:paragraph-properties style:text-autospace="none"/>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Définition" style:family="graphic">
      <style:paragraph-properties style:text-autospace="none"/>
      <style:text-properties fo:font-weight="bold"/>
    </style:style>
    <style:style style:name="Emphasis" style:family="graphic">
      <style:paragraph-properties style:text-autospace="none"/>
      <style:text-properties fo:font-style="italic" style:font-style-complex="italic"/>
    </style:style>
    <style:style style:name="Figure" style:family="graphic">
      <style:paragraph-properties fo:margin-top="0.374cm" fo:margin-bottom="0.374cm"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2674dd" loext:opacity="100%" style:text-underline-style="none"/>
    </style:style>
    <style:style style:name="Illustration" style:family="graphic">
      <style:paragraph-properties fo:margin-top="0.178cm" fo:margin-bottom="0.178cm" style:text-autospace="none"/>
      <style:text-properties style:font-name="Cascadia Code Light" fo:font-family="'Cascadia Code Light'" style:font-family-generic="modern" style:font-pitch="fixed" fo:font-size="10pt" fo:font-style="normal" fo:font-weight="normal" style:font-name-asian="Cascadia Code Light" style:font-family-asian="'Cascadia Code Light'" style:font-family-generic-asian="modern" style:font-pitch-asian="fixed" style:font-size-asian="10pt" style:font-style-asian="normal" style:font-weight-asian="normal" style:font-name-complex="Cascadia Code Light" style:font-family-complex="'Cascadia Code Light'" style:font-family-generic-complex="modern" style:font-pitch-complex="fixed" style:font-size-complex="10pt" style:font-style-complex="normal" style:font-weight-complex="normal"/>
    </style:style>
    <style:style style:name="Index" style:family="graphic">
      <style:paragraph-properties style:text-autospace="none"/>
      <style:text-properties style:font-name="Open Sans3" fo:font-family="'Open Sans'" style:font-family-generic="swiss" fo:font-size="10pt" style:font-name-asian="Open Sans3" style:font-family-asian="'Open Sans'" style:font-family-generic-asian="swiss" style:font-size-asian="10pt" style:font-name-complex="Open Sans3" style:font-family-complex="'Open Sans'" style:font-family-generic-complex="swiss" style:font-size-complex="10pt"/>
    </style:style>
    <style:style style:name="Ligne_20_horizontale" style:display-name="Ligne horizontale" style:family="graphic">
      <style:paragraph-properties fo:margin-top="0cm" fo:margin-bottom="0cm" style:text-autospace="none"/>
      <style:text-properties fo:font-size="6pt" style:font-size-asian="6pt" style:font-size-complex="6pt"/>
    </style:style>
    <style:style style:name="List" style:family="graphic">
      <style:paragraph-properties fo:margin-top="0cm" fo:margin-bottom="0.436cm" fo:line-height="115%" style:text-autospace="none"/>
      <style:text-properties style:font-name="Open Sans3" fo:font-family="'Open Sans'" style:font-family-generic="swiss" fo:font-size="10pt" style:font-name-complex="Open Sans3" style:font-family-complex="'Open Sans'" style:font-family-generic-complex="swiss"/>
    </style:style>
    <style:style style:name="List_20_Number" style:display-name="List Number" style:family="graphic">
      <style:paragraph-properties fo:margin-left="1.12cm" fo:margin-right="0cm" fo:margin-top="0cm" fo:margin-bottom="0.374cm" fo:line-height="115%" fo:text-indent="-1.12cm" style:text-autospace="none"/>
      <style:text-properties style:font-name="Open Sans3" fo:font-family="'Open Sans'" style:font-family-generic="swiss" fo:font-size="10pt" style:font-name-complex="Open Sans3" style:font-family-complex="'Open Sans'" style:font-family-generic-complex="swiss"/>
    </style:style>
    <style:style style:name="Normal" style:family="graphic">
      <style:graphic-properties style:writing-mode="lr-tb"/>
      <style:paragraph-properties style:text-autospace="none"/>
      <style:text-properties style:use-window-font-color="true" loext:opacity="0%" style:font-name="Open Sans3" fo:font-family="'Open Sans'" style:font-family-generic="swiss" fo:font-size="10pt" fo:language="fr" fo:country="FR" style:letter-kerning="true" style:font-name-asian="Segoe UI" style:font-family-asian="'Segoe UI'" style:font-family-generic-asian="roman" style:font-pitch-asian="variable" style:font-size-asian="10pt" style:language-asian="zh" style:country-asian="CN" style:font-name-complex="Open Sans3" style:font-family-complex="'Open Sans'" style:font-family-generic-complex="swiss" style:font-size-complex="10pt" style:language-complex="hi" style:country-complex="IN"/>
    </style:style>
    <style:style style:name="Normal1" style:family="graphic">
      <style:graphic-properties style:writing-mode="lr-tb"/>
      <style:paragraph-properties style:text-autospace="none"/>
      <style:text-properties style:use-window-font-color="true" loext:opacity="0%" style:font-name="Open Sans3" fo:font-family="'Open Sans'" style:font-family-generic="swiss" fo:font-size="12pt" fo:language="fr" fo:country="FR" style:letter-kerning="true" style:font-name-asian="Segoe UI" style:font-family-asian="'Segoe UI'" style:font-family-generic-asian="roman" style:font-pitch-asian="variable" style:font-size-asian="12pt" style:language-asian="zh" style:country-asian="CN" style:font-name-complex="Open Sans3" style:font-family-complex="'Open Sans'" style:font-family-generic-complex="swiss" style:font-size-complex="12pt" style:language-complex="hi" style:country-complex="IN"/>
    </style:style>
    <style:style style:name="Police_20_par_20_défaut" style:display-name="Police par défaut"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style:use-window-font-color="true" loext:opacity="0%" fo:font-size="10pt" fo:font-weight="bold" style:font-weight-complex="bold"/>
    </style:style>
    <style:style style:name="Subtitle" style:family="graphic">
      <style:paragraph-properties fo:margin-top="0cm" fo:margin-bottom="0.706cm" fo:text-align="start" style:text-autospace="none"/>
      <style:text-properties style:font-name="Open Sans Light" fo:font-family="'Open Sans Light'" style:font-family-generic="swiss" style:font-pitch="variable" fo:font-size="14pt" fo:font-weight="bold" style:font-name-complex="Open Sans Light" style:font-family-complex="'Open Sans Light'" style:font-family-generic-complex="swiss" style:font-pitch-complex="variable" style:font-size-complex="18pt"/>
    </style:style>
    <style:style style:name="WW_5f_CharLFO1LVL1" style:display-name="WW_CharLFO1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2" style:display-name="WW_CharLFO1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3" style:display-name="WW_CharLFO1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4" style:display-name="WW_CharLFO1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5" style:display-name="WW_CharLFO1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6" style:display-name="WW_CharLFO1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7" style:display-name="WW_CharLFO1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8" style:display-name="WW_CharLFO1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LVL9" style:display-name="WW_CharLFO1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1" style:display-name="WW_CharLFO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2" style:display-name="WW_CharLFO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3" style:display-name="WW_CharLFO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4" style:display-name="WW_CharLFO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5" style:display-name="WW_CharLFO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6" style:display-name="WW_CharLFO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7" style:display-name="WW_CharLFO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8" style:display-name="WW_CharLFO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9" style:display-name="WW_CharLFO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1" style:display-name="WW_CharLFO3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2" style:display-name="WW_CharLFO3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3" style:display-name="WW_CharLFO3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4" style:display-name="WW_CharLFO3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5" style:display-name="WW_CharLFO3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6" style:display-name="WW_CharLFO3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7" style:display-name="WW_CharLFO3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8" style:display-name="WW_CharLFO3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9" style:display-name="WW_CharLFO3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1" style:display-name="WW_CharLFO4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2" style:display-name="WW_CharLFO4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3" style:display-name="WW_CharLFO4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4" style:display-name="WW_CharLFO4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5" style:display-name="WW_CharLFO4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6" style:display-name="WW_CharLFO4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7" style:display-name="WW_CharLFO4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8" style:display-name="WW_CharLFO4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9" style:display-name="WW_CharLFO4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ption" style:family="graphic">
      <style:paragraph-properties fo:margin-top="0.374cm" fo:margin-bottom="0.374cm" style:text-autospace="none"/>
      <style:text-properties fo:font-size="10pt" style:font-size-asian="10pt" style:font-size-complex="10pt"/>
    </style:style>
    <style:style style:name="endnote_20_reference" style:display-name="endnote reference" style:family="graphic">
      <style:paragraph-properties style:text-autospace="none"/>
      <style:text-properties fo:color="#2674dd" loext:opacity="100%" fo:font-weight="normal"/>
    </style:style>
    <style:style style:name="envelope_20_return" style:display-name="envelope return" style:family="graphic">
      <style:paragraph-properties fo:margin-top="0cm" fo:margin-bottom="0cm" style:text-autospace="none"/>
      <style:text-properties fo:color="#2d363f" loext:opacity="100%" style:font-name="Open Sans Semibold1" fo:font-family="'Open Sans Semibold'" style:font-family-generic="swiss" style:font-pitch="variable" fo:font-size="10pt" fo:font-weight="normal" style:font-name-asian="Open Sans Semibold1" style:font-family-asian="'Open Sans Semibold'" style:font-family-generic-asian="swiss" style:font-pitch-asian="variable" style:font-size-asian="10pt" style:font-weight-asian="normal" style:font-name-complex="Open Sans Semibold1" style:font-family-complex="'Open Sans Semibold'" style:font-family-generic-complex="swiss" style:font-pitch-complex="variable" style:font-size-complex="10pt" style:font-weight-complex="normal"/>
    </style:style>
    <style:style style:name="heading_20_1" style:display-name="heading 1" style:family="graphic">
      <style:paragraph-properties fo:margin-top="0cm" fo:margin-bottom="2.028cm" style:text-autospace="none"/>
      <style:text-properties style:font-name="Open Sans Extrabold1" fo:font-family="'Open Sans Extrabold'" style:font-family-generic="swiss" style:font-pitch="variable" fo:font-size="19pt" fo:font-weight="normal" style:font-name-asian="Open Sans Extrabold1" style:font-family-asian="'Open Sans Extrabold'" style:font-family-generic-asian="swiss" style:font-pitch-asian="variable" style:font-size-asian="19pt" style:font-weight-asian="normal" style:font-name-complex="Open Sans Extrabold1" style:font-family-complex="'Open Sans Extrabold'" style:font-family-generic-complex="swiss" style:font-pitch-complex="variable" style:font-size-complex="19pt" style:font-weight-complex="normal"/>
    </style:style>
    <style:style style:name="heading_20_2" style:display-name="heading 2" style:family="graphic">
      <style:paragraph-properties fo:margin-top="0.706cm" fo:margin-bottom="0.529cm" style:text-autospace="none"/>
      <style:text-properties fo:color="#2674dd" loext:opacity="100%" fo:font-size="11pt" fo:font-weight="bold" style:font-size-asian="11pt" style:font-weight-asian="bold" style:font-size-complex="11pt" style:font-weight-complex="bold"/>
    </style:style>
    <style:style style:name="heading_20_3" style:display-name="heading 3" style:family="graphic">
      <style:paragraph-properties fo:margin-top="0.351cm" fo:margin-bottom="0.178cm" style:text-autospace="none"/>
      <style:text-properties fo:color="#2674dd" loext:opacity="100%" fo:font-size="11pt" fo:font-weight="bold" style:font-size-asian="11pt" style:font-weight-asian="bold" style:font-size-complex="11pt" style:font-weight-complex="bold"/>
    </style:style>
    <style:style style:name="heading_20_4" style:display-name="heading 4" style:family="graphic">
      <style:paragraph-properties fo:margin-top="0.351cm" fo:margin-bottom="0.178cm" style:text-autospace="none"/>
      <style:text-properties fo:color="#2674dd" loext:opacity="100%" fo:font-size="11pt" fo:font-weight="bold" style:font-size-asian="11pt" style:font-weight-asian="bold" style:font-size-complex="11pt" style:font-weight-complex="bold"/>
    </style:style>
    <style:style style:name="line_20_number" style:display-name="line number" style:family="graphic">
      <style:paragraph-properties style:text-autospace="none"/>
    </style:style>
    <style:style style:name="p1" style:family="graphic">
      <style:paragraph-properties fo:margin-top="0.31cm" fo:margin-bottom="0.31cm" style:text-autospace="none"/>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default-body" style:family="table-cell" style:parent-style-name="bg-none">
      <style:paragraph-properties fo:border-left="none" fo:border-right="none" fo:border-top="0.28pt solid #666666" fo:border-bottom="0.28pt solid #666666"/>
      <style:text-properties style:font-name="Open Sans" fo:font-family="'Open Sans'" style:font-style-name="Normal" style:font-family-generic="swiss" style:font-pitch="variable"/>
    </style:style>
    <style:style style:name="default-first-column" style:family="table-cell" style:parent-style-name="bg-none">
      <style:paragraph-properties fo:border-left="none" fo:border-right="none" fo:border-top="0.28pt solid #666666" fo:border-bottom="0.28pt solid #666666"/>
      <style:text-properties style:font-name="Open Sans" fo:font-family="'Open Sans'" style:font-style-name="Normal" style:font-family-generic="swiss" style:font-pitch="variable"/>
    </style:style>
    <style:style style:name="default-first-row1" style:family="table-cell" style:parent-style-name="bg-none">
      <loext:graphic-properties draw:textarea-vertical-align="bottom"/>
      <style:paragraph-properties fo:text-align="center" fo:border-left="none" fo:border-right="none" fo:border-top="none" fo:border-bottom="0.28pt solid #268dff"/>
      <style:text-properties style:font-name="Open Sans Semibold" fo:font-family="'Open Sans Semibold'" style:font-style-name="Normal" style:font-family-generic="swiss" style:font-pitch="variable" fo:font-weight="600"/>
    </style:style>
    <style:style style:name="default-last-row" style:family="table-cell" style:parent-style-name="bg-none">
      <style:paragraph-properties fo:text-align="start" fo:border-left="none" fo:border-right="none" fo:border-top="0.28pt solid #666666" fo:border-bottom="0.28pt solid #666666"/>
      <style:text-properties style:font-name="Open Sans Semibold" fo:font-family="'Open Sans Semibold'" style:font-style-name="Normal" style:font-family-generic="swiss" style:font-pitch="variable" fo:font-weight="600"/>
    </style:style>
    <style:style style:name="default-odd-rows" style:family="table-cell" style:parent-style-name="bg-none">
      <style:paragraph-properties fo:border-left="none" fo:border-right="none" fo:border-top="0.28pt solid #666666" fo:border-bottom="0.28pt solid #666666"/>
      <style:text-properties style:font-name="Open Sans" fo:font-family="'Open Sans'" style:font-style-name="Normal" style:font-family-generic="swiss" style:font-pitch="variable" fo:font-size="18pt"/>
    </style:style>
    <table:table-template table:name="default">
      <table:first-row table:style-name="default-first-row1"/>
      <table:last-row table:style-name="default-last-row"/>
      <table:first-column table:style-name="default-first-column"/>
      <table:last-column table:style-name="bg-none"/>
      <table:body table:style-name="default-body"/>
      <table:odd-rows table:style-name="default-odd-rows"/>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Page_20_de_20_garde-background" style:display-name="Page de garde-background" style:family="presentation">
      <style:graphic-properties draw:stroke="none" draw:fill="solid" draw:fill-color="#ffffff"/>
      <style:text-properties style:letter-kerning="true"/>
    </style:style>
    <style:style style:name="Page_20_de_20_garde-backgroundobjects" style:display-name="Page de garde-backgroundobjects" style:family="presentation">
      <style:graphic-properties draw:stroke="none" draw:fill="none" loext:fill-use-slide-background="false" draw:textarea-horizontal-align="left" draw:textarea-vertical-align="bottom" draw:auto-grow-height="false" draw:shadow="hidden" draw:shadow-offset-x="0.2cm" draw:shadow-offset-y="0.2cm" draw:shadow-color="#808080">
        <text:list-style style:name="Page_20_de_20_garde-backgroundobjects" style:display-name="Page de garde-backgroundobjects">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2cm" text:min-label-width="0.4cm"/>
            <style:text-properties fo:font-family="Marianne" style:font-style-name="Regular" style:use-window-font-color="true" fo:font-size="50%"/>
          </text:list-level-style-bullet>
          <text:list-level-style-number text:level="5" style:num-format="">
            <style:list-level-properties/>
            <style:text-properties style:use-window-font-color="true" fo:font-size="25%"/>
          </text:list-level-style-number>
          <text:list-level-style-number text:level="6" style:num-format="">
            <style:list-level-properties/>
            <style:text-properties style:use-window-font-color="true" fo:font-size="25%"/>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loext:tab-stop-distance="0cm">
        <style:tab-stops/>
      </style:paragraph-properties>
      <style:text-properties fo:color="#268dff" loext:opacity="100%" style:font-name="Open Sans" fo:font-family="'Open Sans'" style:font-style-name="Normal" style:font-family-generic="swiss" style:font-pitch="variable" fo:font-size="16pt" style:letter-kerning="true" fo:hyphenate="false" loext:hyphenation-no-caps="false" loext:hyphenation-no-last-word="false"/>
    </style:style>
    <style:style style:name="Page_20_de_20_garde-notes" style:display-name="Page de gard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4.7999992370606pt" style:font-style-asian="normal" style:font-weight-asian="normal" style:font-name-complex="Arial" style:font-family-complex="Arial" style:font-family-generic-complex="system" style:font-pitch-complex="variable" style:font-size-complex="34.7999992370606pt" style:font-style-complex="normal" style:font-weight-complex="normal" style:text-emphasize="none" style:font-relief="none" style:text-overline-style="none" style:text-overline-color="font-color"/>
    </style:style>
    <style:style style:name="Page_20_de_20_garde-outline1" style:display-name="Page de garde-outline1" style:family="presentation">
      <style:graphic-properties draw:stroke="none" draw:fill="none" draw:textarea-horizontal-align="left" draw:auto-grow-height="false" draw:fit-to-size="false" style:shrink-to-fit="true" style:writing-mode="lr-tb">
        <text:list-style style:name="Page_20_de_20_garde-outline1" style:display-name="Page de garde-outline1">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2cm" text:min-label-width="0.4cm"/>
            <style:text-properties fo:font-family="Marianne" style:font-style-name="Regular" style:use-window-font-color="true" fo:font-size="50%"/>
          </text:list-level-style-bullet>
          <text:list-level-style-number text:level="5" style:num-format="">
            <style:list-level-properties/>
            <style:text-properties style:use-window-font-color="true" fo:font-size="25%"/>
          </text:list-level-style-number>
          <text:list-level-style-number text:level="6" style:num-format="">
            <style:list-level-properties/>
            <style:text-properties style:use-window-font-color="true" fo:font-size="25%"/>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48cm" fo:margin-bottom="0cm" fo:line-height="90%" fo:text-align="start" fo:text-indent="0cm" style:punctuation-wrap="hanging"/>
      <style:text-properties fo:font-variant="normal" fo:text-transform="none" fo:color="#145cbf" loext:opacity="100%" style:text-outline="false" style:text-line-through-style="none" style:text-line-through-type="none" style:text-position="0% 100%" style:font-name="Open Sans" fo:font-family="'Open Sans'" style:font-style-name="Normal" style:font-family-generic="swiss" style:font-pitch="variable"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style:style>
    <style:style style:name="Page_20_de_20_garde-outline2" style:display-name="Page de garde-outline2" style:family="presentation" style:parent-style-name="Page_20_de_20_garde-outline1">
      <style:graphic-properties style:writing-mode="lr-tb"/>
      <style:paragraph-properties fo:margin-left="0cm" fo:margin-right="0cm" fo:margin-top="0.082cm" fo:margin-bottom="0cm" fo:line-height="90%" fo:text-align="start" fo:text-indent="0cm" style:punctuation-wrap="hanging"/>
      <style:text-properties fo:font-variant="normal" fo:text-transform="none" fo:color="#666666"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ge_20_de_20_garde-outline3" style:display-name="Page de garde-outline3" style:family="presentation" style:parent-style-name="Page_20_de_20_garde-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40404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age_20_de_20_garde-outline4" style:display-name="Page de garde-outline4" style:family="presentation" style:parent-style-name="Page_20_de_20_garde-outline3">
      <style:graphic-properties style:writing-mode="lr-tb"/>
      <style:paragraph-properties fo:margin-left="0cm" fo:margin-right="0cm" fo:margin-top="0.16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14.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age_20_de_20_garde-outline5" style:display-name="Page de garde-outline5" style:family="presentation" style:parent-style-name="Page_20_de_20_garde-outline4">
      <style:paragraph-properties fo:margin-left="0cm" fo:margin-right="0cm" fo:margin-top="0.082cm" fo:margin-bottom="0cm" fo:text-indent="0cm"/>
      <style:text-properties fo:font-size="16.5pt" style:font-size-asian="20pt" style:font-size-complex="20pt"/>
    </style:style>
    <style:style style:name="Page_20_de_20_garde-outline6" style:display-name="Page de garde-outline6" style:family="presentation" style:parent-style-name="Page_20_de_20_garde-outline5">
      <style:paragraph-properties fo:margin-left="0cm" fo:margin-right="0cm" fo:margin-top="0.082cm" fo:margin-bottom="0cm" fo:text-indent="0cm"/>
      <style:text-properties fo:font-size="16.5pt" style:font-size-asian="20pt" style:font-size-complex="20pt"/>
    </style:style>
    <style:style style:name="Page_20_de_20_garde-outline7" style:display-name="Page de garde-outline7" style:family="presentation" style:parent-style-name="Page_20_de_20_garde-outline6">
      <style:paragraph-properties fo:margin-left="0cm" fo:margin-right="0cm" fo:margin-top="0.082cm" fo:margin-bottom="0cm" fo:text-indent="0cm"/>
      <style:text-properties fo:font-size="16.5pt" style:font-size-asian="20pt" style:font-size-complex="20pt"/>
    </style:style>
    <style:style style:name="Page_20_de_20_garde-outline8" style:display-name="Page de garde-outline8" style:family="presentation" style:parent-style-name="Page_20_de_20_garde-outline7">
      <style:paragraph-properties fo:margin-left="0cm" fo:margin-right="0cm" fo:margin-top="0.082cm" fo:margin-bottom="0cm" fo:text-indent="0cm"/>
      <style:text-properties fo:font-size="16.5pt" style:font-size-asian="20pt" style:font-size-complex="20pt"/>
    </style:style>
    <style:style style:name="Page_20_de_20_garde-outline9" style:display-name="Page de garde-outline9" style:family="presentation" style:parent-style-name="Page_20_de_20_garde-outline8">
      <style:paragraph-properties fo:margin-left="0cm" fo:margin-right="0cm" fo:margin-top="0.082cm" fo:margin-bottom="0cm" fo:text-indent="0cm"/>
      <style:text-properties fo:font-size="16.5pt" style:font-size-asian="20pt" style:font-size-complex="20pt"/>
    </style:style>
    <style:style style:name="Page_20_de_20_garde-subtitle" style:display-name="Page de garde-subtitle" style:family="presentation">
      <style:graphic-properties draw:stroke="none" draw:fill="none" draw:textarea-vertical-align="middle">
        <text:list-style style:name="Page_20_de_20_garde-subtitle" style:display-name="Page de gar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_20_de_20_garde-title" style:display-name="Page de garde-title" style:family="presentation">
      <style:graphic-properties draw:stroke="none" draw:fill="none" draw:textarea-horizontal-align="left" draw:textarea-vertical-align="top" draw:auto-grow-height="false" draw:fit-to-size="false" style:shrink-to-fit="true" fo:padding-top="0cm" fo:padding-bottom="0cm" fo:padding-left="0cm" fo:padding-right="0cm" draw:shadow-color="#000000" style:writing-mode="lr-tb">
        <text:list-style style:name="Page_20_de_20_garde-title" style:display-name="Page de garde-title">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hapitre_20_B-background" style:display-name="Chapitre B-background" style:family="presentation">
      <style:graphic-properties draw:fill="solid" draw:fill-color="#bce4ff"/>
    </style:style>
    <style:style style:name="Chapitre_20_B-backgroundobjects" style:display-name="Chapitre B-backgroundobjects" style:family="presentation">
      <style:graphic-properties draw:textarea-horizontal-align="justify" draw:shadow="hidden" draw:shadow-offset-x="0.2cm" draw:shadow-offset-y="0.2cm" draw:shadow-color="#808080">
        <text:list-style style:name="Chapitre_20_B-backgroundobjects" style:display-name="Chapitre B-backgroundobjects">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Chapitre_20_B-notes" style:display-name="Chapitre B-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6pt" style:font-style-asian="normal" style:font-weight-asian="normal" style:font-name-complex="Arial"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Chapitre_20_B-outline1" style:display-name="Chapitre B-outline1" style:family="presentation">
      <style:graphic-properties draw:stroke="none" draw:fill="none" draw:textarea-horizontal-align="left" draw:auto-grow-height="false" draw:fit-to-size="false" style:shrink-to-fit="true" draw:shadow-color="#000000" style:writing-mode="lr-tb">
        <text:list-style style:name="Chapitre_20_B-outline1" style:display-name="Chapitre B-outline1">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cm" fo:margin-bottom="0cm" fo:line-height="90%" fo:text-align="start" fo:text-indent="0cm" style:punctuation-wrap="hanging" loext:tab-stop-distance="0cm">
        <style:tab-stops/>
      </style:paragraph-properties>
      <style:text-properties fo:font-variant="normal" fo:text-transform="none" fo:color="#042f80" loext:opacity="100%" style:text-outline="false" style:text-line-through-style="none" style:text-line-through-type="none" style:text-position="0% 100%" style:font-name="Open Sans1" fo:font-family="'Open Sans'" fo:font-size="3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style:style>
    <style:style style:name="Chapitre_20_B-outline2" style:display-name="Chapitre B-outline2" style:family="presentation" style:parent-style-name="Chapitre_20_B-outline1">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04040" loext:opacity="100%" style:text-outline="false" style:text-line-through-style="none" style:text-line-through-type="none" style:text-position="0% 100%" style:font-name="Open Sans Semibold" fo:font-family="'Open Sans Semibold'" style:font-style-name="Normal" style:font-family-generic="swiss" style:font-pitch="variable" fo:font-size="26pt" fo:letter-spacing="normal" fo:font-style="normal" style:text-underline-style="none" fo:font-weight="600" fo:background-color="transparent" style:font-size-asian="20pt" style:font-style-asian="normal" style:font-weight-asian="normal" style:font-size-complex="20pt" style:font-style-complex="normal" style:font-weight-complex="normal"/>
    </style:style>
    <style:style style:name="Chapitre_20_B-outline3" style:display-name="Chapitre B-outline3" style:family="presentation" style:parent-style-name="Chapitre_20_B-outline2">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c4c4c"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hapitre_20_B-outline4" style:display-name="Chapitre B-outline4" style:family="presentation" style:parent-style-name="Chapitre_20_B-outline3">
      <style:graphic-properties style:writing-mode="lr-tb"/>
      <style:paragraph-properties fo:margin-left="0cm" fo:margin-right="0cm" fo:margin-top="0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16.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Chapitre_20_B-outline5" style:display-name="Chapitre B-outline5" style:family="presentation" style:parent-style-name="Chapitre_20_B-outline4">
      <style:paragraph-properties fo:margin-left="0.495cm" fo:margin-right="0cm" fo:margin-top="0cm" fo:margin-bottom="0cm" fo:text-indent="0cm"/>
      <style:text-properties fo:font-size="16.5pt" style:font-size-asian="20pt" style:font-size-complex="20pt"/>
    </style:style>
    <style:style style:name="Chapitre_20_B-outline6" style:display-name="Chapitre B-outline6" style:family="presentation" style:parent-style-name="Chapitre_20_B-outline5">
      <style:paragraph-properties fo:margin-left="0cm" fo:margin-right="0cm" fo:margin-top="0cm" fo:margin-bottom="0cm" fo:text-indent="0cm"/>
      <style:text-properties fo:font-size="14.8999996185303pt" style:font-size-asian="20pt" style:font-size-complex="20pt"/>
    </style:style>
    <style:style style:name="Chapitre_20_B-outline7" style:display-name="Chapitre B-outline7" style:family="presentation" style:parent-style-name="Chapitre_20_B-outline6">
      <style:paragraph-properties fo:margin-left="0cm" fo:margin-right="0cm" fo:margin-top="0cm" fo:margin-bottom="0cm" fo:text-indent="0cm"/>
      <style:text-properties fo:font-size="13.1999998092651pt" style:font-size-asian="20pt" style:font-size-complex="20pt"/>
    </style:style>
    <style:style style:name="Chapitre_20_B-outline8" style:display-name="Chapitre B-outline8" style:family="presentation" style:parent-style-name="Chapitre_20_B-outline7">
      <style:paragraph-properties fo:margin-left="0cm" fo:margin-right="0cm" fo:margin-top="0cm" fo:margin-bottom="0cm" fo:text-indent="0cm"/>
      <style:text-properties fo:font-size="16.5pt" style:font-size-asian="20pt" style:font-size-complex="20pt"/>
    </style:style>
    <style:style style:name="Chapitre_20_B-outline9" style:display-name="Chapitre B-outline9" style:family="presentation" style:parent-style-name="Chapitre_20_B-outline8">
      <style:paragraph-properties fo:margin-left="0cm" fo:margin-right="0cm" fo:margin-top="0cm" fo:margin-bottom="0cm" fo:text-indent="0cm"/>
      <style:text-properties fo:font-size="16.5pt" style:font-size-asian="20pt" style:font-size-complex="20pt"/>
    </style:style>
    <style:style style:name="Chapitre_20_B-subtitle" style:display-name="Chapitre B-subtitle" style:family="presentation">
      <style:graphic-properties draw:stroke="none" draw:fill="none" draw:textarea-vertical-align="middle">
        <text:list-style style:name="Chapitre_20_B-subtitle" style:display-name="Chapitre B-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_20_B-title" style:display-name="Chapitre B-title" style:family="presentation">
      <style:graphic-properties draw:stroke="none" draw:fill="none" draw:textarea-horizontal-align="left" draw:textarea-vertical-align="top" draw:auto-grow-height="false" draw:shadow-color="#000000" style:writing-mode="lr-tb">
        <text:list-style style:name="Chapitre_20_B-title" style:display-name="Chapitre 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loext:tab-stop-distance="0cm">
        <style:tab-stops/>
      </style:paragraph-properties>
      <style:text-properties fo:font-variant="normal" fo:text-transform="none" fo:color="#042f80" loext:opacity="100%" style:text-outline="false" style:text-line-through-style="none" style:text-line-through-type="none" style:text-position="0% 100%" style:font-name="Open Sans Extrabold" fo:font-family="'Open Sans Extrabold'" style:font-style-name="Normal" style:font-family-generic="swiss" style:font-pitch="variable" fo:font-size="180pt" fo:letter-spacing="normal" fo:language="fr" fo:country="FR" fo:font-style="normal" fo:text-shadow="none" style:text-underline-style="none" fo:font-weight="800" style:letter-kerning="true" fo:background-color="transparent" style:font-name-asian="Microsoft YaHei" style:font-family-asian="'Microsoft YaHei'" style:font-family-generic-asian="system" style:font-pitch-asian="variable" style:font-size-asian="180pt" style:font-style-asian="normal" style:font-weight-asian="normal" style:font-name-complex="Arial" style:font-family-complex="Arial" style:font-family-generic-complex="system" style:font-pitch-complex="variable" style:font-size-complex="180pt" style:font-style-complex="normal" style:font-weight-complex="normal" style:text-emphasize="none" style:font-relief="none" style:text-overline-style="none" style:text-overline-color="font-color" fo:hyphenate="false"/>
    </style:style>
    <style:style style:name="Chapitre_20_V-background" style:display-name="Chapitre V-background" style:family="presentation">
      <style:graphic-properties draw:stroke="none" draw:fill="solid" draw:fill-color="#e1bce6"/>
      <style:text-properties style:letter-kerning="true"/>
    </style:style>
    <style:style style:name="Chapitre_20_V-backgroundobjects" style:display-name="Chapitre V-backgroundobjects" style:family="presentation">
      <style:graphic-properties draw:textarea-horizontal-align="justify" draw:shadow="hidden" draw:shadow-offset-x="0.2cm" draw:shadow-offset-y="0.2cm" draw:shadow-color="#808080">
        <text:list-style style:name="Chapitre_20_V-backgroundobjects" style:display-name="Chapitre V-backgroundobjects">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Chapitre_20_V-notes" style:display-name="Chapitre V-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6pt" style:font-style-asian="normal" style:font-weight-asian="normal" style:font-name-complex="Arial"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Chapitre_20_V-outline1" style:display-name="Chapitre V-outline1" style:family="presentation">
      <style:graphic-properties draw:stroke="none" draw:fill="none" draw:textarea-horizontal-align="left" draw:auto-grow-height="false" draw:fit-to-size="false" style:shrink-to-fit="true" draw:shadow-color="#000000" style:writing-mode="lr-tb">
        <text:list-style style:name="Chapitre_20_V-outline1" style:display-name="Chapitre V-outline1">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cm" fo:margin-bottom="0cm" fo:line-height="90%" fo:text-align="start" fo:text-indent="0cm" style:punctuation-wrap="hanging" loext:tab-stop-distance="0cm">
        <style:tab-stops/>
      </style:paragraph-properties>
      <style:text-properties fo:font-variant="normal" fo:text-transform="none" fo:color="#5f1972" loext:opacity="100%" style:text-outline="false" style:text-line-through-style="none" style:text-line-through-type="none" style:text-position="0% 100%" style:font-name="Open Sans1" fo:font-family="'Open Sans'" fo:font-size="3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style:style>
    <style:style style:name="Chapitre_20_V-outline2" style:display-name="Chapitre V-outline2" style:family="presentation" style:parent-style-name="Chapitre_20_V-outline1">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04040" loext:opacity="100%" style:text-outline="false" style:text-line-through-style="none" style:text-line-through-type="none" style:text-position="0% 100%" style:font-name="Open Sans Semibold" fo:font-family="'Open Sans Semibold'" style:font-style-name="Normal" style:font-family-generic="swiss" style:font-pitch="variable" fo:font-size="26pt" fo:letter-spacing="normal" fo:font-style="normal" style:text-underline-style="none" fo:font-weight="600" fo:background-color="transparent" style:font-size-asian="20pt" style:font-style-asian="normal" style:font-weight-asian="normal" style:font-size-complex="20pt" style:font-style-complex="normal" style:font-weight-complex="normal"/>
    </style:style>
    <style:style style:name="Chapitre_20_V-outline3" style:display-name="Chapitre V-outline3" style:family="presentation" style:parent-style-name="Chapitre_20_V-outline2">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c4c4c"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hapitre_20_V-outline4" style:display-name="Chapitre V-outline4" style:family="presentation" style:parent-style-name="Chapitre_20_V-outline3">
      <style:graphic-properties style:writing-mode="lr-tb"/>
      <style:paragraph-properties fo:margin-left="0cm" fo:margin-right="0cm" fo:margin-top="0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16.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Chapitre_20_V-outline5" style:display-name="Chapitre V-outline5" style:family="presentation" style:parent-style-name="Chapitre_20_V-outline4">
      <style:paragraph-properties fo:margin-left="0.495cm" fo:margin-right="0cm" fo:margin-top="0cm" fo:margin-bottom="0cm" fo:text-indent="0cm"/>
      <style:text-properties fo:font-size="16.5pt" style:font-size-asian="20pt" style:font-size-complex="20pt"/>
    </style:style>
    <style:style style:name="Chapitre_20_V-outline6" style:display-name="Chapitre V-outline6" style:family="presentation" style:parent-style-name="Chapitre_20_V-outline5">
      <style:paragraph-properties fo:margin-left="0cm" fo:margin-right="0cm" fo:margin-top="0cm" fo:margin-bottom="0cm" fo:text-indent="0cm"/>
      <style:text-properties fo:font-size="14.8999996185303pt" style:font-size-asian="20pt" style:font-size-complex="20pt"/>
    </style:style>
    <style:style style:name="Chapitre_20_V-outline7" style:display-name="Chapitre V-outline7" style:family="presentation" style:parent-style-name="Chapitre_20_V-outline6">
      <style:paragraph-properties fo:margin-left="0cm" fo:margin-right="0cm" fo:margin-top="0cm" fo:margin-bottom="0cm" fo:text-indent="0cm"/>
      <style:text-properties fo:font-size="13.1999998092651pt" style:font-size-asian="20pt" style:font-size-complex="20pt"/>
    </style:style>
    <style:style style:name="Chapitre_20_V-outline8" style:display-name="Chapitre V-outline8" style:family="presentation" style:parent-style-name="Chapitre_20_V-outline7">
      <style:paragraph-properties fo:margin-left="0cm" fo:margin-right="0cm" fo:margin-top="0cm" fo:margin-bottom="0cm" fo:text-indent="0cm"/>
      <style:text-properties fo:font-size="16.5pt" style:font-size-asian="20pt" style:font-size-complex="20pt"/>
    </style:style>
    <style:style style:name="Chapitre_20_V-outline9" style:display-name="Chapitre V-outline9" style:family="presentation" style:parent-style-name="Chapitre_20_V-outline8">
      <style:paragraph-properties fo:margin-left="0cm" fo:margin-right="0cm" fo:margin-top="0cm" fo:margin-bottom="0cm" fo:text-indent="0cm"/>
      <style:text-properties fo:font-size="16.5pt" style:font-size-asian="20pt" style:font-size-complex="20pt"/>
    </style:style>
    <style:style style:name="Chapitre_20_V-subtitle" style:display-name="Chapitre V-subtitle" style:family="presentation">
      <style:graphic-properties draw:stroke="none" draw:fill="none" draw:textarea-vertical-align="middle">
        <text:list-style style:name="Chapitre_20_V-subtitle" style:display-name="Chapitre V-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_20_V-title" style:display-name="Chapitre V-title" style:family="presentation">
      <style:graphic-properties draw:stroke="none" draw:fill="none" draw:textarea-horizontal-align="left" draw:textarea-vertical-align="top" draw:auto-grow-height="false" draw:shadow-color="#000000" style:writing-mode="lr-tb">
        <text:list-style style:name="Chapitre_20_V-title" style:display-name="Chapitre V-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loext:tab-stop-distance="0cm">
        <style:tab-stops/>
      </style:paragraph-properties>
      <style:text-properties fo:font-variant="normal" fo:text-transform="none" fo:color="#5f1972" loext:opacity="100%" style:text-outline="false" style:text-line-through-style="none" style:text-line-through-type="none" style:text-position="0% 100%" style:font-name="Open Sans Extrabold" fo:font-family="'Open Sans Extrabold'" style:font-style-name="Normal" style:font-family-generic="swiss" style:font-pitch="variable" fo:font-size="180pt" fo:letter-spacing="normal" fo:language="fr" fo:country="FR" fo:font-style="normal" fo:text-shadow="none" style:text-underline-style="none" fo:font-weight="800" style:letter-kerning="true" fo:background-color="transparent" style:font-name-asian="Microsoft YaHei" style:font-family-asian="'Microsoft YaHei'" style:font-family-generic-asian="system" style:font-pitch-asian="variable" style:font-size-asian="180pt" style:font-style-asian="normal" style:font-weight-asian="normal" style:font-name-complex="Arial" style:font-family-complex="Arial" style:font-family-generic-complex="system" style:font-pitch-complex="variable" style:font-size-complex="180pt" style:font-style-complex="normal" style:font-weight-complex="normal" style:text-emphasize="none" style:font-relief="none" style:text-overline-style="none" style:text-overline-color="font-color" fo:hyphenate="false"/>
    </style:style>
    <style:style style:name="Chapitre_20_J-background" style:display-name="Chapitre J-background" style:family="presentation">
      <style:graphic-properties draw:stroke="none" draw:fill="solid" draw:fill-color="#ffe68f"/>
      <style:text-properties style:letter-kerning="true"/>
    </style:style>
    <style:style style:name="Chapitre_20_J-backgroundobjects" style:display-name="Chapitre J-backgroundobjects" style:family="presentation">
      <style:graphic-properties draw:textarea-horizontal-align="justify" draw:shadow="hidden" draw:shadow-offset-x="0.2cm" draw:shadow-offset-y="0.2cm" draw:shadow-color="#808080">
        <text:list-style style:name="Chapitre_20_J-backgroundobjects" style:display-name="Chapitre J-backgroundobjects">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Chapitre_20_J-notes" style:display-name="Chapitre J-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6pt" style:font-style-asian="normal" style:font-weight-asian="normal" style:font-name-complex="Arial"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Chapitre_20_J-outline1" style:display-name="Chapitre J-outline1" style:family="presentation">
      <style:graphic-properties draw:stroke="none" draw:fill="none" draw:textarea-horizontal-align="left" draw:auto-grow-height="false" draw:fit-to-size="false" style:shrink-to-fit="true" draw:shadow-color="#000000" style:writing-mode="lr-tb">
        <text:list-style style:name="Chapitre_20_J-outline1" style:display-name="Chapitre J-outline1">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cm" fo:margin-bottom="0cm" fo:line-height="90%" fo:text-align="start" fo:text-indent="0cm" style:punctuation-wrap="hanging" loext:tab-stop-distance="0cm">
        <style:tab-stops/>
      </style:paragraph-properties>
      <style:text-properties fo:font-variant="normal" fo:text-transform="none" fo:color="#743c01" loext:opacity="100%" style:text-outline="false" style:text-line-through-style="none" style:text-line-through-type="none" style:text-position="0% 100%" style:font-name="Open Sans1" fo:font-family="'Open Sans'" fo:font-size="3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style:style>
    <style:style style:name="Chapitre_20_J-outline2" style:display-name="Chapitre J-outline2" style:family="presentation" style:parent-style-name="Chapitre_20_J-outline1">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04040" loext:opacity="100%" style:text-outline="false" style:text-line-through-style="none" style:text-line-through-type="none" style:text-position="0% 100%" style:font-name="Open Sans Semibold" fo:font-family="'Open Sans Semibold'" style:font-style-name="Normal" style:font-family-generic="swiss" style:font-pitch="variable" fo:font-size="26pt" fo:letter-spacing="normal" fo:font-style="normal" style:text-underline-style="none" fo:font-weight="600" fo:background-color="transparent" style:font-size-asian="20pt" style:font-style-asian="normal" style:font-weight-asian="normal" style:font-size-complex="20pt" style:font-style-complex="normal" style:font-weight-complex="normal"/>
    </style:style>
    <style:style style:name="Chapitre_20_J-outline3" style:display-name="Chapitre J-outline3" style:family="presentation" style:parent-style-name="Chapitre_20_J-outline2">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c4c4c"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hapitre_20_J-outline4" style:display-name="Chapitre J-outline4" style:family="presentation" style:parent-style-name="Chapitre_20_J-outline3">
      <style:graphic-properties style:writing-mode="lr-tb"/>
      <style:paragraph-properties fo:margin-left="0cm" fo:margin-right="0cm" fo:margin-top="0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16.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Chapitre_20_J-outline5" style:display-name="Chapitre J-outline5" style:family="presentation" style:parent-style-name="Chapitre_20_J-outline4">
      <style:paragraph-properties fo:margin-left="0.495cm" fo:margin-right="0cm" fo:margin-top="0cm" fo:margin-bottom="0cm" fo:text-indent="0cm"/>
      <style:text-properties fo:font-size="16.5pt" style:font-size-asian="20pt" style:font-size-complex="20pt"/>
    </style:style>
    <style:style style:name="Chapitre_20_J-outline6" style:display-name="Chapitre J-outline6" style:family="presentation" style:parent-style-name="Chapitre_20_J-outline5">
      <style:paragraph-properties fo:margin-left="0cm" fo:margin-right="0cm" fo:margin-top="0cm" fo:margin-bottom="0cm" fo:text-indent="0cm"/>
      <style:text-properties fo:font-size="14.8999996185303pt" style:font-size-asian="20pt" style:font-size-complex="20pt"/>
    </style:style>
    <style:style style:name="Chapitre_20_J-outline7" style:display-name="Chapitre J-outline7" style:family="presentation" style:parent-style-name="Chapitre_20_J-outline6">
      <style:paragraph-properties fo:margin-left="0cm" fo:margin-right="0cm" fo:margin-top="0cm" fo:margin-bottom="0cm" fo:text-indent="0cm"/>
      <style:text-properties fo:font-size="13.1999998092651pt" style:font-size-asian="20pt" style:font-size-complex="20pt"/>
    </style:style>
    <style:style style:name="Chapitre_20_J-outline8" style:display-name="Chapitre J-outline8" style:family="presentation" style:parent-style-name="Chapitre_20_J-outline7">
      <style:paragraph-properties fo:margin-left="0cm" fo:margin-right="0cm" fo:margin-top="0cm" fo:margin-bottom="0cm" fo:text-indent="0cm"/>
      <style:text-properties fo:font-size="16.5pt" style:font-size-asian="20pt" style:font-size-complex="20pt"/>
    </style:style>
    <style:style style:name="Chapitre_20_J-outline9" style:display-name="Chapitre J-outline9" style:family="presentation" style:parent-style-name="Chapitre_20_J-outline8">
      <style:paragraph-properties fo:margin-left="0cm" fo:margin-right="0cm" fo:margin-top="0cm" fo:margin-bottom="0cm" fo:text-indent="0cm"/>
      <style:text-properties fo:font-size="16.5pt" style:font-size-asian="20pt" style:font-size-complex="20pt"/>
    </style:style>
    <style:style style:name="Chapitre_20_J-subtitle" style:display-name="Chapitre J-subtitle" style:family="presentation">
      <style:graphic-properties draw:stroke="none" draw:fill="none" draw:textarea-vertical-align="middle">
        <text:list-style style:name="Chapitre_20_J-subtitle" style:display-name="Chapitre J-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_20_J-title" style:display-name="Chapitre J-title" style:family="presentation">
      <style:graphic-properties draw:stroke="none" draw:fill="none" draw:textarea-horizontal-align="left" draw:textarea-vertical-align="top" draw:auto-grow-height="false" draw:shadow-color="#000000" style:writing-mode="lr-tb">
        <text:list-style style:name="Chapitre_20_J-title" style:display-name="Chapitre J-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loext:tab-stop-distance="0cm">
        <style:tab-stops/>
      </style:paragraph-properties>
      <style:text-properties fo:font-variant="normal" fo:text-transform="none" fo:color="#8a5301" loext:opacity="100%" style:text-outline="false" style:text-line-through-style="none" style:text-line-through-type="none" style:text-position="0% 100%" style:font-name="Open Sans Extrabold" fo:font-family="'Open Sans Extrabold'" style:font-style-name="Normal" style:font-family-generic="swiss" style:font-pitch="variable" fo:font-size="180pt" fo:letter-spacing="normal" fo:language="fr" fo:country="FR" fo:font-style="normal" fo:text-shadow="none" style:text-underline-style="none" fo:font-weight="800" style:letter-kerning="true" fo:background-color="transparent" style:font-name-asian="Microsoft YaHei" style:font-family-asian="'Microsoft YaHei'" style:font-family-generic-asian="system" style:font-pitch-asian="variable" style:font-size-asian="180pt" style:font-style-asian="normal" style:font-weight-asian="normal" style:font-name-complex="Arial" style:font-family-complex="Arial" style:font-family-generic-complex="system" style:font-pitch-complex="variable" style:font-size-complex="180pt" style:font-style-complex="normal" style:font-weight-complex="normal" style:text-emphasize="none" style:font-relief="none" style:text-overline-style="none" style:text-overline-color="font-color" fo:hyphenate="false"/>
    </style:style>
    <style:style style:name="Chapitre_20_T-background" style:display-name="Chapitre T-background" style:family="presentation">
      <style:graphic-properties draw:stroke="none" draw:fill="solid" draw:fill-color="#ffffff"/>
      <style:text-properties style:letter-kerning="true"/>
    </style:style>
    <style:style style:name="Chapitre_20_T-backgroundobjects" style:display-name="Chapitre T-backgroundobjects" style:family="presentation">
      <style:graphic-properties draw:textarea-horizontal-align="justify" draw:shadow="hidden" draw:shadow-offset-x="0.2cm" draw:shadow-offset-y="0.2cm" draw:shadow-color="#808080">
        <text:list-style style:name="Chapitre_20_T-backgroundobjects" style:display-name="Chapitre T-backgroundobjects">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Chapitre_20_T-notes" style:display-name="Chapitre T-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6pt" style:font-style-asian="normal" style:font-weight-asian="normal" style:font-name-complex="Arial"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Chapitre_20_T-outline1" style:display-name="Chapitre T-outline1" style:family="presentation">
      <style:graphic-properties draw:stroke="none" draw:fill="none" draw:textarea-horizontal-align="left" draw:auto-grow-height="false" draw:fit-to-size="false" style:shrink-to-fit="true" draw:shadow-color="#000000" style:writing-mode="lr-tb">
        <text:list-style style:name="Chapitre_20_T-outline1" style:display-name="Chapitre T-outline1">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cm" fo:margin-bottom="0cm" fo:line-height="90%" fo:text-align="start" fo:text-indent="0cm" style:punctuation-wrap="hanging" loext:tab-stop-distance="0cm">
        <style:tab-stops/>
      </style:paragraph-properties>
      <style:text-properties fo:font-variant="normal" fo:text-transform="none" fo:color="#006666" loext:opacity="100%" style:text-outline="false" style:text-line-through-style="none" style:text-line-through-type="none" style:text-position="0% 100%" style:font-name="Open Sans1" fo:font-family="'Open Sans'" fo:font-size="3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style:style>
    <style:style style:name="Chapitre_20_T-outline2" style:display-name="Chapitre T-outline2" style:family="presentation" style:parent-style-name="Chapitre_20_T-outline1">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04040" loext:opacity="100%" style:text-outline="false" style:text-line-through-style="none" style:text-line-through-type="none" style:text-position="0% 100%" style:font-name="Open Sans Semibold" fo:font-family="'Open Sans Semibold'" style:font-style-name="Normal" style:font-family-generic="swiss" style:font-pitch="variable" fo:font-size="26pt" fo:letter-spacing="normal" fo:font-style="normal" style:text-underline-style="none" fo:font-weight="600" fo:background-color="transparent" style:font-size-asian="20pt" style:font-style-asian="normal" style:font-weight-asian="normal" style:font-size-complex="20pt" style:font-style-complex="normal" style:font-weight-complex="normal"/>
    </style:style>
    <style:style style:name="Chapitre_20_T-outline3" style:display-name="Chapitre T-outline3" style:family="presentation" style:parent-style-name="Chapitre_20_T-outline2">
      <style:graphic-properties style:writing-mode="lr-tb"/>
      <style:paragraph-properties fo:margin-left="0cm" fo:margin-right="0cm" fo:margin-top="0cm" fo:margin-bottom="0cm" fo:line-height="90%" fo:text-align="start" fo:text-indent="0cm" style:punctuation-wrap="hanging"/>
      <style:text-properties fo:font-variant="normal" fo:text-transform="none" fo:color="#4c4c4c"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hapitre_20_T-outline4" style:display-name="Chapitre T-outline4" style:family="presentation" style:parent-style-name="Chapitre_20_T-outline3">
      <style:graphic-properties style:writing-mode="lr-tb"/>
      <style:paragraph-properties fo:margin-left="0cm" fo:margin-right="0cm" fo:margin-top="0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16.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Chapitre_20_T-outline5" style:display-name="Chapitre T-outline5" style:family="presentation" style:parent-style-name="Chapitre_20_T-outline4">
      <style:paragraph-properties fo:margin-left="0.495cm" fo:margin-right="0cm" fo:margin-top="0cm" fo:margin-bottom="0cm" fo:text-indent="0cm"/>
      <style:text-properties fo:font-size="16.5pt" style:font-size-asian="20pt" style:font-size-complex="20pt"/>
    </style:style>
    <style:style style:name="Chapitre_20_T-outline6" style:display-name="Chapitre T-outline6" style:family="presentation" style:parent-style-name="Chapitre_20_T-outline5">
      <style:paragraph-properties fo:margin-left="0cm" fo:margin-right="0cm" fo:margin-top="0cm" fo:margin-bottom="0cm" fo:text-indent="0cm"/>
      <style:text-properties fo:font-size="14.8999996185303pt" style:font-size-asian="20pt" style:font-size-complex="20pt"/>
    </style:style>
    <style:style style:name="Chapitre_20_T-outline7" style:display-name="Chapitre T-outline7" style:family="presentation" style:parent-style-name="Chapitre_20_T-outline6">
      <style:paragraph-properties fo:margin-left="0cm" fo:margin-right="0cm" fo:margin-top="0cm" fo:margin-bottom="0cm" fo:text-indent="0cm"/>
      <style:text-properties fo:font-size="13.1999998092651pt" style:font-size-asian="20pt" style:font-size-complex="20pt"/>
    </style:style>
    <style:style style:name="Chapitre_20_T-outline8" style:display-name="Chapitre T-outline8" style:family="presentation" style:parent-style-name="Chapitre_20_T-outline7">
      <style:paragraph-properties fo:margin-left="0cm" fo:margin-right="0cm" fo:margin-top="0cm" fo:margin-bottom="0cm" fo:text-indent="0cm"/>
      <style:text-properties fo:font-size="16.5pt" style:font-size-asian="20pt" style:font-size-complex="20pt"/>
    </style:style>
    <style:style style:name="Chapitre_20_T-outline9" style:display-name="Chapitre T-outline9" style:family="presentation" style:parent-style-name="Chapitre_20_T-outline8">
      <style:paragraph-properties fo:margin-left="0cm" fo:margin-right="0cm" fo:margin-top="0cm" fo:margin-bottom="0cm" fo:text-indent="0cm"/>
      <style:text-properties fo:font-size="16.5pt" style:font-size-asian="20pt" style:font-size-complex="20pt"/>
    </style:style>
    <style:style style:name="Chapitre_20_T-subtitle" style:display-name="Chapitre T-subtitle" style:family="presentation">
      <style:graphic-properties draw:stroke="none" draw:fill="none" draw:textarea-vertical-align="middle">
        <text:list-style style:name="Chapitre_20_T-subtitle" style:display-name="Chapitre 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_20_T-title" style:display-name="Chapitre T-title" style:family="presentation">
      <style:graphic-properties draw:stroke="none" draw:fill="none" draw:textarea-horizontal-align="left" draw:textarea-vertical-align="top" draw:auto-grow-height="false" draw:shadow-color="#000000" style:writing-mode="lr-tb">
        <text:list-style style:name="Chapitre_20_T-title" style:display-name="Chapitre 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loext:tab-stop-distance="0cm">
        <style:tab-stops/>
      </style:paragraph-properties>
      <style:text-properties fo:font-variant="normal" fo:text-transform="none" fo:color="#006666" loext:opacity="100%" style:text-outline="false" style:text-line-through-style="none" style:text-line-through-type="none" style:text-position="0% 100%" style:font-name="Open Sans Extrabold" fo:font-family="'Open Sans Extrabold'" style:font-style-name="Normal" style:font-family-generic="swiss" style:font-pitch="variable" fo:font-size="180pt" fo:letter-spacing="normal" fo:language="fr" fo:country="FR" fo:font-style="normal" fo:text-shadow="none" style:text-underline-style="none" fo:font-weight="800" style:letter-kerning="true" fo:background-color="transparent" style:font-name-asian="Microsoft YaHei" style:font-family-asian="'Microsoft YaHei'" style:font-family-generic-asian="system" style:font-pitch-asian="variable" style:font-size-asian="180pt" style:font-style-asian="normal" style:font-weight-asian="normal" style:font-name-complex="Arial" style:font-family-complex="Arial" style:font-family-generic-complex="system" style:font-pitch-complex="variable" style:font-size-complex="180pt"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text:list-style style:name="Sommaire-backgroundobjects">
          <text:list-level-style-number text:level="1" style:num-format="">
            <style:list-level-properties/>
            <style:text-properties style:use-window-font-color="true" fo:font-size="240%"/>
          </text:list-level-style-number>
          <text:list-level-style-number text:level="2" style:num-format="">
            <style:list-level-properties/>
            <style:text-properties style:use-window-font-color="true" fo:font-size="100%"/>
          </text:list-level-style-number>
          <text:list-level-style-number text:level="3" style:num-format="">
            <style:list-level-properties/>
            <style:text-properties style:use-window-font-color="true" fo:font-size="100%"/>
          </text:list-level-style-number>
          <text:list-level-style-number text:level="4" style:num-format="">
            <style:list-level-properties/>
            <style:text-properties style:use-window-font-color="true" fo:font-size="100%"/>
          </text:list-level-style-number>
          <text:list-level-style-number text:level="5" style:num-format="">
            <style:list-level-properties/>
            <style:text-properties style:use-window-font-color="true" fo:font-size="100%"/>
          </text:list-level-style-number>
          <text:list-level-style-number text:level="6" style:num-format="">
            <style:list-level-properties/>
            <style:text-properties style:use-window-font-color="true" fo:font-size="100%"/>
          </text:list-level-style-number>
          <text:list-level-style-number text:level="7" style:num-format="">
            <style:list-level-properties/>
            <style:text-properties style:use-window-font-color="true" fo:font-size="100%"/>
          </text:list-level-style-number>
          <text:list-level-style-number text:level="8" style:num-format="">
            <style:list-level-properties/>
            <style:text-properties style:use-window-font-color="true" fo:font-size="100%"/>
          </text:list-level-style-number>
          <text:list-level-style-number text:level="9" style:num-format="">
            <style:list-level-properties/>
            <style:text-properties style:use-window-font-color="true" fo:font-size="100%"/>
          </text:list-level-style-number>
          <text:list-level-style-number text:level="10" style:num-format="">
            <style:list-level-properties/>
            <style:text-properties style:use-window-font-color="true" fo:font-size="100%"/>
          </text:list-level-style-number>
        </text:list-style>
      </style:graphic-properties>
      <style:text-properties style:letter-kerning="true" fo:hyphenate="false" loext:hyphenation-no-caps="false" loext:hyphenation-no-last-word="false"/>
    </style:style>
    <style:style style:name="Sommair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3.0999984741211pt" style:font-style-asian="normal" style:font-weight-asian="normal" style:font-name-complex="Arial" style:font-family-complex="Arial" style:font-family-generic-complex="system" style:font-pitch-complex="variable" style:font-size-complex="33.0999984741211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textarea-horizontal-align="justify" draw:textarea-vertical-align="top" draw:auto-grow-height="false" draw:fit-to-size="false" style:shrink-to-fit="true" draw:shadow-color="#000000" style:writing-mode="lr-tb">
        <text:list-style style:name="Sommaire-outline1">
          <text:list-level-style-number text:level="1" style:num-format="">
            <style:list-level-properties/>
            <style:text-properties style:use-window-font-color="true" fo:font-size="240%"/>
          </text:list-level-style-number>
          <text:list-level-style-number text:level="2" style:num-format="">
            <style:list-level-properties/>
            <style:text-properties style:use-window-font-color="true" fo:font-size="100%"/>
          </text:list-level-style-number>
          <text:list-level-style-number text:level="3" style:num-format="">
            <style:list-level-properties/>
            <style:text-properties style:use-window-font-color="true" fo:font-size="100%"/>
          </text:list-level-style-number>
          <text:list-level-style-number text:level="4" style:num-format="">
            <style:list-level-properties/>
            <style:text-properties style:use-window-font-color="true" fo:font-size="100%"/>
          </text:list-level-style-number>
          <text:list-level-style-number text:level="5" style:num-format="">
            <style:list-level-properties/>
            <style:text-properties style:use-window-font-color="true" fo:font-size="100%"/>
          </text:list-level-style-number>
          <text:list-level-style-number text:level="6" style:num-format="">
            <style:list-level-properties/>
            <style:text-properties style:use-window-font-color="true" fo:font-size="100%"/>
          </text:list-level-style-number>
          <text:list-level-style-number text:level="7" style:num-format="">
            <style:list-level-properties/>
            <style:text-properties style:use-window-font-color="true" fo:font-size="100%"/>
          </text:list-level-style-number>
          <text:list-level-style-number text:level="8" style:num-format="">
            <style:list-level-properties/>
            <style:text-properties style:use-window-font-color="true" fo:font-size="100%"/>
          </text:list-level-style-number>
          <text:list-level-style-number text:level="9" style:num-format="">
            <style:list-level-properties/>
            <style:text-properties style:use-window-font-color="true" fo:font-size="100%"/>
          </text:list-level-style-number>
          <text:list-level-style-number text:level="10" style:num-format="">
            <style:list-level-properties/>
            <style:text-properties style:use-window-font-color="true" fo:font-size="100%"/>
          </text:list-level-style-number>
        </text:list-style>
      </style:graphic-properties>
      <style:paragraph-properties fo:margin-left="1.25cm" fo:margin-right="0.1cm" fo:margin-top="0cm" fo:margin-bottom="0.3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 Semibold" fo:font-family="'Open Sans Semibold'" style:font-style-name="Normal" style:font-family-generic="swiss" style:font-pitch="variable" fo:font-size="32pt" fo:letter-spacing="normal" fo:language="fr" fo:country="FR"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Sommaire-outline2" style:family="presentation" style:parent-style-name="Sommaire-outline1">
      <style:graphic-properties style:writing-mode="lr-tb"/>
      <style:paragraph-properties fo:margin-left="0cm" fo:margin-right="0cm" fo:margin-top="0cm" fo:margin-bottom="0.7cm" fo:line-height="90%" fo:text-align="start" fo:text-indent="0cm" style:punctuation-wrap="hanging"/>
      <style:text-properties fo:font-variant="normal" fo:text-transform="none" fo:color="#404040" loext:opacity="100%" style:text-outline="false" style:text-line-through-style="none" style:text-line-through-type="none" style:text-position="0% 100%" style:font-name="Open Sans Semibold" fo:font-family="'Open Sans Semibold'" style:font-style-name="Normal" style:font-family-generic="swiss" style:font-pitch="variable" fo:font-size="20pt" fo:letter-spacing="normal" fo:font-style="normal" style:text-underline-style="none" fo:font-weight="600" fo:background-color="transparent" style:font-size-asian="20pt" style:font-style-asian="normal" style:font-weight-asian="normal" style:font-size-complex="20pt" style:font-style-complex="normal" style:font-weight-complex="normal"/>
    </style:style>
    <style:style style:name="Sommaire-outline3" style:family="presentation" style:parent-style-name="Sommaire-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style:use-window-font-color="true" loext:opacity="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Sommaire-outline4" style:family="presentation" style:parent-style-name="Sommaire-outline3">
      <style:graphic-properties style:writing-mode="lr-tb"/>
      <style:paragraph-properties fo:margin-left="0cm" fo:margin-right="0cm" fo:margin-top="0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Sommaire-outline5" style:family="presentation" style:parent-style-name="Sommaire-outline4">
      <style:paragraph-properties fo:margin-left="0cm" fo:margin-right="0cm" fo:margin-top="0cm" fo:margin-bottom="0cm" fo:text-indent="0cm"/>
      <style:text-properties fo:font-size="14pt" style:font-size-asian="20pt" style:font-size-complex="20pt"/>
    </style:style>
    <style:style style:name="Sommaire-outline6" style:family="presentation" style:parent-style-name="Sommaire-outline5">
      <style:paragraph-properties fo:margin-left="0cm" fo:margin-right="0cm" fo:margin-top="0cm" fo:margin-bottom="0cm" fo:text-indent="0cm"/>
      <style:text-properties fo:font-size="14pt" style:font-size-asian="20pt" style:font-size-complex="20pt"/>
    </style:style>
    <style:style style:name="Sommaire-outline7" style:family="presentation" style:parent-style-name="Sommaire-outline6">
      <style:paragraph-properties fo:margin-left="0cm" fo:margin-right="0cm" fo:margin-top="0.244cm" fo:margin-bottom="0cm" fo:text-indent="0cm"/>
      <style:text-properties fo:font-size="12pt" style:font-size-asian="20pt" style:font-size-complex="20pt"/>
    </style:style>
    <style:style style:name="Sommaire-outline8" style:family="presentation" style:parent-style-name="Sommaire-outline7">
      <style:paragraph-properties fo:margin-left="0cm" fo:margin-right="0cm" fo:margin-top="0.247cm" fo:margin-bottom="0cm" fo:text-indent="0cm"/>
      <style:text-properties fo:font-size="16.5pt" style:font-size-asian="20pt" style:font-size-complex="20pt"/>
    </style:style>
    <style:style style:name="Sommaire-outline9" style:family="presentation" style:parent-style-name="Sommaire-outline8">
      <style:paragraph-properties fo:margin-left="0cm" fo:margin-right="0cm" fo:margin-top="0.247cm" fo:margin-bottom="0cm" fo:text-indent="0cm"/>
      <style:text-properties fo:font-size="16.5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horizontal-align="left" draw:textarea-vertical-align="top" draw:auto-grow-height="false" style:writing-mode="lr-tb">
        <text:list-style style:name="Sommai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ase_20_G2-background" style:display-name="Base G2-background" style:family="presentation">
      <style:graphic-properties draw:stroke="none" draw:fill="solid" draw:fill-color="#ffffff"/>
      <style:text-properties style:letter-kerning="true"/>
    </style:style>
    <style:style style:name="Base_20_G2-backgroundobjects" style:display-name="Base G2-backgroundobjects" style:family="presentation">
      <style:graphic-properties draw:textarea-horizontal-align="justify" draw:shadow="hidden" draw:shadow-offset-x="0.2cm" draw:shadow-offset-y="0.2cm" draw:shadow-color="#808080">
        <text:list-style style:name="Base_20_G2-backgroundobjects" style:display-name="Base G2-backgroundobjects">
          <text:list-level-style-bullet text:level="1" text:bullet-char="|">
            <style:list-level-properties text:space-before="-0.6cm" text:min-label-width="0.6cm"/>
            <style:text-properties fo:font-family="Marianne" style:font-style-name="Regular" fo:color="#268dff" fo:font-size="100%"/>
          </text:list-level-style-bullet>
          <text:list-level-style-bullet text:level="2" text:bullet-char="|">
            <style:list-level-properties text:space-before="-0.6cm" text:min-label-width="0.6cm"/>
            <style:text-properties fo:font-family="Marianne" style:font-style-name="Regular" fo:color="#ae48c0" fo:font-size="100%"/>
          </text:list-level-style-bullet>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Base_20_G2-notes" style:display-name="Base G2-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3.0999984741211pt" style:font-style-asian="normal" style:font-weight-asian="normal" style:font-name-complex="Arial" style:font-family-complex="Arial" style:font-family-generic-complex="system" style:font-pitch-complex="variable" style:font-size-complex="33.0999984741211pt" style:font-style-complex="normal" style:font-weight-complex="normal" style:text-emphasize="none" style:font-relief="none" style:text-overline-style="none" style:text-overline-color="font-color"/>
    </style:style>
    <style:style style:name="Base_20_G2-outline1" style:display-name="Base G2-outline1" style:family="presentation">
      <style:graphic-properties draw:stroke="none" draw:fill="none" draw:textarea-horizontal-align="left" draw:auto-grow-height="false" draw:fit-to-size="false" style:shrink-to-fit="true" draw:shadow-color="#000000" style:writing-mode="lr-tb">
        <text:list-style style:name="Base_20_G2-outline1" style:display-name="Base G2-outline1">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73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 Semibold" fo:font-family="'Open Sans Semibold'" style:font-style-name="Normal" style:font-family-generic="swiss" style:font-pitch="variable" fo:font-size="22pt" fo:letter-spacing="normal" fo:language="fr" fo:country="FR"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Base_20_G2-outline2" style:display-name="Base G2-outline2" style:family="presentation" style:parent-style-name="Base_20_G2-outline1">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2674dd" loext:opacity="100%" style:text-outline="false" style:text-line-through-style="none" style:text-line-through-type="none" style:text-position="0% 100%" style:font-name="Open Sans1" fo:font-family="'Open Sans'" fo:font-size="20pt" fo:letter-spacing="normal" fo:font-style="normal" style:text-underline-style="none" fo:font-weight="bold" fo:background-color="transparent" style:font-size-asian="20pt" style:font-style-asian="normal" style:font-weight-asian="normal" style:font-size-complex="20pt" style:font-style-complex="normal" style:font-weight-complex="normal" fo:hyphenate="false" loext:hyphenation-no-caps="false" loext:hyphenation-no-last-word="false"/>
    </style:style>
    <style:style style:name="Base_20_G2-outline3" style:display-name="Base G2-outline3" style:family="presentation" style:parent-style-name="Base_20_G2-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ase_20_G2-outline4" style:display-name="Base G2-outline4" style:family="presentation" style:parent-style-name="Base_20_G2-outline3">
      <style:graphic-properties style:writing-mode="lr-tb"/>
      <style:paragraph-properties fo:margin-left="0.2cm" fo:margin-right="0cm" fo:margin-top="0.247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hyphenation-no-caps="false" loext:hyphenation-no-last-word="false">
        <loext:char-complex-color loext:theme-type="dark1" loext:color-type="theme"/>
      </style:text-properties>
    </style:style>
    <style:style style:name="Base_20_G2-outline5" style:display-name="Base G2-outline5" style:family="presentation" style:parent-style-name="Base_20_G2-outline4">
      <style:paragraph-properties fo:margin-left="0.2cm" fo:margin-right="0cm" fo:margin-top="0.247cm" fo:margin-bottom="0cm" fo:text-indent="0cm"/>
      <style:text-properties fo:font-size="16pt" style:font-size-asian="20pt" style:font-size-complex="20pt" fo:hyphenate="false" loext:hyphenation-no-caps="false" loext:hyphenation-no-last-word="false"/>
    </style:style>
    <style:style style:name="Base_20_G2-outline6" style:display-name="Base G2-outline6" style:family="presentation" style:parent-style-name="Base_20_G2-outline5">
      <style:graphic-properties draw:auto-grow-height="true"/>
      <style:paragraph-properties fo:margin-left="0cm" fo:margin-right="0cm" fo:margin-top="0.247cm" fo:margin-bottom="0cm" fo:text-indent="0cm" loext:tab-stop-distance="0cm">
        <style:tab-stops/>
      </style:paragraph-properties>
      <style:text-properties fo:font-size="14pt" fo:font-style="italic" style:font-size-asian="20pt" style:font-size-complex="20pt" fo:hyphenate="false" loext:hyphenation-no-caps="false" loext:hyphenation-no-last-word="false"/>
    </style:style>
    <style:style style:name="Base_20_G2-outline7" style:display-name="Base G2-outline7" style:family="presentation" style:parent-style-name="Base_20_G2-outline6">
      <style:paragraph-properties fo:margin-left="0cm" fo:margin-right="0cm" fo:margin-top="0.244cm" fo:margin-bottom="0cm" fo:text-indent="0cm"/>
      <style:text-properties fo:font-size="12pt" style:font-size-asian="20pt" style:font-size-complex="20pt"/>
    </style:style>
    <style:style style:name="Base_20_G2-outline8" style:display-name="Base G2-outline8" style:family="presentation" style:parent-style-name="Base_20_G2-outline7">
      <style:paragraph-properties fo:margin-left="0cm" fo:margin-right="0cm" fo:margin-top="0.247cm" fo:margin-bottom="0cm" fo:text-indent="0cm"/>
      <style:text-properties fo:font-size="16.5pt" style:font-size-asian="20pt" style:font-size-complex="20pt"/>
    </style:style>
    <style:style style:name="Base_20_G2-outline9" style:display-name="Base G2-outline9" style:family="presentation" style:parent-style-name="Base_20_G2-outline8">
      <style:paragraph-properties fo:margin-left="0cm" fo:margin-right="0cm" fo:margin-top="0.247cm" fo:margin-bottom="0cm" fo:text-indent="0cm"/>
      <style:text-properties fo:font-size="16.5pt" style:font-size-asian="20pt" style:font-size-complex="20pt"/>
    </style:style>
    <style:style style:name="Base_20_G2-subtitle" style:display-name="Base G2-subtitle" style:family="presentation">
      <style:graphic-properties draw:stroke="none" draw:fill="none" draw:textarea-vertical-align="middle">
        <text:list-style style:name="Base_20_G2-subtitle" style:display-name="Base G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G2-title" style:display-name="Base G2-title" style:family="presentation">
      <style:graphic-properties draw:stroke="none" draw:fill="none" draw:textarea-horizontal-align="left" draw:textarea-vertical-align="top" draw:auto-grow-height="false" style:writing-mode="lr-tb">
        <text:list-style style:name="Base_20_G2-title" style:display-name="Base G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Merci_5f_2-background" style:display-name="Merci_2-background" style:family="presentation">
      <style:graphic-properties draw:stroke="none" draw:fill="none" draw:gradient-step-count="0" loext:fill-use-slide-background="false"/>
      <style:text-properties style:letter-kerning="true"/>
    </style:style>
    <style:style style:name="Merci_5f_2-backgroundobjects" style:display-name="Merci_2-backgroundobjects" style:family="presentation">
      <style:graphic-properties draw:textarea-horizontal-align="justify" draw:shadow="hidden" draw:shadow-offset-x="0.2cm" draw:shadow-offset-y="0.2cm" draw:shadow-color="#808080"/>
      <style:text-properties style:letter-kerning="true"/>
    </style:style>
    <style:style style:name="Merci_5f_2-notes" style:display-name="Merci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Open Sans4" fo:font-family="'Open Sans'"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rci_5f_2-outline1" style:display-name="Merci_2-outline1" style:family="presentation">
      <style:graphic-properties draw:stroke="none" draw:fill="none" draw:auto-grow-height="false" draw:fit-to-size="false" style:shrink-to-fit="true">
        <text:list-style style:name="Merci_5f_2-outline1" style:display-name="Merci_2-outline1">
          <text:list-level-style-number text:level="1" style:num-format="">
            <style:list-level-properties/>
            <style:text-properties style:use-window-font-color="true" fo:font-size="100%"/>
          </text:list-level-style-number>
          <text:list-level-style-number text:level="2" style:num-format="">
            <style:list-level-properties/>
            <style:text-properties style:use-window-font-color="true" fo:font-size="100%"/>
          </text:list-level-style-number>
          <text:list-level-style-number text:level="3" style:num-format="">
            <style:list-level-properties/>
            <style:text-properties style:use-window-font-color="true" fo:font-size="100%"/>
          </text:list-level-style-number>
          <text:list-level-style-number text:level="4" style:num-format="">
            <style:list-level-properties/>
            <style:text-properties style:use-window-font-color="true" fo:font-size="100%"/>
          </text:list-level-style-number>
          <text:list-level-style-number text:level="5" style:num-format="">
            <style:list-level-properties/>
            <style:text-properties style:use-window-font-color="true" fo:font-size="25%"/>
          </text:list-level-style-number>
          <text:list-level-style-number text:level="6" style:num-format="">
            <style:list-level-properties/>
            <style:text-properties style:use-window-font-color="true" fo:font-size="25%"/>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03cm" fo:margin-bottom="0cm" fo:text-indent="0cm"/>
      <style:text-properties fo:font-variant="normal" fo:text-transform="none" fo:color="#ffffff" loext:opacity="100%" style:text-outline="false" style:text-line-through-style="none" style:text-line-through-type="none" style:font-name="Open Sans" fo:font-family="'Open Sans'" style:font-style-name="Normal" style:font-family-generic="swiss" style:font-pitch="variable" fo:font-size="12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Merci_5f_2-outline2" style:display-name="Merci_2-outline2" style:family="presentation" style:parent-style-name="Merci_5f_2-outline1">
      <style:paragraph-properties fo:margin-left="0cm" fo:margin-right="0cm" fo:margin-top="0.4cm" fo:margin-bottom="0cm" fo:text-indent="0cm"/>
      <style:text-properties fo:font-size="12pt" fo:font-weight="normal" style:font-size-asian="12pt" style:font-size-complex="12pt"/>
    </style:style>
    <style:style style:name="Merci_5f_2-outline3" style:display-name="Merci_2-outline3" style:family="presentation" style:parent-style-name="Merci_5f_2-outline2">
      <style:paragraph-properties fo:margin-left="0cm" fo:margin-right="0cm" fo:margin-top="0.3cm" fo:margin-bottom="0cm" fo:text-indent="0cm"/>
      <style:text-properties fo:font-size="12pt" style:font-size-asian="12pt" style:font-size-complex="12pt"/>
    </style:style>
    <style:style style:name="Merci_5f_2-outline4" style:display-name="Merci_2-outline4" style:family="presentation" style:parent-style-name="Merci_5f_2-outline3">
      <style:paragraph-properties fo:margin-left="0cm" fo:margin-right="0cm" fo:margin-top="0.2cm" fo:margin-bottom="0cm" fo:text-indent="0cm"/>
      <style:text-properties fo:font-size="20pt" style:font-size-asian="20pt" style:font-size-complex="20pt" fo:hyphenate="false" loext:hyphenation-no-caps="false" loext:hyphenation-no-last-word="false"/>
    </style:style>
    <style:style style:name="Merci_5f_2-outline5" style:display-name="Merci_2-outline5" style:family="presentation" style:parent-style-name="Merci_5f_2-outline4">
      <style:paragraph-properties fo:margin-left="0cm" fo:margin-right="0cm" fo:margin-top="0.1cm" fo:margin-bottom="0cm" fo:text-indent="0cm"/>
      <style:text-properties fo:font-size="20pt" style:font-size-asian="20pt" style:font-size-complex="20pt"/>
    </style:style>
    <style:style style:name="Merci_5f_2-outline6" style:display-name="Merci_2-outline6" style:family="presentation" style:parent-style-name="Merci_5f_2-outline5">
      <style:paragraph-properties fo:margin-left="0cm" fo:margin-right="0cm" fo:margin-top="0.1cm" fo:margin-bottom="0cm" fo:text-indent="0cm"/>
      <style:text-properties fo:font-size="12pt" style:font-size-asian="12pt" style:font-size-complex="12pt"/>
    </style:style>
    <style:style style:name="Merci_5f_2-outline7" style:display-name="Merci_2-outline7" style:family="presentation" style:parent-style-name="Merci_5f_2-outline6">
      <style:paragraph-properties fo:margin-left="0cm" fo:margin-right="0cm" fo:margin-top="0.1cm" fo:margin-bottom="0cm" fo:text-indent="0cm"/>
      <style:text-properties fo:font-size="20pt" style:font-size-asian="20pt" style:font-size-complex="20pt"/>
    </style:style>
    <style:style style:name="Merci_5f_2-outline8" style:display-name="Merci_2-outline8" style:family="presentation" style:parent-style-name="Merci_5f_2-outline7">
      <style:paragraph-properties fo:margin-left="0cm" fo:margin-right="0cm" fo:margin-top="0.1cm" fo:margin-bottom="0cm" fo:text-indent="0cm"/>
      <style:text-properties fo:font-size="20pt" style:font-size-asian="20pt" style:font-size-complex="20pt"/>
    </style:style>
    <style:style style:name="Merci_5f_2-outline9" style:display-name="Merci_2-outline9" style:family="presentation" style:parent-style-name="Merci_5f_2-outline8">
      <style:paragraph-properties fo:margin-left="0cm" fo:margin-right="0cm" fo:margin-top="0.1cm" fo:margin-bottom="0cm" fo:text-indent="0cm"/>
      <style:text-properties fo:font-size="20pt" style:font-size-asian="20pt" style:font-size-complex="20pt"/>
    </style:style>
    <style:style style:name="Merci_5f_2-subtitle" style:display-name="Merci_2-subtitle" style:family="presentation">
      <style:graphic-properties draw:stroke="none" draw:fill="none" draw:textarea-vertical-align="middle">
        <text:list-style style:name="Merci_5f_2-subtitle" style:display-name="Merci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rci_5f_2-title" style:display-name="Merci_2-title" style:family="presentation">
      <style:graphic-properties draw:stroke="none" draw:fill="none" draw:textarea-vertical-align="top">
        <text:list-style style:name="Merci_5f_2-title" style:display-name="Merci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Open Sans2" fo:font-family="'Open Sans'" style:font-style-name="Bold" style:font-family-generic="swiss" style:font-pitch="variable" fo:font-size="28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normal" style:font-weight-asian="bold" style:font-name-complex="Arial" style:font-family-complex="Ari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Edito_5f_2-background" style:display-name="Edito_2-background" style:family="presentation">
      <style:graphic-properties draw:stroke="none" draw:fill="gradient" draw:fill-gradient-name="Blue_20_Touch" draw:gradient-step-count="0"/>
      <style:text-properties style:letter-kerning="true"/>
    </style:style>
    <style:style style:name="Edito_5f_2-backgroundobjects" style:display-name="Edito_2-backgroundobjects" style:family="presentation">
      <style:graphic-properties draw:textarea-horizontal-align="justify" draw:shadow="hidden" draw:shadow-offset-x="0.2cm" draw:shadow-offset-y="0.2cm" draw:shadow-color="#808080"/>
      <style:text-properties style:letter-kerning="true"/>
    </style:style>
    <style:style style:name="Edito_5f_2-notes" style:display-name="Edito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Open Sans4" fo:font-family="'Open Sans'"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dito_5f_2-outline1" style:display-name="Edito_2-outline1" style:family="presentation">
      <style:graphic-properties draw:stroke="none" draw:fill="none" draw:auto-grow-height="false" draw:fit-to-size="false" style:shrink-to-fit="true" draw:shadow-color="#000000">
        <text:list-style style:name="Edito_5f_2-outline1" style:display-name="Edito_2-outline1">
          <text:list-level-style-number text:level="1" style:num-format="">
            <style:list-level-properties/>
            <style:text-properties style:use-window-font-color="true" fo:font-size="45%"/>
          </text:list-level-style-number>
          <text:list-level-style-bullet text:level="2" text:bullet-char="|">
            <style:list-level-properties text:space-before="0.3cm"/>
            <style:text-properties fo:font-family="OpenSymbol" style:font-style-name="Regular" fo:color="#9827b5" fo:font-size="100%"/>
          </text:list-level-style-bullet>
          <text:list-level-style-number text:level="3" style:num-format="">
            <style:list-level-properties text:space-before="0.3cm"/>
            <style:text-properties fo:color="#268dff" fo:font-size="45%"/>
          </text:list-level-style-number>
          <text:list-level-style-number text:level="4" style:num-format="">
            <style:list-level-properties text:space-before="0.3cm"/>
            <style:text-properties style:use-window-font-color="true" fo:font-size="75%"/>
          </text:list-level-style-number>
          <text:list-level-style-number text:level="5" style:num-format="">
            <style:list-level-properties text:space-before="0.3cm"/>
            <style:text-properties style:use-window-font-color="true" fo:font-size="45%"/>
          </text:list-level-style-number>
          <text:list-level-style-number text:level="6" style:num-format="">
            <style:list-level-properties text:space-before="0.3cm"/>
            <style:text-properties style:use-window-font-color="true" fo:font-size="45%"/>
          </text:list-level-style-number>
          <text:list-level-style-number text:level="7" style:num-format="">
            <style:list-level-properties text:space-before="0.3cm"/>
            <style:text-properties style:use-window-font-color="true" fo:font-size="45%"/>
          </text:list-level-style-number>
          <text:list-level-style-number text:level="8" style:num-format="">
            <style:list-level-properties text:space-before="0.3cm"/>
            <style:text-properties style:use-window-font-color="true" fo:font-size="45%"/>
          </text:list-level-style-number>
          <text:list-level-style-number text:level="9" style:num-format="">
            <style:list-level-properties text:space-before="0.3cm"/>
            <style:text-properties style:use-window-font-color="true" fo:font-size="45%"/>
          </text:list-level-style-number>
          <text:list-level-style-number text:level="10" style:num-format="">
            <style:list-level-properties text:space-before="0.3cm"/>
            <style:text-properties style:use-window-font-color="true" fo:font-size="45%"/>
          </text:list-level-style-number>
        </text:list-style>
      </style:graphic-properties>
      <style:paragraph-properties fo:margin-left="0cm" fo:margin-right="0cm" fo:margin-top="0.248cm" fo:margin-bottom="0cm" fo:line-height="115%"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loext:hyphenation-no-caps="false" loext:hyphenation-no-last-word="false"/>
    </style:style>
    <style:style style:name="Edito_5f_2-outline2" style:display-name="Edito_2-outline2" style:family="presentation" style:parent-style-name="Edito_5f_2-outline1">
      <style:paragraph-properties fo:margin-left="0cm" fo:margin-right="0cm" fo:margin-top="0.4cm" fo:margin-bottom="0cm" fo:text-indent="0cm"/>
      <style:text-properties fo:font-size="14pt" style:font-size-asian="28pt" style:font-size-complex="28pt" fo:hyphenate="false" loext:hyphenation-no-caps="false" loext:hyphenation-no-last-word="false"/>
    </style:style>
    <style:style style:name="Edito_5f_2-outline3" style:display-name="Edito_2-outline3" style:family="presentation" style:parent-style-name="Edito_5f_2-outline2">
      <style:paragraph-properties fo:margin-left="0cm" fo:margin-right="0cm" fo:margin-top="0.3cm" fo:margin-bottom="0cm" fo:text-indent="0cm"/>
      <style:text-properties fo:font-size="12pt" style:font-size-asian="24pt" style:font-size-complex="24pt" fo:hyphenate="false" loext:hyphenation-no-caps="false" loext:hyphenation-no-last-word="false"/>
    </style:style>
    <style:style style:name="Edito_5f_2-outline4" style:display-name="Edito_2-outline4" style:family="presentation" style:parent-style-name="Edito_5f_2-outline3">
      <style:paragraph-properties fo:margin-left="0cm" fo:margin-right="0cm" fo:margin-top="0.2cm" fo:margin-bottom="0cm" fo:text-indent="0cm"/>
      <style:text-properties fo:font-size="12pt" style:font-size-asian="20pt" style:font-size-complex="20pt" fo:hyphenate="false" loext:hyphenation-no-caps="false" loext:hyphenation-no-last-word="false"/>
    </style:style>
    <style:style style:name="Edito_5f_2-outline5" style:display-name="Edito_2-outline5" style:family="presentation" style:parent-style-name="Edito_5f_2-outline4">
      <style:paragraph-properties fo:margin-left="0cm" fo:margin-right="0cm" fo:margin-top="0.1cm" fo:margin-bottom="0cm" fo:text-indent="0cm"/>
      <style:text-properties fo:font-size="12pt" style:font-size-asian="20pt" style:font-size-complex="20pt" fo:hyphenate="false" loext:hyphenation-no-caps="false" loext:hyphenation-no-last-word="false"/>
    </style:style>
    <style:style style:name="Edito_5f_2-outline6" style:display-name="Edito_2-outline6" style:family="presentation" style:parent-style-name="Edito_5f_2-outline5">
      <style:paragraph-properties fo:margin-left="0cm" fo:margin-right="0cm" fo:margin-top="0.1cm" fo:margin-bottom="0cm" fo:text-indent="0cm"/>
      <style:text-properties fo:font-size="20pt" style:font-size-asian="20pt" style:font-size-complex="20pt" fo:hyphenate="false" loext:hyphenation-no-caps="false" loext:hyphenation-no-last-word="false"/>
    </style:style>
    <style:style style:name="Edito_5f_2-outline7" style:display-name="Edito_2-outline7" style:family="presentation" style:parent-style-name="Edito_5f_2-outline6">
      <style:paragraph-properties fo:margin-left="0cm" fo:margin-right="0cm" fo:margin-top="0.1cm" fo:margin-bottom="0cm" fo:text-indent="0cm"/>
      <style:text-properties fo:font-size="20pt" style:font-size-asian="20pt" style:font-size-complex="20pt" fo:hyphenate="false" loext:hyphenation-no-caps="false" loext:hyphenation-no-last-word="false"/>
    </style:style>
    <style:style style:name="Edito_5f_2-outline8" style:display-name="Edito_2-outline8" style:family="presentation" style:parent-style-name="Edito_5f_2-outline7">
      <style:paragraph-properties fo:margin-left="0cm" fo:margin-right="0cm" fo:margin-top="0.1cm" fo:margin-bottom="0cm" fo:text-indent="0cm"/>
      <style:text-properties fo:font-size="20pt" style:font-size-asian="20pt" style:font-size-complex="20pt"/>
    </style:style>
    <style:style style:name="Edito_5f_2-outline9" style:display-name="Edito_2-outline9" style:family="presentation" style:parent-style-name="Edito_5f_2-outline8">
      <style:paragraph-properties fo:margin-left="0cm" fo:margin-right="0cm" fo:margin-top="0.1cm" fo:margin-bottom="0cm" fo:text-indent="0cm"/>
      <style:text-properties fo:font-size="20pt" style:font-size-asian="20pt" style:font-size-complex="20pt"/>
    </style:style>
    <style:style style:name="Edito_5f_2-subtitle" style:display-name="Edito_2-subtitle" style:family="presentation">
      <style:graphic-properties draw:stroke="none" draw:fill="none" draw:textarea-vertical-align="middle">
        <text:list-style style:name="Edito_5f_2-subtitle" style:display-name="Edito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dito_5f_2-title" style:display-name="Edito_2-title" style:family="presentation">
      <style:graphic-properties draw:stroke="none" draw:fill="none" draw:textarea-vertical-align="top">
        <text:list-style style:name="Edito_5f_2-title" style:display-name="Edito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Open Sans4" fo:font-family="'Open Sans'" style:font-family-generic="swiss" style:font-pitch="variable" fo:font-size="28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8pt" style:font-style-asian="normal" style:font-weight-asian="bold" style:font-name-complex="Arial" style:font-family-complex="Ari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Base_20_G1-background" style:display-name="Base G1-background" style:family="presentation">
      <style:graphic-properties draw:stroke="none" draw:fill="solid" draw:fill-color="#ffffff"/>
      <style:text-properties style:letter-kerning="true"/>
    </style:style>
    <style:style style:name="Base_20_G1-backgroundobjects" style:display-name="Base G1-backgroundobjects" style:family="presentation">
      <style:graphic-properties draw:textarea-horizontal-align="justify" draw:shadow="hidden" draw:shadow-offset-x="0.2cm" draw:shadow-offset-y="0.2cm" draw:shadow-color="#808080">
        <text:list-style style:name="Base_20_G1-backgroundobjects" style:display-name="Base G1-backgroundobjects">
          <text:list-level-style-bullet text:level="1" text:bullet-char="|">
            <style:list-level-properties text:space-before="-0.6cm" text:min-label-width="0.6cm"/>
            <style:text-properties fo:font-family="Marianne" style:font-style-name="Regular" fo:color="#268dff" fo:font-size="100%"/>
          </text:list-level-style-bullet>
          <text:list-level-style-bullet text:level="2" text:bullet-char="|">
            <style:list-level-properties text:space-before="-0.6cm" text:min-label-width="0.6cm"/>
            <style:text-properties fo:font-family="Marianne" style:font-style-name="Regular" fo:color="#ae48c0" fo:font-size="100%"/>
          </text:list-level-style-bullet>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Base_20_G1-notes" style:display-name="Base G1-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3.0999984741211pt" style:font-style-asian="normal" style:font-weight-asian="normal" style:font-name-complex="Arial" style:font-family-complex="Arial" style:font-family-generic-complex="system" style:font-pitch-complex="variable" style:font-size-complex="33.0999984741211pt" style:font-style-complex="normal" style:font-weight-complex="normal" style:text-emphasize="none" style:font-relief="none" style:text-overline-style="none" style:text-overline-color="font-color"/>
    </style:style>
    <style:style style:name="Base_20_G1-outline1" style:display-name="Base G1-outline1" style:family="presentation">
      <style:graphic-properties draw:stroke="none" draw:fill="none" draw:textarea-horizontal-align="left" draw:auto-grow-height="false" draw:fit-to-size="false" style:shrink-to-fit="true" draw:shadow-color="#000000" style:writing-mode="lr-tb">
        <text:list-style style:name="Base_20_G1-outline1" style:display-name="Base G1-outline1">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73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 Semibold" fo:font-family="'Open Sans Semibold'" style:font-style-name="Normal" style:font-family-generic="swiss" style:font-pitch="variable" fo:font-size="22pt" fo:letter-spacing="normal" fo:language="fr" fo:country="FR"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Base_20_G1-outline2" style:display-name="Base G1-outline2" style:family="presentation" style:parent-style-name="Base_20_G1-outline1">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2674dd" loext:opacity="100%" style:text-outline="false" style:text-line-through-style="none" style:text-line-through-type="none" style:text-position="0% 100%" style:font-name="Open Sans1" fo:font-family="'Open Sans'" fo:font-size="20pt" fo:letter-spacing="normal" fo:font-style="normal" style:text-underline-style="none" fo:font-weight="bold" fo:background-color="transparent" style:font-size-asian="20pt" style:font-style-asian="normal" style:font-weight-asian="normal" style:font-size-complex="20pt" style:font-style-complex="normal" style:font-weight-complex="normal" fo:hyphenate="false" loext:hyphenation-no-caps="false" loext:hyphenation-no-last-word="false"/>
    </style:style>
    <style:style style:name="Base_20_G1-outline3" style:display-name="Base G1-outline3" style:family="presentation" style:parent-style-name="Base_20_G1-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ase_20_G1-outline4" style:display-name="Base G1-outline4" style:family="presentation" style:parent-style-name="Base_20_G1-outline3">
      <style:graphic-properties style:writing-mode="lr-tb"/>
      <style:paragraph-properties fo:margin-left="0.2cm" fo:margin-right="0cm" fo:margin-top="0.247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hyphenation-no-caps="false" loext:hyphenation-no-last-word="false">
        <loext:char-complex-color loext:theme-type="dark1" loext:color-type="theme"/>
      </style:text-properties>
    </style:style>
    <style:style style:name="Base_20_G1-outline5" style:display-name="Base G1-outline5" style:family="presentation" style:parent-style-name="Base_20_G1-outline4">
      <style:paragraph-properties fo:margin-left="0.2cm" fo:margin-right="0cm" fo:margin-top="0.247cm" fo:margin-bottom="0cm" fo:text-indent="0cm"/>
      <style:text-properties fo:font-size="16pt" style:font-size-asian="20pt" style:font-size-complex="20pt" fo:hyphenate="false" loext:hyphenation-no-caps="false" loext:hyphenation-no-last-word="false"/>
    </style:style>
    <style:style style:name="Base_20_G1-outline6" style:display-name="Base G1-outline6" style:family="presentation" style:parent-style-name="Base_20_G1-outline5">
      <style:graphic-properties draw:auto-grow-height="true"/>
      <style:paragraph-properties fo:margin-left="0cm" fo:margin-right="0cm" fo:margin-top="0.247cm" fo:margin-bottom="0cm" fo:text-indent="0cm" loext:tab-stop-distance="0cm">
        <style:tab-stops/>
      </style:paragraph-properties>
      <style:text-properties fo:font-size="14pt" fo:font-style="italic" style:font-size-asian="20pt" style:font-size-complex="20pt" fo:hyphenate="false" loext:hyphenation-no-caps="false" loext:hyphenation-no-last-word="false"/>
    </style:style>
    <style:style style:name="Base_20_G1-outline7" style:display-name="Base G1-outline7" style:family="presentation" style:parent-style-name="Base_20_G1-outline6">
      <style:paragraph-properties fo:margin-left="0cm" fo:margin-right="0cm" fo:margin-top="0.244cm" fo:margin-bottom="0cm" fo:text-indent="0cm"/>
      <style:text-properties fo:font-size="12pt" style:font-size-asian="20pt" style:font-size-complex="20pt"/>
    </style:style>
    <style:style style:name="Base_20_G1-outline8" style:display-name="Base G1-outline8" style:family="presentation" style:parent-style-name="Base_20_G1-outline7">
      <style:paragraph-properties fo:margin-left="0cm" fo:margin-right="0cm" fo:margin-top="0.247cm" fo:margin-bottom="0cm" fo:text-indent="0cm"/>
      <style:text-properties fo:font-size="16.5pt" style:font-size-asian="20pt" style:font-size-complex="20pt"/>
    </style:style>
    <style:style style:name="Base_20_G1-outline9" style:display-name="Base G1-outline9" style:family="presentation" style:parent-style-name="Base_20_G1-outline8">
      <style:paragraph-properties fo:margin-left="0cm" fo:margin-right="0cm" fo:margin-top="0.247cm" fo:margin-bottom="0cm" fo:text-indent="0cm"/>
      <style:text-properties fo:font-size="16.5pt" style:font-size-asian="20pt" style:font-size-complex="20pt"/>
    </style:style>
    <style:style style:name="Base_20_G1-subtitle" style:display-name="Base G1-subtitle" style:family="presentation">
      <style:graphic-properties draw:stroke="none" draw:fill="none" draw:textarea-vertical-align="middle">
        <text:list-style style:name="Base_20_G1-subtitle" style:display-name="Base G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G1-title" style:display-name="Base G1-title" style:family="presentation">
      <style:graphic-properties draw:stroke="none" draw:fill="none" draw:textarea-horizontal-align="left" draw:textarea-vertical-align="top" draw:auto-grow-height="false" style:writing-mode="lr-tb">
        <text:list-style style:name="Base_20_G1-title" style:display-name="Base G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ase-background" style:family="presentation">
      <style:graphic-properties draw:stroke="none" draw:fill="solid" draw:fill-color="#ffffff"/>
      <style:text-properties style:letter-kerning="true"/>
    </style:style>
    <style:style style:name="Base-backgroundobjects" style:family="presentation">
      <style:graphic-properties draw:textarea-horizontal-align="justify" draw:shadow="hidden" draw:shadow-offset-x="0.2cm" draw:shadow-offset-y="0.2cm" draw:shadow-color="#808080">
        <text:list-style style:name="Base-backgroundobjects">
          <text:list-level-style-bullet text:level="1" text:bullet-char="|">
            <style:list-level-properties text:space-before="-0.6cm" text:min-label-width="0.6cm"/>
            <style:text-properties fo:font-family="Marianne" style:font-style-name="Regular" fo:color="#268dff" fo:font-size="100%"/>
          </text:list-level-style-bullet>
          <text:list-level-style-bullet text:level="2" text:bullet-char="|">
            <style:list-level-properties text:space-before="-0.6cm" text:min-label-width="0.6cm"/>
            <style:text-properties fo:font-family="Marianne" style:font-style-name="Regular" fo:color="#ae48c0" fo:font-size="100%"/>
          </text:list-level-style-bullet>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Bas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3.0999984741211pt" style:font-style-asian="normal" style:font-weight-asian="normal" style:font-name-complex="Arial" style:font-family-complex="Arial" style:font-family-generic-complex="system" style:font-pitch-complex="variable" style:font-size-complex="33.0999984741211pt" style:font-style-complex="normal" style:font-weight-complex="normal" style:text-emphasize="none" style:font-relief="none" style:text-overline-style="none" style:text-overline-color="font-color"/>
    </style:style>
    <style:style style:name="Base-outline1" style:family="presentation">
      <style:graphic-properties draw:stroke="none" draw:fill="none" draw:textarea-horizontal-align="left" draw:auto-grow-height="false" draw:fit-to-size="false" style:shrink-to-fit="true" draw:shadow-color="#000000" style:writing-mode="lr-tb">
        <text:list-style style:name="Base-outline1">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73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 Semibold" fo:font-family="'Open Sans Semibold'" style:font-style-name="Normal" style:font-family-generic="swiss" style:font-pitch="variable" fo:font-size="22pt" fo:letter-spacing="normal" fo:language="fr" fo:country="FR"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Base-outline2" style:family="presentation" style:parent-style-name="Base-outline1">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2674dd" loext:opacity="100%" style:text-outline="false" style:text-line-through-style="none" style:text-line-through-type="none" style:text-position="0% 100%" style:font-name="Open Sans1" fo:font-family="'Open Sans'" fo:font-size="20pt" fo:letter-spacing="normal" fo:font-style="normal" style:text-underline-style="none" fo:font-weight="bold" fo:background-color="transparent" style:font-size-asian="20pt" style:font-style-asian="normal" style:font-weight-asian="normal" style:font-size-complex="20pt" style:font-style-complex="normal" style:font-weight-complex="normal" fo:hyphenate="false" loext:hyphenation-no-caps="false" loext:hyphenation-no-last-word="false"/>
    </style:style>
    <style:style style:name="Base-outline3" style:family="presentation" style:parent-style-name="Base-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ase-outline4" style:family="presentation" style:parent-style-name="Base-outline3">
      <style:graphic-properties style:writing-mode="lr-tb"/>
      <style:paragraph-properties fo:margin-left="0.2cm" fo:margin-right="0cm" fo:margin-top="0.247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hyphenation-no-caps="false" loext:hyphenation-no-last-word="false">
        <loext:char-complex-color loext:theme-type="dark1" loext:color-type="theme"/>
      </style:text-properties>
    </style:style>
    <style:style style:name="Base-outline5" style:family="presentation" style:parent-style-name="Base-outline4">
      <style:paragraph-properties fo:margin-left="0.2cm" fo:margin-right="0cm" fo:margin-top="0.247cm" fo:margin-bottom="0cm" fo:text-indent="0cm"/>
      <style:text-properties fo:font-size="16pt" style:font-size-asian="20pt" style:font-size-complex="20pt" fo:hyphenate="false" loext:hyphenation-no-caps="false" loext:hyphenation-no-last-word="false"/>
    </style:style>
    <style:style style:name="Base-outline6" style:family="presentation" style:parent-style-name="Base-outline5">
      <style:graphic-properties draw:auto-grow-height="true"/>
      <style:paragraph-properties fo:margin-left="0cm" fo:margin-right="0cm" fo:margin-top="0.247cm" fo:margin-bottom="0cm" fo:text-indent="0cm" loext:tab-stop-distance="0cm">
        <style:tab-stops/>
      </style:paragraph-properties>
      <style:text-properties fo:font-size="14pt" fo:font-style="italic" style:font-size-asian="20pt" style:font-size-complex="20pt" fo:hyphenate="false" loext:hyphenation-no-caps="false" loext:hyphenation-no-last-word="false"/>
    </style:style>
    <style:style style:name="Base-outline7" style:family="presentation" style:parent-style-name="Base-outline6">
      <style:paragraph-properties fo:margin-left="0cm" fo:margin-right="0cm" fo:margin-top="0.244cm" fo:margin-bottom="0cm" fo:text-indent="0cm"/>
      <style:text-properties fo:font-size="12pt" style:font-size-asian="20pt" style:font-size-complex="20pt"/>
    </style:style>
    <style:style style:name="Base-outline8" style:family="presentation" style:parent-style-name="Base-outline7">
      <style:paragraph-properties fo:margin-left="0cm" fo:margin-right="0cm" fo:margin-top="0.247cm" fo:margin-bottom="0cm" fo:text-indent="0cm"/>
      <style:text-properties fo:font-size="16.5pt" style:font-size-asian="20pt" style:font-size-complex="20pt"/>
    </style:style>
    <style:style style:name="Base-outline9" style:family="presentation" style:parent-style-name="Base-outline8">
      <style:paragraph-properties fo:margin-left="0cm" fo:margin-right="0cm" fo:margin-top="0.247cm" fo:margin-bottom="0cm" fo:text-indent="0cm"/>
      <style:text-properties fo:font-size="16.5pt" style:font-size-asian="20pt" style:font-size-complex="20pt"/>
    </style:style>
    <style:style style:name="Base-subtitle" style:family="presentation">
      <style:graphic-properties draw:stroke="none" draw:fill="none" draw:textarea-vertical-align="middle">
        <text:list-style style:name="Bas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title" style:family="presentation">
      <style:graphic-properties draw:stroke="none" draw:fill="none" draw:textarea-horizontal-align="left" draw:textarea-vertical-align="top" draw:auto-grow-height="false" style:writing-mode="lr-tb">
        <text:list-style style:name="Bas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Base_20_G1-background" style:display-name="1_Base G1-background" style:family="presentation">
      <style:graphic-properties draw:stroke="none" draw:fill="solid" draw:fill-color="#ffffff"/>
      <style:text-properties style:letter-kerning="true"/>
    </style:style>
    <style:style style:name="_31__5f_Base_20_G1-backgroundobjects" style:display-name="1_Base G1-backgroundobjects" style:family="presentation">
      <style:graphic-properties draw:textarea-horizontal-align="justify" draw:shadow="hidden" draw:shadow-offset-x="0.2cm" draw:shadow-offset-y="0.2cm" draw:shadow-color="#808080">
        <text:list-style style:name="_31__5f_Base_20_G1-backgroundobjects" style:display-name="1_Base G1-backgroundobjects">
          <text:list-level-style-bullet text:level="1" text:bullet-char="|">
            <style:list-level-properties text:space-before="-0.6cm" text:min-label-width="0.6cm"/>
            <style:text-properties fo:font-family="Marianne" style:font-style-name="Regular" fo:color="#268dff" fo:font-size="100%"/>
          </text:list-level-style-bullet>
          <text:list-level-style-bullet text:level="2" text:bullet-char="|">
            <style:list-level-properties text:space-before="-0.6cm" text:min-label-width="0.6cm"/>
            <style:text-properties fo:font-family="Marianne" style:font-style-name="Regular" fo:color="#ae48c0" fo:font-size="100%"/>
          </text:list-level-style-bullet>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_31__5f_Base_20_G1-notes" style:display-name="1_Base G1-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3.0999984741211pt" style:font-style-asian="normal" style:font-weight-asian="normal" style:font-name-complex="Arial" style:font-family-complex="Arial" style:font-family-generic-complex="system" style:font-pitch-complex="variable" style:font-size-complex="33.0999984741211pt" style:font-style-complex="normal" style:font-weight-complex="normal" style:text-emphasize="none" style:font-relief="none" style:text-overline-style="none" style:text-overline-color="font-color"/>
    </style:style>
    <style:style style:name="_31__5f_Base_20_G1-outline1" style:display-name="1_Base G1-outline1" style:family="presentation">
      <style:graphic-properties draw:stroke="none" draw:fill="none" draw:textarea-horizontal-align="left" draw:auto-grow-height="false" draw:fit-to-size="false" style:shrink-to-fit="true" draw:shadow-color="#000000" style:writing-mode="lr-tb">
        <text:list-style style:name="_31__5f_Base_20_G1-outline1" style:display-name="1_Base G1-outline1">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73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 Semibold" fo:font-family="'Open Sans Semibold'" style:font-style-name="Normal" style:font-family-generic="swiss" style:font-pitch="variable" fo:font-size="22pt" fo:letter-spacing="normal" fo:language="fr" fo:country="FR"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_31__5f_Base_20_G1-outline2" style:display-name="1_Base G1-outline2" style:family="presentation" style:parent-style-name="_31__5f_Base_20_G1-outline1">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2674dd" loext:opacity="100%" style:text-outline="false" style:text-line-through-style="none" style:text-line-through-type="none" style:text-position="0% 100%" style:font-name="Open Sans1" fo:font-family="'Open Sans'" fo:font-size="20pt" fo:letter-spacing="normal" fo:font-style="normal" style:text-underline-style="none" fo:font-weight="bold" fo:background-color="transparent" style:font-size-asian="20pt" style:font-style-asian="normal" style:font-weight-asian="normal" style:font-size-complex="20pt" style:font-style-complex="normal" style:font-weight-complex="normal" fo:hyphenate="false" loext:hyphenation-no-caps="false" loext:hyphenation-no-last-word="false"/>
    </style:style>
    <style:style style:name="_31__5f_Base_20_G1-outline3" style:display-name="1_Base G1-outline3" style:family="presentation" style:parent-style-name="_31__5f_Base_20_G1-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1__5f_Base_20_G1-outline4" style:display-name="1_Base G1-outline4" style:family="presentation" style:parent-style-name="_31__5f_Base_20_G1-outline3">
      <style:graphic-properties style:writing-mode="lr-tb"/>
      <style:paragraph-properties fo:margin-left="0.2cm" fo:margin-right="0cm" fo:margin-top="0.247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hyphenation-no-caps="false" loext:hyphenation-no-last-word="false">
        <loext:char-complex-color loext:theme-type="dark1" loext:color-type="theme"/>
      </style:text-properties>
    </style:style>
    <style:style style:name="_31__5f_Base_20_G1-outline5" style:display-name="1_Base G1-outline5" style:family="presentation" style:parent-style-name="_31__5f_Base_20_G1-outline4">
      <style:paragraph-properties fo:margin-left="0.2cm" fo:margin-right="0cm" fo:margin-top="0.247cm" fo:margin-bottom="0cm" fo:text-indent="0cm"/>
      <style:text-properties fo:font-size="16pt" style:font-size-asian="20pt" style:font-size-complex="20pt" fo:hyphenate="false" loext:hyphenation-no-caps="false" loext:hyphenation-no-last-word="false"/>
    </style:style>
    <style:style style:name="_31__5f_Base_20_G1-outline6" style:display-name="1_Base G1-outline6" style:family="presentation" style:parent-style-name="_31__5f_Base_20_G1-outline5">
      <style:graphic-properties draw:auto-grow-height="true"/>
      <style:paragraph-properties fo:margin-left="0cm" fo:margin-right="0cm" fo:margin-top="0.247cm" fo:margin-bottom="0cm" fo:text-indent="0cm" loext:tab-stop-distance="0cm">
        <style:tab-stops/>
      </style:paragraph-properties>
      <style:text-properties fo:font-size="14pt" fo:font-style="italic" style:font-size-asian="20pt" style:font-size-complex="20pt" fo:hyphenate="false" loext:hyphenation-no-caps="false" loext:hyphenation-no-last-word="false"/>
    </style:style>
    <style:style style:name="_31__5f_Base_20_G1-outline7" style:display-name="1_Base G1-outline7" style:family="presentation" style:parent-style-name="_31__5f_Base_20_G1-outline6">
      <style:paragraph-properties fo:margin-left="0cm" fo:margin-right="0cm" fo:margin-top="0.244cm" fo:margin-bottom="0cm" fo:text-indent="0cm"/>
      <style:text-properties fo:font-size="12pt" style:font-size-asian="20pt" style:font-size-complex="20pt"/>
    </style:style>
    <style:style style:name="_31__5f_Base_20_G1-outline8" style:display-name="1_Base G1-outline8" style:family="presentation" style:parent-style-name="_31__5f_Base_20_G1-outline7">
      <style:paragraph-properties fo:margin-left="0cm" fo:margin-right="0cm" fo:margin-top="0.247cm" fo:margin-bottom="0cm" fo:text-indent="0cm"/>
      <style:text-properties fo:font-size="16.5pt" style:font-size-asian="20pt" style:font-size-complex="20pt"/>
    </style:style>
    <style:style style:name="_31__5f_Base_20_G1-outline9" style:display-name="1_Base G1-outline9" style:family="presentation" style:parent-style-name="_31__5f_Base_20_G1-outline8">
      <style:paragraph-properties fo:margin-left="0cm" fo:margin-right="0cm" fo:margin-top="0.247cm" fo:margin-bottom="0cm" fo:text-indent="0cm"/>
      <style:text-properties fo:font-size="16.5pt" style:font-size-asian="20pt" style:font-size-complex="20pt"/>
    </style:style>
    <style:style style:name="_31__5f_Base_20_G1-subtitle" style:display-name="1_Base G1-subtitle" style:family="presentation">
      <style:graphic-properties draw:stroke="none" draw:fill="none" draw:textarea-vertical-align="middle">
        <text:list-style style:name="_31__5f_Base_20_G1-subtitle" style:display-name="1_Base G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ase_20_G1-title" style:display-name="1_Base G1-title" style:family="presentation">
      <style:graphic-properties draw:stroke="none" draw:fill="none" draw:textarea-horizontal-align="left" draw:textarea-vertical-align="top" draw:auto-grow-height="false" style:writing-mode="lr-tb">
        <text:list-style style:name="_31__5f_Base_20_G1-title" style:display-name="1_Base G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Base_20_G1-background" style:display-name="2_Base G1-background" style:family="presentation">
      <style:graphic-properties draw:stroke="none" draw:fill="solid" draw:fill-color="#ffffff"/>
      <style:text-properties style:letter-kerning="true"/>
    </style:style>
    <style:style style:name="_32__5f_Base_20_G1-backgroundobjects" style:display-name="2_Base G1-backgroundobjects" style:family="presentation">
      <style:graphic-properties draw:textarea-horizontal-align="justify" draw:shadow="hidden" draw:shadow-offset-x="0.2cm" draw:shadow-offset-y="0.2cm" draw:shadow-color="#808080">
        <text:list-style style:name="_32__5f_Base_20_G1-backgroundobjects" style:display-name="2_Base G1-backgroundobjects">
          <text:list-level-style-bullet text:level="1" text:bullet-char="|">
            <style:list-level-properties text:space-before="-0.6cm" text:min-label-width="0.6cm"/>
            <style:text-properties fo:font-family="Marianne" style:font-style-name="Regular" fo:color="#268dff" fo:font-size="100%"/>
          </text:list-level-style-bullet>
          <text:list-level-style-bullet text:level="2" text:bullet-char="|">
            <style:list-level-properties text:space-before="-0.6cm" text:min-label-width="0.6cm"/>
            <style:text-properties fo:font-family="Marianne" style:font-style-name="Regular" fo:color="#ae48c0" fo:font-size="100%"/>
          </text:list-level-style-bullet>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_32__5f_Base_20_G1-notes" style:display-name="2_Base G1-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3.0999984741211pt" style:font-style-asian="normal" style:font-weight-asian="normal" style:font-name-complex="Arial" style:font-family-complex="Arial" style:font-family-generic-complex="system" style:font-pitch-complex="variable" style:font-size-complex="33.0999984741211pt" style:font-style-complex="normal" style:font-weight-complex="normal" style:text-emphasize="none" style:font-relief="none" style:text-overline-style="none" style:text-overline-color="font-color"/>
    </style:style>
    <style:style style:name="_32__5f_Base_20_G1-outline1" style:display-name="2_Base G1-outline1" style:family="presentation">
      <style:graphic-properties draw:stroke="none" draw:fill="none" draw:textarea-horizontal-align="left" draw:auto-grow-height="false" draw:fit-to-size="false" style:shrink-to-fit="true" draw:shadow-color="#000000" style:writing-mode="lr-tb">
        <text:list-style style:name="_32__5f_Base_20_G1-outline1" style:display-name="2_Base G1-outline1">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73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 Semibold" fo:font-family="'Open Sans Semibold'" style:font-style-name="Normal" style:font-family-generic="swiss" style:font-pitch="variable" fo:font-size="22pt" fo:letter-spacing="normal" fo:language="fr" fo:country="FR"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_32__5f_Base_20_G1-outline2" style:display-name="2_Base G1-outline2" style:family="presentation" style:parent-style-name="_32__5f_Base_20_G1-outline1">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2674dd" loext:opacity="100%" style:text-outline="false" style:text-line-through-style="none" style:text-line-through-type="none" style:text-position="0% 100%" style:font-name="Open Sans1" fo:font-family="'Open Sans'" fo:font-size="20pt" fo:letter-spacing="normal" fo:font-style="normal" style:text-underline-style="none" fo:font-weight="bold" fo:background-color="transparent" style:font-size-asian="20pt" style:font-style-asian="normal" style:font-weight-asian="normal" style:font-size-complex="20pt" style:font-style-complex="normal" style:font-weight-complex="normal" fo:hyphenate="false" loext:hyphenation-no-caps="false" loext:hyphenation-no-last-word="false"/>
    </style:style>
    <style:style style:name="_32__5f_Base_20_G1-outline3" style:display-name="2_Base G1-outline3" style:family="presentation" style:parent-style-name="_32__5f_Base_20_G1-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2__5f_Base_20_G1-outline4" style:display-name="2_Base G1-outline4" style:family="presentation" style:parent-style-name="_32__5f_Base_20_G1-outline3">
      <style:graphic-properties style:writing-mode="lr-tb"/>
      <style:paragraph-properties fo:margin-left="0.2cm" fo:margin-right="0cm" fo:margin-top="0.247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hyphenation-no-caps="false" loext:hyphenation-no-last-word="false">
        <loext:char-complex-color loext:theme-type="dark1" loext:color-type="theme"/>
      </style:text-properties>
    </style:style>
    <style:style style:name="_32__5f_Base_20_G1-outline5" style:display-name="2_Base G1-outline5" style:family="presentation" style:parent-style-name="_32__5f_Base_20_G1-outline4">
      <style:paragraph-properties fo:margin-left="0.2cm" fo:margin-right="0cm" fo:margin-top="0.247cm" fo:margin-bottom="0cm" fo:text-indent="0cm"/>
      <style:text-properties fo:font-size="16pt" style:font-size-asian="20pt" style:font-size-complex="20pt" fo:hyphenate="false" loext:hyphenation-no-caps="false" loext:hyphenation-no-last-word="false"/>
    </style:style>
    <style:style style:name="_32__5f_Base_20_G1-outline6" style:display-name="2_Base G1-outline6" style:family="presentation" style:parent-style-name="_32__5f_Base_20_G1-outline5">
      <style:graphic-properties draw:auto-grow-height="true"/>
      <style:paragraph-properties fo:margin-left="0cm" fo:margin-right="0cm" fo:margin-top="0.247cm" fo:margin-bottom="0cm" fo:text-indent="0cm" loext:tab-stop-distance="0cm">
        <style:tab-stops/>
      </style:paragraph-properties>
      <style:text-properties fo:font-size="14pt" fo:font-style="italic" style:font-size-asian="20pt" style:font-size-complex="20pt" fo:hyphenate="false" loext:hyphenation-no-caps="false" loext:hyphenation-no-last-word="false"/>
    </style:style>
    <style:style style:name="_32__5f_Base_20_G1-outline7" style:display-name="2_Base G1-outline7" style:family="presentation" style:parent-style-name="_32__5f_Base_20_G1-outline6">
      <style:paragraph-properties fo:margin-left="0cm" fo:margin-right="0cm" fo:margin-top="0.244cm" fo:margin-bottom="0cm" fo:text-indent="0cm"/>
      <style:text-properties fo:font-size="12pt" style:font-size-asian="20pt" style:font-size-complex="20pt"/>
    </style:style>
    <style:style style:name="_32__5f_Base_20_G1-outline8" style:display-name="2_Base G1-outline8" style:family="presentation" style:parent-style-name="_32__5f_Base_20_G1-outline7">
      <style:paragraph-properties fo:margin-left="0cm" fo:margin-right="0cm" fo:margin-top="0.247cm" fo:margin-bottom="0cm" fo:text-indent="0cm"/>
      <style:text-properties fo:font-size="16.5pt" style:font-size-asian="20pt" style:font-size-complex="20pt"/>
    </style:style>
    <style:style style:name="_32__5f_Base_20_G1-outline9" style:display-name="2_Base G1-outline9" style:family="presentation" style:parent-style-name="_32__5f_Base_20_G1-outline8">
      <style:paragraph-properties fo:margin-left="0cm" fo:margin-right="0cm" fo:margin-top="0.247cm" fo:margin-bottom="0cm" fo:text-indent="0cm"/>
      <style:text-properties fo:font-size="16.5pt" style:font-size-asian="20pt" style:font-size-complex="20pt"/>
    </style:style>
    <style:style style:name="_32__5f_Base_20_G1-subtitle" style:display-name="2_Base G1-subtitle" style:family="presentation">
      <style:graphic-properties draw:stroke="none" draw:fill="none" draw:textarea-vertical-align="middle">
        <text:list-style style:name="_32__5f_Base_20_G1-subtitle" style:display-name="2_Base G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ase_20_G1-title" style:display-name="2_Base G1-title" style:family="presentation">
      <style:graphic-properties draw:stroke="none" draw:fill="none" draw:textarea-horizontal-align="left" draw:textarea-vertical-align="top" draw:auto-grow-height="false" style:writing-mode="lr-tb">
        <text:list-style style:name="_32__5f_Base_20_G1-title" style:display-name="2_Base G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Base_20_G1-background" style:display-name="3_Base G1-background" style:family="presentation">
      <style:graphic-properties draw:stroke="none" draw:fill="solid" draw:fill-color="#ffffff"/>
      <style:text-properties style:letter-kerning="true"/>
    </style:style>
    <style:style style:name="_33__5f_Base_20_G1-backgroundobjects" style:display-name="3_Base G1-backgroundobjects" style:family="presentation">
      <style:graphic-properties draw:textarea-horizontal-align="justify" draw:shadow="hidden" draw:shadow-offset-x="0.2cm" draw:shadow-offset-y="0.2cm" draw:shadow-color="#808080">
        <text:list-style style:name="_33__5f_Base_20_G1-backgroundobjects" style:display-name="3_Base G1-backgroundobjects">
          <text:list-level-style-bullet text:level="1" text:bullet-char="|">
            <style:list-level-properties text:space-before="-0.6cm" text:min-label-width="0.6cm"/>
            <style:text-properties fo:font-family="Marianne" style:font-style-name="Regular" fo:color="#268dff" fo:font-size="100%"/>
          </text:list-level-style-bullet>
          <text:list-level-style-bullet text:level="2" text:bullet-char="|">
            <style:list-level-properties text:space-before="-0.6cm" text:min-label-width="0.6cm"/>
            <style:text-properties fo:font-family="Marianne" style:font-style-name="Regular" fo:color="#ae48c0" fo:font-size="100%"/>
          </text:list-level-style-bullet>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text-properties style:letter-kerning="true" fo:hyphenate="false" loext:hyphenation-no-caps="false" loext:hyphenation-no-last-word="false"/>
    </style:style>
    <style:style style:name="_33__5f_Base_20_G1-notes" style:display-name="3_Base G1-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Open Sans" fo:font-family="'Open Sans'" style:font-style-name="Normal"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3.0999984741211pt" style:font-style-asian="normal" style:font-weight-asian="normal" style:font-name-complex="Arial" style:font-family-complex="Arial" style:font-family-generic-complex="system" style:font-pitch-complex="variable" style:font-size-complex="33.0999984741211pt" style:font-style-complex="normal" style:font-weight-complex="normal" style:text-emphasize="none" style:font-relief="none" style:text-overline-style="none" style:text-overline-color="font-color"/>
    </style:style>
    <style:style style:name="_33__5f_Base_20_G1-outline1" style:display-name="3_Base G1-outline1" style:family="presentation">
      <style:graphic-properties draw:stroke="none" draw:fill="none" draw:textarea-horizontal-align="left" draw:auto-grow-height="false" draw:fit-to-size="false" style:shrink-to-fit="true" draw:shadow-color="#000000" style:writing-mode="lr-tb">
        <text:list-style style:name="_33__5f_Base_20_G1-outline1" style:display-name="3_Base G1-outline1">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style:graphic-properties>
      <style:paragraph-properties fo:margin-left="0cm" fo:margin-right="0cm" fo:margin-top="0.273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 Semibold" fo:font-family="'Open Sans Semibold'" style:font-style-name="Normal" style:font-family-generic="swiss" style:font-pitch="variable" fo:font-size="22pt" fo:letter-spacing="normal" fo:language="fr" fo:country="FR"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_33__5f_Base_20_G1-outline2" style:display-name="3_Base G1-outline2" style:family="presentation" style:parent-style-name="_33__5f_Base_20_G1-outline1">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2674dd" loext:opacity="100%" style:text-outline="false" style:text-line-through-style="none" style:text-line-through-type="none" style:text-position="0% 100%" style:font-name="Open Sans1" fo:font-family="'Open Sans'" fo:font-size="20pt" fo:letter-spacing="normal" fo:font-style="normal" style:text-underline-style="none" fo:font-weight="bold" fo:background-color="transparent" style:font-size-asian="20pt" style:font-style-asian="normal" style:font-weight-asian="normal" style:font-size-complex="20pt" style:font-style-complex="normal" style:font-weight-complex="normal" fo:hyphenate="false" loext:hyphenation-no-caps="false" loext:hyphenation-no-last-word="false"/>
    </style:style>
    <style:style style:name="_33__5f_Base_20_G1-outline3" style:display-name="3_Base G1-outline3" style:family="presentation" style:parent-style-name="_33__5f_Base_20_G1-outline2">
      <style:graphic-properties style:writing-mode="lr-tb"/>
      <style:paragraph-properties fo:margin-left="0cm" fo:margin-right="0cm" fo:margin-top="0.2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3__5f_Base_20_G1-outline4" style:display-name="3_Base G1-outline4" style:family="presentation" style:parent-style-name="_33__5f_Base_20_G1-outline3">
      <style:graphic-properties style:writing-mode="lr-tb"/>
      <style:paragraph-properties fo:margin-left="0.2cm" fo:margin-right="0cm" fo:margin-top="0.247cm" fo:margin-bottom="0cm" fo:line-height="90%" fo:text-align="start" fo:text-indent="0cm" style:punctuation-wrap="hanging" loext:tab-stop-distance="0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hyphenation-no-caps="false" loext:hyphenation-no-last-word="false">
        <loext:char-complex-color loext:theme-type="dark1" loext:color-type="theme"/>
      </style:text-properties>
    </style:style>
    <style:style style:name="_33__5f_Base_20_G1-outline5" style:display-name="3_Base G1-outline5" style:family="presentation" style:parent-style-name="_33__5f_Base_20_G1-outline4">
      <style:paragraph-properties fo:margin-left="0.2cm" fo:margin-right="0cm" fo:margin-top="0.247cm" fo:margin-bottom="0cm" fo:text-indent="0cm"/>
      <style:text-properties fo:font-size="16pt" style:font-size-asian="20pt" style:font-size-complex="20pt" fo:hyphenate="false" loext:hyphenation-no-caps="false" loext:hyphenation-no-last-word="false"/>
    </style:style>
    <style:style style:name="_33__5f_Base_20_G1-outline6" style:display-name="3_Base G1-outline6" style:family="presentation" style:parent-style-name="_33__5f_Base_20_G1-outline5">
      <style:graphic-properties draw:auto-grow-height="true"/>
      <style:paragraph-properties fo:margin-left="0cm" fo:margin-right="0cm" fo:margin-top="0.247cm" fo:margin-bottom="0cm" fo:text-indent="0cm" loext:tab-stop-distance="0cm">
        <style:tab-stops/>
      </style:paragraph-properties>
      <style:text-properties fo:font-size="14pt" fo:font-style="italic" style:font-size-asian="20pt" style:font-size-complex="20pt" fo:hyphenate="false" loext:hyphenation-no-caps="false" loext:hyphenation-no-last-word="false"/>
    </style:style>
    <style:style style:name="_33__5f_Base_20_G1-outline7" style:display-name="3_Base G1-outline7" style:family="presentation" style:parent-style-name="_33__5f_Base_20_G1-outline6">
      <style:paragraph-properties fo:margin-left="0cm" fo:margin-right="0cm" fo:margin-top="0.244cm" fo:margin-bottom="0cm" fo:text-indent="0cm"/>
      <style:text-properties fo:font-size="12pt" style:font-size-asian="20pt" style:font-size-complex="20pt"/>
    </style:style>
    <style:style style:name="_33__5f_Base_20_G1-outline8" style:display-name="3_Base G1-outline8" style:family="presentation" style:parent-style-name="_33__5f_Base_20_G1-outline7">
      <style:paragraph-properties fo:margin-left="0cm" fo:margin-right="0cm" fo:margin-top="0.247cm" fo:margin-bottom="0cm" fo:text-indent="0cm"/>
      <style:text-properties fo:font-size="16.5pt" style:font-size-asian="20pt" style:font-size-complex="20pt"/>
    </style:style>
    <style:style style:name="_33__5f_Base_20_G1-outline9" style:display-name="3_Base G1-outline9" style:family="presentation" style:parent-style-name="_33__5f_Base_20_G1-outline8">
      <style:paragraph-properties fo:margin-left="0cm" fo:margin-right="0cm" fo:margin-top="0.247cm" fo:margin-bottom="0cm" fo:text-indent="0cm"/>
      <style:text-properties fo:font-size="16.5pt" style:font-size-asian="20pt" style:font-size-complex="20pt"/>
    </style:style>
    <style:style style:name="_33__5f_Base_20_G1-subtitle" style:display-name="3_Base G1-subtitle" style:family="presentation">
      <style:graphic-properties draw:stroke="none" draw:fill="none" draw:textarea-vertical-align="middle">
        <text:list-style style:name="_33__5f_Base_20_G1-subtitle" style:display-name="3_Base G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ase_20_G1-title" style:display-name="3_Base G1-title" style:family="presentation">
      <style:graphic-properties draw:stroke="none" draw:fill="none" draw:textarea-horizontal-align="left" draw:textarea-vertical-align="top" draw:auto-grow-height="false" style:writing-mode="lr-tb">
        <text:list-style style:name="_33__5f_Base_20_G1-title" style:display-name="3_Base G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0%" fo:text-align="start" style:punctuation-wrap="hanging"/>
      <style:text-properties fo:font-variant="normal" fo:text-transform="none" fo:color="#000000" loext:opacity="100%" style:text-outline="false" style:text-line-through-style="none" style:text-line-through-type="none" style:text-position="0% 100%" style:font-name="Open Sans1" fo:font-family="'Open Sans'" fo:font-size="28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full" draw:fill="solid" draw:fill-color="#ffffff"/>
    </style:style>
    <style:style style:name="Mdp2" style:family="drawing-page">
      <style:drawing-page-properties draw:background-size="full" draw:fill="solid" draw:fill-color="#bce4ff"/>
    </style:style>
    <style:style style:name="Mdp3" style:family="drawing-page">
      <style:drawing-page-properties draw:background-size="full" draw:fill="solid" draw:fill-color="#e1bce6"/>
    </style:style>
    <style:style style:name="Mdp4" style:family="drawing-page">
      <style:drawing-page-properties draw:background-size="full" draw:fill="solid" draw:fill-color="#ffe68f"/>
    </style:style>
    <style:style style:name="Mdp5" style:family="drawing-page">
      <style:drawing-page-properties draw:background-size="full" draw:fill="none" draw:gradient-step-count="0"/>
    </style:style>
    <style:style style:name="Mdp6" style:family="drawing-page">
      <style:drawing-page-properties draw:background-size="full" draw:fill="gradient" draw:fill-gradient-name="Blue_20_Touch" draw:gradient-step-count="0"/>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loext:decorative="false"/>
    </style:style>
    <style:style style:name="Mgr5" style:family="graphic" style:parent-style-name="standard">
      <style:graphic-properties draw:stroke="none" draw:stroke-dash="Dash_20_Dot_20_1" svg:stroke-width="0cm" draw:stroke-linejoin="none" svg:stroke-linecap="butt" draw:fill="solid" draw:fill-color="#d096da" draw:textarea-horizontal-align="center" draw:textarea-vertical-align="middle" loext:decorative="false"/>
    </style:style>
    <style:style style:name="Mgr6" style:family="graphic" style:parent-style-name="standard">
      <style:graphic-properties draw:stroke="none" draw:stroke-dash="Dash_20_Dot_20_1" svg:stroke-width="0cm" draw:stroke-linejoin="none" svg:stroke-linecap="butt" draw:fill="solid" draw:fill-color="#042f80" draw:textarea-horizontal-align="center" draw:textarea-vertical-align="middle" loext:decorative="false"/>
    </style:style>
    <style:style style:name="Mgr7" style:family="graphic" style:parent-style-name="standard">
      <style:graphic-properties draw:stroke="none" draw:stroke-dash="Dash_20_Dot_20_1" svg:stroke-width="0cm" draw:stroke-linejoin="none" svg:stroke-linecap="butt" draw:fill="solid" draw:fill-color="#258dfe" draw:textarea-horizontal-align="center" draw:textarea-vertical-align="middle" loext:decorative="false"/>
    </style:style>
    <style:style style:name="Mgr8" style:family="graphic">
      <style:graphic-properties style:writing-mode="lr-tb" loext:decorative="fals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10" style:family="graphic" style:parent-style-name="standard">
      <style:graphic-properties draw:stroke="none" draw:stroke-dash="Dash_20_Dot_20_1" svg:stroke-width="0cm" draw:stroke-linejoin="none" svg:stroke-linecap="butt" draw:fill="solid" draw:fill-color="#03317f" draw:textarea-horizontal-align="center" draw:textarea-vertical-align="middle" loext:decorative="false"/>
    </style:style>
    <style:style style:name="Mgr11" style:family="graphic" style:parent-style-name="standard">
      <style:graphic-properties draw:stroke="none" draw:stroke-dash="Dash_20_Dot_20_1" svg:stroke-width="0cm" draw:stroke-linejoin="none" svg:stroke-linecap="butt" draw:fill="solid" draw:fill-color="#a5d2fc" draw:textarea-horizontal-align="center" draw:textarea-vertical-align="middle" loext:decorative="false"/>
    </style:style>
    <style:style style:name="Mgr12" style:family="graphic" style:parent-style-name="standard">
      <style:graphic-properties draw:stroke="none" draw:stroke-dash="Dash_20_Dot_20_1" svg:stroke-width="0cm" draw:stroke-linejoin="none" svg:stroke-linecap="butt" draw:fill="solid" draw:fill-color="#55aaff" draw:textarea-horizontal-align="center" draw:textarea-vertical-align="middle" loext:decorative="false"/>
    </style:style>
    <style:style style:name="Mgr13" style:family="graphic" style:parent-style-name="standard">
      <style:graphic-properties draw:stroke="none" svg:stroke-width="0.018cm" draw:stroke-linejoin="miter" svg:stroke-linecap="butt" draw:fill="solid" draw:fill-color="#c06cce" draw:textarea-horizontal-align="justify" draw:textarea-vertical-align="middle" draw:auto-grow-height="false" draw:fit-to-size="false" style:shrink-to-fit="false" fo:min-height="12.001cm" fo:min-width="7.501cm" fo:padding-top="0.125cm" fo:padding-bottom="0.125cm" fo:padding-left="0.25cm" fo:padding-right="0.25cm" fo:wrap-option="wrap" loext:decorative="false"/>
    </style:style>
    <style:style style:name="Mgr14" style:family="graphic" style:parent-style-name="standard">
      <style:graphic-properties draw:stroke="none" svg:stroke-width="0.018cm" draw:stroke-linejoin="miter" svg:stroke-linecap="butt" draw:fill="solid" draw:fill-color="#55a8fd" draw:textarea-horizontal-align="justify" draw:textarea-vertical-align="middle" draw:auto-grow-height="false" draw:fit-to-size="false" style:shrink-to-fit="false" fo:min-height="5.858cm" fo:min-width="7.501cm" fo:padding-top="0.125cm" fo:padding-bottom="0.125cm" fo:padding-left="0.25cm" fo:padding-right="0.25cm" fo:wrap-option="wrap" loext:decorative="false"/>
    </style:style>
    <style:style style:name="Mgr15" style:family="graphic" style:parent-style-name="standard">
      <style:graphic-properties draw:stroke="none" svg:stroke-width="0.018cm" draw:stroke-linejoin="miter" svg:stroke-linecap="butt" draw:fill="solid" draw:fill-color="#042f80" draw:textarea-horizontal-align="justify" draw:textarea-vertical-align="middle" draw:auto-grow-height="false" draw:fit-to-size="false" style:shrink-to-fit="false" fo:min-height="9.001cm" fo:min-width="7.501cm" fo:padding-top="0.125cm" fo:padding-bottom="0.125cm" fo:padding-left="0.25cm" fo:padding-right="0.25cm" fo:wrap-option="wrap" loext:decorative="false"/>
    </style:style>
    <style:style style:name="Mgr16" style:family="graphic" style:parent-style-name="standard">
      <style:graphic-properties draw:stroke="none" draw:stroke-dash="Dash_20_Dot_20_1" svg:stroke-width="0cm" draw:stroke-linejoin="none" svg:stroke-linecap="butt" draw:fill="solid" draw:fill-color="#238bfe" draw:textarea-horizontal-align="center" draw:textarea-vertical-align="middle" loext:decorative="false"/>
    </style:style>
    <style:style style:name="Mgr17" style:family="graphic" style:parent-style-name="standard">
      <style:graphic-properties draw:stroke="none" draw:stroke-dash="Dash_20_Dot_20_1" svg:stroke-width="0cm" draw:stroke-linejoin="none" svg:stroke-linecap="butt" draw:fill="solid" draw:fill-color="#174695" draw:textarea-horizontal-align="center" draw:textarea-vertical-align="middle" loext:decorative="false"/>
    </style:style>
    <style:style style:name="Mpr1" style:family="presentation" style:parent-style-name="Page_20_de_20_garde-title">
      <style:graphic-properties svg:stroke-width="0cm" loext:fill-use-slide-background="false" draw:auto-grow-height="false" fo:min-height="3.181cm" fo:wrap-option="wrap" style:protect="position size" loext:decorative="false"/>
      <style:paragraph-properties style:writing-mode="lr-tb"/>
    </style:style>
    <style:style style:name="Mpr2" style:family="presentation" style:parent-style-name="Page_20_de_20_garde-backgroundobjects">
      <style:graphic-properties draw:stroke="none" draw:fill="none" draw:fill-color="#ffffff" draw:auto-grow-height="false" fo:min-height="1.086cm" loext:decorative="false"/>
      <style:paragraph-properties style:writing-mode="lr-tb"/>
    </style:style>
    <style:style style:name="Mpr3" style:family="presentation" style:parent-style-name="Page_20_de_20_garde-notes">
      <style:graphic-properties draw:fill-color="#ffffff" draw:auto-grow-height="false" fo:min-height="0.101cm" loext:decorative="false"/>
      <style:paragraph-properties style:writing-mode="lr-tb"/>
    </style:style>
    <style:style style:name="Mpr4" style:family="presentation" style:parent-style-name="Page_20_de_20_garde-backgroundobjects">
      <style:graphic-properties draw:stroke="none" draw:fill="none" draw:fill-color="#ffffff" draw:auto-grow-height="false" fo:min-height="1.485cm" loext:decorative="false"/>
      <style:paragraph-properties style:writing-mode="lr-tb"/>
    </style:style>
    <style:style style:name="Mpr5" style:family="presentation" style:parent-style-name="Page_20_de_20_gard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hapitre_20_B-backgroundobjects">
      <style:graphic-properties draw:stroke="none" draw:fill-color="#55a8fd" draw:opacity="100%" draw:textarea-horizontal-align="center" draw:textarea-vertical-align="middle" draw:auto-grow-height="false" fo:min-height="25.926cm" fo:min-width="26cm" draw:shadow="hidden" loext:decorative="false"/>
    </style:style>
    <style:style style:name="Mpr7" style:family="presentation" style:parent-style-name="Chapitre_20_B-backgroundobjects">
      <style:graphic-properties draw:stroke="none" draw:fill-color="#a4d2fc" draw:opacity="100%" draw:textarea-horizontal-align="center" draw:textarea-vertical-align="middle" draw:auto-grow-height="false" fo:min-height="25.926cm" fo:min-width="26cm" draw:shadow="hidden" loext:decorative="false"/>
    </style:style>
    <style:style style:name="Mpr8" style:family="presentation" style:parent-style-name="Chapitre_20_B-backgroundobjects">
      <style:graphic-properties draw:stroke="none" draw:fill-color="#043080" draw:opacity="100%" draw:textarea-horizontal-align="center" draw:textarea-vertical-align="middle" draw:auto-grow-height="false" fo:min-height="25.926cm" fo:min-width="26cm" draw:shadow="hidden" loext:decorative="false"/>
    </style:style>
    <style:style style:name="Mpr9" style:family="presentation" style:parent-style-name="Chapitre_20_B-backgroundobjects">
      <style:graphic-properties draw:stroke="none" draw:fill="solid" draw:fill-color="#55a8fd" draw:opacity="100%" draw:textarea-horizontal-align="center" draw:textarea-vertical-align="middle" draw:auto-grow-height="false" fo:min-height="25.926cm" fo:min-width="26cm" draw:shadow="hidden" loext:decorative="false"/>
    </style:style>
    <style:style style:name="Mpr10" style:family="presentation" style:parent-style-name="Chapitre_20_B-backgroundobjects">
      <style:graphic-properties draw:stroke="none" draw:fill-color="#a4d2fc" draw:textarea-horizontal-align="center" draw:textarea-vertical-align="middle" draw:auto-grow-height="false" fo:min-height="25.926cm" fo:min-width="26cm" draw:shadow="hidden" loext:decorative="false"/>
    </style:style>
    <style:style style:name="Mpr11" style:family="presentation" style:parent-style-name="Chapitre_20_B-backgroundobjects">
      <style:graphic-properties draw:stroke="none" draw:fill-color="#043080" draw:textarea-horizontal-align="center" draw:textarea-vertical-align="middle" draw:auto-grow-height="false" fo:min-height="25.926cm" fo:min-width="26cm" draw:shadow="hidden" loext:decorative="false"/>
    </style:style>
    <style:style style:name="Mpr12" style:family="presentation" style:parent-style-name="Chapitre_20_B-outline1">
      <style:graphic-properties draw:fit-to-size="false" style:shrink-to-fit="false" fo:min-height="0.101cm" style:protect="position size" loext:decorative="false"/>
      <style:paragraph-properties style:writing-mode="lr-tb"/>
    </style:style>
    <style:style style:name="Mpr13" style:family="presentation" style:parent-style-name="Chapitre_20_B-backgroundobjects">
      <style:graphic-properties draw:stroke="none" draw:fill="none" draw:fill-color="#ffffff" draw:auto-grow-height="false" fo:min-height="1.086cm" loext:decorative="false"/>
      <style:paragraph-properties style:writing-mode="lr-tb"/>
    </style:style>
    <style:style style:name="Mpr14" style:family="presentation" style:parent-style-name="Chapitre_20_B-notes">
      <style:graphic-properties draw:fill-color="#ffffff" draw:auto-grow-height="false" fo:min-height="0.101cm" loext:decorative="false"/>
      <style:paragraph-properties style:writing-mode="lr-tb"/>
    </style:style>
    <style:style style:name="Mpr15" style:family="presentation" style:parent-style-name="Chapitre_20_B-backgroundobjects">
      <style:graphic-properties draw:stroke="none" draw:fill="none" draw:fill-color="#ffffff" draw:auto-grow-height="false" fo:min-height="1.485cm" loext:decorative="false"/>
      <style:paragraph-properties style:writing-mode="lr-tb"/>
    </style:style>
    <style:style style:name="Mpr16" style:family="presentation" style:parent-style-name="Chapitre_20_B-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Chapitre_20_V-backgroundobjects">
      <style:graphic-properties draw:stroke="none" draw:fill-color="#ad47bf" draw:opacity="100%" draw:textarea-horizontal-align="center" draw:textarea-vertical-align="middle" draw:auto-grow-height="false" fo:min-height="25.926cm" fo:min-width="26cm" draw:shadow="hidden" loext:decorative="false"/>
    </style:style>
    <style:style style:name="Mpr18" style:family="presentation" style:parent-style-name="Chapitre_20_V-backgroundobjects">
      <style:graphic-properties draw:stroke="none" draw:fill-color="#d197d9" draw:opacity="100%" draw:textarea-horizontal-align="center" draw:textarea-vertical-align="middle" draw:auto-grow-height="false" fo:min-height="25.926cm" fo:min-width="26cm" draw:shadow="hidden" loext:decorative="false"/>
    </style:style>
    <style:style style:name="Mpr19" style:family="presentation" style:parent-style-name="Chapitre_20_V-backgroundobjects">
      <style:graphic-properties draw:stroke="none" draw:fill-color="#7d2294" draw:opacity="100%" draw:textarea-horizontal-align="center" draw:textarea-vertical-align="middle" draw:auto-grow-height="false" fo:min-height="25.926cm" fo:min-width="26cm" draw:shadow="hidden" loext:decorative="false"/>
    </style:style>
    <style:style style:name="Mpr20" style:family="presentation" style:parent-style-name="Chapitre_20_V-backgroundobjects">
      <style:graphic-properties draw:stroke="none" draw:fill-color="#ad47bf" draw:textarea-horizontal-align="center" draw:textarea-vertical-align="middle" draw:auto-grow-height="false" fo:min-height="25.926cm" fo:min-width="26cm" draw:shadow="hidden" loext:decorative="false"/>
    </style:style>
    <style:style style:name="Mpr21" style:family="presentation" style:parent-style-name="Chapitre_20_V-backgroundobjects">
      <style:graphic-properties draw:stroke="none" draw:fill-color="#d197d9" draw:textarea-horizontal-align="center" draw:textarea-vertical-align="middle" draw:auto-grow-height="false" fo:min-height="25.926cm" fo:min-width="26cm" draw:shadow="hidden" loext:decorative="false"/>
    </style:style>
    <style:style style:name="Mpr22" style:family="presentation" style:parent-style-name="Chapitre_20_V-backgroundobjects">
      <style:graphic-properties draw:stroke="none" draw:fill-color="#7d2294" draw:textarea-horizontal-align="center" draw:textarea-vertical-align="middle" draw:auto-grow-height="false" fo:min-height="25.926cm" fo:min-width="26cm" draw:shadow="hidden" loext:decorative="false"/>
    </style:style>
    <style:style style:name="Mpr23" style:family="presentation" style:parent-style-name="Chapitre_20_V-outline1">
      <style:graphic-properties draw:fit-to-size="false" style:shrink-to-fit="false" fo:min-height="0.101cm" style:protect="position size" loext:decorative="false"/>
      <style:paragraph-properties style:writing-mode="lr-tb"/>
    </style:style>
    <style:style style:name="Mpr24" style:family="presentation" style:parent-style-name="Chapitre_20_V-backgroundobjects">
      <style:graphic-properties draw:stroke="none" draw:fill="none" draw:fill-color="#ffffff" draw:auto-grow-height="false" fo:min-height="1.086cm" loext:decorative="false"/>
      <style:paragraph-properties style:writing-mode="lr-tb"/>
    </style:style>
    <style:style style:name="Mpr25" style:family="presentation" style:parent-style-name="Chapitre_20_V-notes">
      <style:graphic-properties draw:fill-color="#ffffff" draw:auto-grow-height="false" fo:min-height="0.101cm" loext:decorative="false"/>
      <style:paragraph-properties style:writing-mode="lr-tb"/>
    </style:style>
    <style:style style:name="Mpr26" style:family="presentation" style:parent-style-name="Chapitre_20_V-backgroundobjects">
      <style:graphic-properties draw:stroke="none" draw:fill="none" draw:fill-color="#ffffff" draw:auto-grow-height="false" fo:min-height="1.485cm" loext:decorative="false"/>
      <style:paragraph-properties style:writing-mode="lr-tb"/>
    </style:style>
    <style:style style:name="Mpr27" style:family="presentation" style:parent-style-name="Chapitre_20_V-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hapitre_20_J-backgroundobjects">
      <style:graphic-properties draw:stroke="none" draw:fill-color="#d79600" draw:opacity="100%" draw:textarea-horizontal-align="center" draw:textarea-vertical-align="middle" draw:auto-grow-height="false" fo:min-height="25.926cm" fo:min-width="26cm" draw:shadow="hidden" loext:decorative="false"/>
    </style:style>
    <style:style style:name="Mpr29" style:family="presentation" style:parent-style-name="Chapitre_20_J-backgroundobjects">
      <style:graphic-properties draw:stroke="none" draw:fill-color="#ffd959" draw:opacity="100%" draw:textarea-horizontal-align="center" draw:textarea-vertical-align="middle" draw:auto-grow-height="false" fo:min-height="25.926cm" fo:min-width="26cm" draw:shadow="hidden" loext:decorative="false"/>
    </style:style>
    <style:style style:name="Mpr30" style:family="presentation" style:parent-style-name="Chapitre_20_J-backgroundobjects">
      <style:graphic-properties draw:stroke="none" draw:fill-color="#a36806" draw:opacity="100%" draw:textarea-horizontal-align="center" draw:textarea-vertical-align="middle" draw:auto-grow-height="false" fo:min-height="25.926cm" fo:min-width="26cm" draw:shadow="hidden" loext:decorative="false"/>
    </style:style>
    <style:style style:name="Mpr31" style:family="presentation" style:parent-style-name="Chapitre_20_J-outline1">
      <style:graphic-properties draw:fit-to-size="false" style:shrink-to-fit="false" fo:min-height="0.101cm" style:protect="position size" loext:decorative="false"/>
      <style:paragraph-properties style:writing-mode="lr-tb"/>
    </style:style>
    <style:style style:name="Mpr32" style:family="presentation" style:parent-style-name="Chapitre_20_J-backgroundobjects">
      <style:graphic-properties draw:stroke="none" draw:fill="none" draw:fill-color="#ffffff" draw:auto-grow-height="false" fo:min-height="1.086cm" loext:decorative="false"/>
      <style:paragraph-properties style:writing-mode="lr-tb"/>
    </style:style>
    <style:style style:name="Mpr33" style:family="presentation" style:parent-style-name="Chapitre_20_J-notes">
      <style:graphic-properties draw:fill-color="#ffffff" draw:auto-grow-height="false" fo:min-height="0.101cm" loext:decorative="false"/>
      <style:paragraph-properties style:writing-mode="lr-tb"/>
    </style:style>
    <style:style style:name="Mpr34" style:family="presentation" style:parent-style-name="Chapitre_20_J-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hapitre_20_J-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hapitre_20_T-backgroundobjects">
      <style:graphic-properties draw:stroke="none" draw:fill-color="#3dd7d5" draw:opacity="100%" draw:textarea-horizontal-align="center" draw:textarea-vertical-align="middle" draw:auto-grow-height="false" fo:min-height="25.926cm" fo:min-width="26cm" draw:shadow="hidden" loext:decorative="false"/>
    </style:style>
    <style:style style:name="Mpr37" style:family="presentation" style:parent-style-name="Chapitre_20_T-backgroundobjects">
      <style:graphic-properties draw:stroke="none" draw:fill-color="#9beded" draw:opacity="100%" draw:textarea-horizontal-align="center" draw:textarea-vertical-align="middle" draw:auto-grow-height="false" fo:min-height="25.926cm" fo:min-width="26cm" draw:shadow="hidden" loext:decorative="false"/>
    </style:style>
    <style:style style:name="Mpr38" style:family="presentation" style:parent-style-name="Chapitre_20_T-backgroundobjects">
      <style:graphic-properties draw:stroke="none" draw:fill-color="#08bab7" draw:opacity="100%" draw:textarea-horizontal-align="center" draw:textarea-vertical-align="middle" draw:auto-grow-height="false" fo:min-height="25.926cm" fo:min-width="26cm" draw:shadow="hidden" loext:decorative="false"/>
    </style:style>
    <style:style style:name="Mpr39" style:family="presentation" style:parent-style-name="Chapitre_20_T-outline1">
      <style:graphic-properties draw:fit-to-size="false" style:shrink-to-fit="false" fo:min-height="0.101cm" style:protect="position size" loext:decorative="false"/>
      <style:paragraph-properties style:writing-mode="lr-tb"/>
    </style:style>
    <style:style style:name="Mpr40" style:family="presentation" style:parent-style-name="Chapitre_20_T-backgroundobjects">
      <style:graphic-properties draw:stroke="none" draw:fill="none" draw:fill-color="#ffffff" draw:auto-grow-height="false" fo:min-height="1.086cm" loext:decorative="false"/>
      <style:paragraph-properties style:writing-mode="lr-tb"/>
    </style:style>
    <style:style style:name="Mpr41" style:family="presentation" style:parent-style-name="Chapitre_20_T-notes">
      <style:graphic-properties draw:fill-color="#ffffff" draw:auto-grow-height="false" fo:min-height="0.101cm" loext:decorative="false"/>
      <style:paragraph-properties style:writing-mode="lr-tb"/>
    </style:style>
    <style:style style:name="Mpr42" style:family="presentation" style:parent-style-name="Chapitre_20_T-backgroundobjects">
      <style:graphic-properties draw:stroke="none" draw:fill="none" draw:fill-color="#ffffff" draw:auto-grow-height="false" fo:min-height="1.485cm" loext:decorative="false"/>
      <style:paragraph-properties style:writing-mode="lr-tb"/>
    </style:style>
    <style:style style:name="Mpr43" style:family="presentation" style:parent-style-name="Chapitre_20_T-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Sommaire-outline1">
      <style:graphic-properties draw:fit-to-size="false" style:shrink-to-fit="false" fo:min-height="0.101cm" loext:decorative="false"/>
      <style:paragraph-properties style:writing-mode="lr-tb"/>
    </style:style>
    <style:style style:name="Mpr45" style:family="presentation" style:parent-style-name="Sommaire-backgroundobjects">
      <style:graphic-properties draw:stroke="none" draw:fill="none" draw:fill-color="#ffffff" draw:auto-grow-height="false" fo:min-height="1.086cm" loext:decorative="false"/>
      <style:paragraph-properties style:writing-mode="lr-tb"/>
    </style:style>
    <style:style style:name="Mpr46" style:family="presentation" style:parent-style-name="Sommaire-notes">
      <style:graphic-properties draw:fill-color="#ffffff" draw:auto-grow-height="false" fo:min-height="0.101cm" loext:decorative="false"/>
      <style:paragraph-properties style:writing-mode="lr-tb"/>
    </style:style>
    <style:style style:name="Mpr47" style:family="presentation" style:parent-style-name="Sommaire-backgroundobjects">
      <style:graphic-properties draw:stroke="none" draw:fill="none" draw:fill-color="#ffffff" draw:auto-grow-height="false" fo:min-height="1.485cm" loext:decorative="false"/>
      <style:paragraph-properties style:writing-mode="lr-tb"/>
    </style:style>
    <style:style style:name="Mpr48" style:family="presentation" style:parent-style-name="Sommaire-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Base_20_G2-outline1" style:list-style-name="ML8">
      <style:graphic-properties draw:fit-to-size="false" style:shrink-to-fit="false" fo:min-height="0.101cm" loext:decorative="false"/>
      <style:paragraph-properties style:writing-mode="lr-tb"/>
    </style:style>
    <style:style style:name="Mpr50" style:family="presentation" style:parent-style-name="Base_20_G2-backgroundobjects">
      <style:graphic-properties draw:stroke="none" draw:fill="none" draw:fill-color="#ffffff" draw:auto-grow-height="false" fo:min-height="1.086cm" loext:decorative="false"/>
      <style:paragraph-properties style:writing-mode="lr-tb"/>
    </style:style>
    <style:style style:name="Mpr51" style:family="presentation" style:parent-style-name="Base_20_G2-notes">
      <style:graphic-properties draw:fill-color="#ffffff" draw:auto-grow-height="false" fo:min-height="0.101cm" loext:decorative="false"/>
      <style:paragraph-properties style:writing-mode="lr-tb"/>
    </style:style>
    <style:style style:name="Mpr52" style:family="presentation" style:parent-style-name="Base_20_G2-backgroundobjects">
      <style:graphic-properties draw:stroke="none" draw:fill="none" draw:fill-color="#ffffff" draw:auto-grow-height="false" fo:min-height="1.485cm" loext:decorative="false"/>
      <style:paragraph-properties style:writing-mode="lr-tb"/>
    </style:style>
    <style:style style:name="Mpr53" style:family="presentation" style:parent-style-name="Base_20_G2-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Merci_5f_2-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Merci_5f_2-backgroundobjects">
      <style:graphic-properties draw:stroke="none" draw:fill="none" draw:fill-color="#ffffff" draw:auto-grow-height="false" fo:min-height="1.485cm" loext:decorative="false"/>
      <style:paragraph-properties style:writing-mode="lr-tb"/>
    </style:style>
    <style:style style:name="Mpr56" style:family="presentation" style:parent-style-name="Edito_5f_2-backgroundobjects">
      <style:graphic-properties draw:stroke="none" draw:fill-color="#ffffff" draw:textarea-vertical-align="middle" draw:auto-grow-height="false" fo:min-height="5.622cm" fo:min-width="16cm" loext:decorative="false"/>
    </style:style>
    <style:style style:name="Mpr57" style:family="presentation" style:parent-style-name="Edito_5f_2-title">
      <style:graphic-properties draw:auto-grow-height="false" fo:min-height="2.63cm" loext:decorative="false"/>
      <style:paragraph-properties style:writing-mode="lr-tb"/>
    </style:style>
    <style:style style:name="Mpr58" style:family="presentation" style:parent-style-name="Edito_5f_2-outline1" style:list-style-name="ML10">
      <style:graphic-properties fo:min-height="9.135cm" loext:decorative="false"/>
      <style:paragraph-properties style:writing-mode="lr-tb"/>
    </style:style>
    <style:style style:name="Mpr59" style:family="presentation" style:parent-style-name="Edito_5f_2-backgroundobjects">
      <style:graphic-properties draw:stroke="none" draw:fill="none" draw:fill-color="#ffffff" draw:auto-grow-height="false" fo:min-height="1.086cm" loext:decorative="false"/>
      <style:paragraph-properties style:writing-mode="lr-tb"/>
    </style:style>
    <style:style style:name="Mpr60" style:family="presentation" style:parent-style-name="Edito_5f_2-backgroundobjects">
      <style:graphic-properties draw:stroke="none" draw:fill="none" draw:fill-color="#ffffff" draw:auto-grow-height="false" fo:min-height="1.485cm" loext:decorative="false"/>
      <style:paragraph-properties style:writing-mode="lr-tb"/>
    </style:style>
    <style:style style:name="Mpr61" style:family="presentation" style:parent-style-name="Edito_5f_2-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Base_20_G1-outline1" style:list-style-name="ML8">
      <style:graphic-properties draw:fit-to-size="false" style:shrink-to-fit="false" fo:min-height="0.101cm" loext:decorative="false"/>
      <style:paragraph-properties style:writing-mode="lr-tb"/>
    </style:style>
    <style:style style:name="Mpr63" style:family="presentation" style:parent-style-name="Base_20_G1-backgroundobjects">
      <style:graphic-properties draw:stroke="none" draw:fill="none" draw:fill-color="#ffffff" draw:auto-grow-height="false" fo:min-height="1.086cm" loext:decorative="false"/>
      <style:paragraph-properties style:writing-mode="lr-tb"/>
    </style:style>
    <style:style style:name="Mpr64" style:family="presentation" style:parent-style-name="Base_20_G1-notes">
      <style:graphic-properties draw:fill-color="#ffffff" draw:auto-grow-height="false" fo:min-height="0.101cm" loext:decorative="false"/>
      <style:paragraph-properties style:writing-mode="lr-tb"/>
    </style:style>
    <style:style style:name="Mpr65" style:family="presentation" style:parent-style-name="Base_20_G1-backgroundobjects">
      <style:graphic-properties draw:stroke="none" draw:fill="none" draw:fill-color="#ffffff" draw:auto-grow-height="false" fo:min-height="1.485cm" loext:decorative="false"/>
      <style:paragraph-properties style:writing-mode="lr-tb"/>
    </style:style>
    <style:style style:name="Mpr66" style:family="presentation" style:parent-style-name="Base_20_G1-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Base-outline1" style:list-style-name="ML8">
      <style:graphic-properties draw:fit-to-size="false" style:shrink-to-fit="false" fo:min-height="0.101cm" loext:decorative="false"/>
      <style:paragraph-properties style:writing-mode="lr-tb"/>
    </style:style>
    <style:style style:name="Mpr68" style:family="presentation" style:parent-style-name="Base-backgroundobjects">
      <style:graphic-properties draw:stroke="none" draw:fill="none" draw:fill-color="#ffffff" draw:auto-grow-height="false" fo:min-height="1.086cm" loext:decorative="false"/>
      <style:paragraph-properties style:writing-mode="lr-tb"/>
    </style:style>
    <style:style style:name="Mpr69" style:family="presentation" style:parent-style-name="Base-notes">
      <style:graphic-properties draw:fill-color="#ffffff" draw:auto-grow-height="false" fo:min-height="0.101cm" loext:decorative="false"/>
      <style:paragraph-properties style:writing-mode="lr-tb"/>
    </style:style>
    <style:style style:name="Mpr70" style:family="presentation" style:parent-style-name="Base-backgroundobjects">
      <style:graphic-properties draw:stroke="none" draw:fill="none" draw:fill-color="#ffffff" draw:auto-grow-height="false" fo:min-height="1.485cm" loext:decorative="false"/>
      <style:paragraph-properties style:writing-mode="lr-tb"/>
    </style:style>
    <style:style style:name="Mpr71" style:family="presentation" style:parent-style-name="Base-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_31__5f_Base_20_G1-outline1" style:list-style-name="ML8">
      <style:graphic-properties draw:fit-to-size="false" style:shrink-to-fit="false" fo:min-height="0.101cm" loext:decorative="false"/>
      <style:paragraph-properties style:writing-mode="lr-tb"/>
    </style:style>
    <style:style style:name="Mpr73" style:family="presentation" style:parent-style-name="_31__5f_Base_20_G1-backgroundobjects">
      <style:graphic-properties draw:stroke="none" draw:fill="none" draw:fill-color="#ffffff" draw:auto-grow-height="false" fo:min-height="1.086cm" loext:decorative="false"/>
      <style:paragraph-properties style:writing-mode="lr-tb"/>
    </style:style>
    <style:style style:name="Mpr74" style:family="presentation" style:parent-style-name="_31__5f_Base_20_G1-notes">
      <style:graphic-properties draw:fill-color="#ffffff" draw:auto-grow-height="false" fo:min-height="0.101cm" loext:decorative="false"/>
      <style:paragraph-properties style:writing-mode="lr-tb"/>
    </style:style>
    <style:style style:name="Mpr75" style:family="presentation" style:parent-style-name="_31__5f_Base_20_G1-backgroundobjects">
      <style:graphic-properties draw:stroke="none" draw:fill="none" draw:fill-color="#ffffff" draw:auto-grow-height="false" fo:min-height="1.485cm" loext:decorative="false"/>
      <style:paragraph-properties style:writing-mode="lr-tb"/>
    </style:style>
    <style:style style:name="Mpr76" style:family="presentation" style:parent-style-name="_31__5f_Base_20_G1-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_32__5f_Base_20_G1-outline1" style:list-style-name="ML8">
      <style:graphic-properties draw:fit-to-size="false" style:shrink-to-fit="false" fo:min-height="0.101cm" loext:decorative="false"/>
      <style:paragraph-properties style:writing-mode="lr-tb"/>
    </style:style>
    <style:style style:name="Mpr78" style:family="presentation" style:parent-style-name="_32__5f_Base_20_G1-backgroundobjects">
      <style:graphic-properties draw:stroke="none" draw:fill="none" draw:fill-color="#ffffff" draw:auto-grow-height="false" fo:min-height="1.086cm" loext:decorative="false"/>
      <style:paragraph-properties style:writing-mode="lr-tb"/>
    </style:style>
    <style:style style:name="Mpr79" style:family="presentation" style:parent-style-name="_32__5f_Base_20_G1-notes">
      <style:graphic-properties draw:fill-color="#ffffff" draw:auto-grow-height="false" fo:min-height="0.101cm" loext:decorative="false"/>
      <style:paragraph-properties style:writing-mode="lr-tb"/>
    </style:style>
    <style:style style:name="Mpr80" style:family="presentation" style:parent-style-name="_32__5f_Base_20_G1-backgroundobjects">
      <style:graphic-properties draw:stroke="none" draw:fill="none" draw:fill-color="#ffffff" draw:auto-grow-height="false" fo:min-height="1.485cm" loext:decorative="false"/>
      <style:paragraph-properties style:writing-mode="lr-tb"/>
    </style:style>
    <style:style style:name="Mpr81" style:family="presentation" style:parent-style-name="_32__5f_Base_20_G1-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_33__5f_Base_20_G1-outline1" style:list-style-name="ML8">
      <style:graphic-properties draw:fit-to-size="false" style:shrink-to-fit="false" fo:min-height="0.101cm" loext:decorative="false"/>
      <style:paragraph-properties style:writing-mode="lr-tb"/>
    </style:style>
    <style:style style:name="Mpr83" style:family="presentation" style:parent-style-name="_33__5f_Base_20_G1-backgroundobjects">
      <style:graphic-properties draw:stroke="none" draw:fill="none" draw:fill-color="#ffffff" draw:auto-grow-height="false" fo:min-height="1.086cm" loext:decorative="false"/>
      <style:paragraph-properties style:writing-mode="lr-tb"/>
    </style:style>
    <style:style style:name="Mpr84" style:family="presentation" style:parent-style-name="_33__5f_Base_20_G1-notes">
      <style:graphic-properties draw:fill-color="#ffffff" draw:auto-grow-height="false" fo:min-height="0.101cm" loext:decorative="false"/>
      <style:paragraph-properties style:writing-mode="lr-tb"/>
    </style:style>
    <style:style style:name="Mpr85" style:family="presentation" style:parent-style-name="_33__5f_Base_20_G1-backgroundobjects">
      <style:graphic-properties draw:stroke="none" draw:fill="none" draw:fill-color="#ffffff" draw:auto-grow-height="false" fo:min-height="1.485cm" loext:decorative="false"/>
      <style:paragraph-properties style:writing-mode="lr-tb"/>
    </style:style>
    <style:style style:name="Mpr86" style:family="presentation" style:parent-style-name="_33__5f_Base_20_G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80%" fo:text-align="start" fo:text-indent="0cm" style:punctuation-wrap="hanging" loext:tab-stop-distance="2.54cm" style:writing-mode="lr-tb">
        <style:tab-stops/>
      </style:paragraph-properties>
      <style:text-properties fo:hyphenate="false"/>
    </style:style>
    <style:style style:name="MP6" style:family="paragraph">
      <style:paragraph-properties fo:margin-left="0cm" fo:margin-right="0cm" fo:margin-top="0cm" fo:margin-bottom="0cm" fo:line-height="80%" fo:text-align="start" fo:text-indent="0cm" style:punctuation-wrap="hanging" loext:tab-stop-distance="2.54cm" style:font-independent-line-spacing="true">
        <style:tab-stops/>
      </style:paragraph-properties>
      <style:text-properties fo:hyphenate="false"/>
    </style:style>
    <style:style style:name="MP7" style:family="paragraph">
      <loext:graphic-properties draw:fill="none"/>
      <style:paragraph-properties fo:text-align="start"/>
      <style:text-properties fo:font-size="18pt"/>
    </style:style>
    <style:style style:name="MP8" style:family="paragraph">
      <loext:graphic-properties draw:fill="solid" draw:fill-color="#d096da"/>
      <style:paragraph-properties fo:text-align="center"/>
    </style:style>
    <style:style style:name="MP9" style:family="paragraph">
      <loext:graphic-properties draw:fill="solid" draw:fill-color="#042f80"/>
      <style:paragraph-properties fo:text-align="center"/>
    </style:style>
    <style:style style:name="MP10" style:family="paragraph">
      <loext:graphic-properties draw:fill="solid" draw:fill-color="#258dfe"/>
      <style:paragraph-properties fo:text-align="center"/>
    </style:style>
    <style:style style:name="MP11" style:family="paragraph">
      <style:paragraph-properties fo:text-align="start"/>
    </style:style>
    <style:style style:name="MP12" style:family="paragraph">
      <loext:graphic-properties draw:fill="none" draw:fill-color="#ffffff"/>
      <style:paragraph-properties fo:text-align="start"/>
      <style:text-properties style:font-name="Open Sans4" fo:font-size="11pt" style:font-size-asian="11pt" style:font-size-complex="11pt"/>
    </style:style>
    <style:style style:name="MP13" style:family="paragraph">
      <loext:graphic-properties draw:fill-color="#ffffff"/>
    </style:style>
    <style:style style:name="MP14" style:family="paragraph">
      <style:text-properties fo:color="#4c4c4c" loext:opacity="100%" fo:font-size="9pt" style:font-size-asian="14pt" style:font-size-complex="14pt"/>
    </style:style>
    <style:style style:name="MP15" style:family="paragraph">
      <loext:graphic-properties draw:fill="none" draw:fill-color="#ffffff"/>
      <style:text-properties fo:color="#4c4c4c" loext:opacity="100%" fo:font-size="9pt" style:font-size-asian="14pt" style:font-size-complex="14pt"/>
    </style:style>
    <style:style style:name="MP16" style:family="paragraph">
      <style:paragraph-properties fo:text-align="end"/>
      <style:text-properties fo:color="#4c4c4c" loext:opacity="100%" fo:font-size="9pt" style:font-size-asian="14pt" style:font-size-complex="14pt"/>
    </style:style>
    <style:style style:name="MP17" style:family="paragraph">
      <loext:graphic-properties draw:fill="none" draw:fill-color="#ffffff"/>
      <style:paragraph-properties fo:text-align="end"/>
      <style:text-properties fo:color="#4c4c4c" loext:opacity="100%" fo:font-size="9pt" style:font-size-asian="14pt" style:font-size-complex="14pt"/>
    </style:style>
    <style:style style:name="MP18" style:family="paragraph">
      <loext:graphic-properties draw:fill-color="#55a8fd" draw:opacity="100%"/>
      <style:paragraph-properties fo:text-align="center"/>
    </style:style>
    <style:style style:name="MP19" style:family="paragraph">
      <loext:graphic-properties draw:fill-color="#a4d2fc" draw:opacity="100%"/>
      <style:paragraph-properties fo:text-align="center"/>
    </style:style>
    <style:style style:name="MP20" style:family="paragraph">
      <loext:graphic-properties draw:fill-color="#043080" draw:opacity="100%"/>
      <style:paragraph-properties fo:text-align="center"/>
    </style:style>
    <style:style style:name="MP21" style:family="paragraph">
      <loext:graphic-properties draw:fill="solid" draw:fill-color="#55a8fd" draw:opacity="100%"/>
      <style:paragraph-properties fo:text-align="center"/>
    </style:style>
    <style:style style:name="MP22" style:family="paragraph">
      <loext:graphic-properties draw:fill-color="#a4d2fc"/>
      <style:paragraph-properties fo:text-align="center"/>
    </style:style>
    <style:style style:name="MP23" style:family="paragraph">
      <loext:graphic-properties draw:fill-color="#043080"/>
      <style:paragraph-properties fo:text-align="center"/>
    </style:style>
    <style:style style:name="MP24" style:family="paragraph">
      <loext:graphic-properties draw:fill="none"/>
      <style:paragraph-properties fo:text-align="center"/>
    </style:style>
    <style:style style:name="MP25" style:family="paragraph">
      <style:paragraph-properties fo:text-align="end"/>
    </style:style>
    <style:style style:name="MP26" style:family="paragraph">
      <loext:graphic-properties draw:fill="none" draw:fill-color="#ffffff"/>
      <style:paragraph-properties fo:text-align="end"/>
      <style:text-properties style:font-name="Open Sans4" fo:font-size="11pt" style:font-size-asian="11pt" style:font-size-complex="11pt"/>
    </style:style>
    <style:style style:name="MP27" style:family="paragraph">
      <loext:graphic-properties draw:fill-color="#ad47bf" draw:opacity="100%"/>
      <style:paragraph-properties fo:text-align="center"/>
    </style:style>
    <style:style style:name="MP28" style:family="paragraph">
      <loext:graphic-properties draw:fill-color="#d197d9" draw:opacity="100%"/>
      <style:paragraph-properties fo:text-align="center"/>
    </style:style>
    <style:style style:name="MP29" style:family="paragraph">
      <loext:graphic-properties draw:fill-color="#7d2294" draw:opacity="100%"/>
      <style:paragraph-properties fo:text-align="center"/>
    </style:style>
    <style:style style:name="MP30" style:family="paragraph">
      <loext:graphic-properties draw:fill-color="#ad47bf"/>
      <style:paragraph-properties fo:text-align="center"/>
    </style:style>
    <style:style style:name="MP31" style:family="paragraph">
      <loext:graphic-properties draw:fill-color="#d197d9"/>
      <style:paragraph-properties fo:text-align="center"/>
    </style:style>
    <style:style style:name="MP32" style:family="paragraph">
      <loext:graphic-properties draw:fill-color="#7d2294"/>
      <style:paragraph-properties fo:text-align="center"/>
    </style:style>
    <style:style style:name="MP33" style:family="paragraph">
      <loext:graphic-properties draw:fill-color="#d79600" draw:opacity="100%"/>
      <style:paragraph-properties fo:text-align="center"/>
    </style:style>
    <style:style style:name="MP34" style:family="paragraph">
      <loext:graphic-properties draw:fill-color="#ffd959" draw:opacity="100%"/>
      <style:paragraph-properties fo:text-align="center"/>
    </style:style>
    <style:style style:name="MP35" style:family="paragraph">
      <loext:graphic-properties draw:fill-color="#a36806" draw:opacity="100%"/>
      <style:paragraph-properties fo:text-align="center"/>
    </style:style>
    <style:style style:name="MP36" style:family="paragraph">
      <loext:graphic-properties draw:fill-color="#3dd7d5" draw:opacity="100%"/>
      <style:paragraph-properties fo:text-align="center"/>
    </style:style>
    <style:style style:name="MP37" style:family="paragraph">
      <loext:graphic-properties draw:fill-color="#9beded" draw:opacity="100%"/>
      <style:paragraph-properties fo:text-align="center"/>
    </style:style>
    <style:style style:name="MP38" style:family="paragraph">
      <loext:graphic-properties draw:fill-color="#08bab7" draw:opacity="100%"/>
      <style:paragraph-properties fo:text-align="center"/>
    </style:style>
    <style:style style:name="MP39" style:family="paragraph">
      <style:text-properties fo:hyphenate="false" loext:hyphenation-no-caps="false" loext:hyphenation-no-last-word="false"/>
    </style:style>
    <style:style style:name="MP40" style:family="paragraph">
      <style:paragraph-properties fo:margin-left="0cm" fo:margin-right="0cm" fo:margin-top="0.248cm" fo:margin-bottom="0cm" fo:line-height="90%" fo:text-align="start" fo:text-indent="0cm" style:punctuation-wrap="hanging" loext:tab-stop-distance="0cm" style:writing-mode="lr-tb">
        <style:tab-stops/>
      </style:paragraph-properties>
      <style:text-properties fo:hyphenate="false" loext:hyphenation-no-caps="false" loext:hyphenation-no-last-word="false"/>
    </style:style>
    <style:style style:name="MP41" style:family="paragraph">
      <loext:graphic-properties draw:fill="solid" draw:fill-color="#03317f"/>
      <style:paragraph-properties fo:text-align="center"/>
    </style:style>
    <style:style style:name="MP42" style:family="paragraph">
      <loext:graphic-properties draw:fill="solid" draw:fill-color="#a5d2fc"/>
      <style:paragraph-properties fo:text-align="center"/>
    </style:style>
    <style:style style:name="MP43" style:family="paragraph">
      <loext:graphic-properties draw:fill="solid" draw:fill-color="#55aaff"/>
      <style:paragraph-properties fo:text-align="center"/>
    </style:style>
    <style:style style:name="MP44" style:family="paragraph">
      <loext:graphic-properties draw:fill="solid" draw:fill-color="#c06cc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45" style:family="paragraph">
      <loext:graphic-properties draw:fill="solid" draw:fill-color="#55a8f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46" style:family="paragraph">
      <loext:graphic-properties draw:fill="solid" draw:fill-color="#042f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47" style:family="paragraph">
      <loext:graphic-properties draw:fill-color="#ffffff"/>
      <style:paragraph-properties fo:text-align="center"/>
    </style:style>
    <style:style style:name="MP48" style:family="paragraph">
      <loext:graphic-properties draw:fill="solid" draw:fill-color="#238bfe"/>
      <style:paragraph-properties fo:text-align="center"/>
    </style:style>
    <style:style style:name="MP49" style:family="paragraph">
      <loext:graphic-properties draw:fill="solid" draw:fill-color="#174695"/>
      <style:paragraph-properties fo:text-align="center"/>
    </style:style>
    <style:style style:name="MT1" style:family="text">
      <style:text-properties fo:font-size="14pt" style:font-size-asian="14pt" style:font-size-complex="14pt"/>
    </style:style>
    <style:style style:name="MT2" style:family="text">
      <style:text-properties fo:color="#145cbf" loext:opacity="100%" style:font-name="Open Sans4" fo:font-size="12pt" fo:font-weight="normal" style:font-size-asian="12pt" style:font-weight-asian="normal" style:font-size-complex="12pt" style:font-weight-complex="normal"/>
    </style:style>
    <style:style style:name="MT3" style:family="text">
      <style:text-properties fo:color="#4c4c4c" loext:opacity="100%" fo:font-size="9pt" style:font-size-asian="14pt" style:font-size-complex="14pt"/>
    </style:style>
    <style:style style:name="MT4" style:family="text">
      <style:text-properties style:font-name="Open Sans4" fo:font-size="11pt" style:font-size-asian="11pt" style:font-size-complex="11pt"/>
    </style:style>
    <style:style style:name="MT5" style:family="text">
      <style:text-properties fo:font-variant="normal" fo:text-transform="none" fo:color="#000000" loext:opacity="100%" style:text-outline="false" style:text-line-through-style="none" style:text-line-through-type="none" style:text-position="0% 100%" style:font-name="Open Sans1" fo:font-size="14pt" fo:letter-spacing="normal" fo:language="fr" fo:country="FR" fo:font-style="italic"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MT6" style:family="text">
      <style:text-properties fo:font-size="15pt" style:font-size-asian="15pt" style:font-size-complex="15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2cm" text:min-label-width="0.4cm"/>
        <style:text-properties fo:font-family="Marianne" style:font-style-name="Regular" style:use-window-font-color="true" fo:font-size="50%"/>
      </text:list-level-style-bullet>
      <text:list-level-style-number text:level="5" style:num-format="">
        <style:list-level-properties/>
        <style:text-properties style:use-window-font-color="true" fo:font-size="25%"/>
      </text:list-level-style-number>
      <text:list-level-style-number text:level="6" style:num-format="">
        <style:list-level-properties/>
        <style:text-properties style:use-window-font-color="true" fo:font-size="25%"/>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fo:color="#268dff" fo:font-size="100%"/>
      </text:list-level-style-number>
      <text:list-level-style-number text:level="2" style:num-format="">
        <style:list-level-properties/>
        <style:text-properties fo:color="#ae48c0" fo:font-size="100%"/>
      </text:list-level-style-number>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ML6">
      <text:list-level-style-number text:level="1" style:num-format="">
        <style:list-level-properties/>
        <style:text-properties style:use-window-font-color="true" fo:font-size="240%"/>
      </text:list-level-style-number>
      <text:list-level-style-number text:level="2" style:num-format="">
        <style:list-level-properties/>
        <style:text-properties style:use-window-font-color="true" fo:font-size="100%"/>
      </text:list-level-style-number>
      <text:list-level-style-number text:level="3" style:num-format="">
        <style:list-level-properties/>
        <style:text-properties style:use-window-font-color="true" fo:font-size="100%"/>
      </text:list-level-style-number>
      <text:list-level-style-number text:level="4" style:num-format="">
        <style:list-level-properties/>
        <style:text-properties style:use-window-font-color="true" fo:font-size="100%"/>
      </text:list-level-style-number>
      <text:list-level-style-number text:level="5" style:num-format="">
        <style:list-level-properties/>
        <style:text-properties style:use-window-font-color="true" fo:font-size="100%"/>
      </text:list-level-style-number>
      <text:list-level-style-number text:level="6" style:num-format="">
        <style:list-level-properties/>
        <style:text-properties style:use-window-font-color="true" fo:font-size="100%"/>
      </text:list-level-style-number>
      <text:list-level-style-number text:level="7" style:num-format="">
        <style:list-level-properties/>
        <style:text-properties style:use-window-font-color="true" fo:font-size="100%"/>
      </text:list-level-style-number>
      <text:list-level-style-number text:level="8" style:num-format="">
        <style:list-level-properties/>
        <style:text-properties style:use-window-font-color="true" fo:font-size="100%"/>
      </text:list-level-style-number>
      <text:list-level-style-number text:level="9" style:num-format="">
        <style:list-level-properties/>
        <style:text-properties style:use-window-font-color="true" fo:font-size="100%"/>
      </text:list-level-style-number>
      <text:list-level-style-number text:level="10" style:num-format="">
        <style:list-level-properties/>
        <style:text-properties style:use-window-font-color="true" fo:font-size="100%"/>
      </text:list-level-style-number>
    </text:list-style>
    <text:list-style style:name="ML7">
      <text:list-level-style-bullet text:level="1" text:bullet-char="|">
        <style:list-level-properties/>
        <style:text-properties fo:font-family="Marianne" style:font-style-name="Regular" fo:color="#268dff" fo:font-size="100%"/>
      </text:list-level-style-bullet>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style:text-properties style:use-window-font-color="true" fo:font-size="30%"/>
      </text:list-level-style-number>
      <text:list-level-style-bullet text:level="4" text:bullet-char="●">
        <style:list-level-properties text:space-before="-0.3cm" text:min-label-width="0.55cm"/>
        <style:text-properties fo:font-family="OpenSymbol" style:use-window-font-color="true" fo:font-size="50%"/>
      </text:list-level-style-bullet>
      <text:list-level-style-bullet text:level="5" text:bullet-char="–">
        <style:list-level-properties text:space-before="0.4cm" text:min-label-width="0.6cm"/>
        <style:text-properties fo:font-family="Marianne" style:font-style-name="Regular" style:use-window-font-color="true" fo:font-size="45%"/>
      </text:list-level-style-bullet>
      <text:list-level-style-number text:level="6" style:num-format="">
        <style:list-level-properties/>
        <style:text-properties style:use-window-font-color="true" fo:font-size="50%"/>
      </text:list-level-style-number>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ML8">
      <text:list-level-style-bullet text:level="1" text:bullet-char="|">
        <style:list-level-properties text:space-before="-0.6cm" text:min-label-width="0.6cm"/>
        <style:text-properties fo:font-family="Marianne" style:font-style-name="Regular" fo:color="#268dff" fo:font-size="100%"/>
      </text:list-level-style-bullet>
      <text:list-level-style-bullet text:level="2" text:bullet-char="|">
        <style:list-level-properties text:space-before="-0.6cm" text:min-label-width="0.6cm"/>
        <style:text-properties fo:font-family="Marianne" style:font-style-name="Regular" fo:color="#ae48c0" fo:font-size="100%"/>
      </text:list-level-style-bullet>
      <text:list-level-style-number text:level="3" style:num-format="">
        <style:list-level-properties/>
        <style:text-properties style:use-window-font-color="true" fo:font-size="30%"/>
      </text:list-level-style-number>
      <text:list-level-style-number text:level="4" style:num-format="">
        <style:list-level-properties/>
        <style:text-properties style:use-window-font-color="true" fo:font-size="50%"/>
      </text:list-level-style-number>
      <text:list-level-style-bullet text:level="5" text:bullet-char="•">
        <style:list-level-properties text:space-before="-0.4cm" text:min-label-width="0.4cm"/>
        <style:text-properties fo:font-family="Marianne" style:font-style-name="Regular" style:use-window-font-color="true" fo:font-size="50%"/>
      </text:list-level-style-bullet>
      <text:list-level-style-bullet text:level="6" text:bullet-char="–">
        <style:list-level-properties text:min-label-width="0.6cm"/>
        <style:text-properties fo:font-family="Marianne" style:font-style-name="Regular" fo:color="#ae48c0" fo:font-size="50%"/>
      </text:list-level-style-bullet>
      <text:list-level-style-number text:level="7" style:num-format="">
        <style:list-level-properties/>
        <style:text-properties style:use-window-font-color="true" fo:font-size="25%"/>
      </text:list-level-style-number>
      <text:list-level-style-number text:level="8" style:num-format="">
        <style:list-level-properties/>
        <style:text-properties style:use-window-font-color="true" fo:font-size="25%"/>
      </text:list-level-style-number>
      <text:list-level-style-number text:level="9" style:num-format="">
        <style:list-level-properties/>
        <style:text-properties style:use-window-font-color="true" fo:font-size="25%"/>
      </text:list-level-style-number>
      <text:list-level-style-number text:level="10" style:num-format="">
        <style:list-level-properties/>
        <style:text-properties style:use-window-font-color="true" fo:font-size="25%"/>
      </text:list-level-style-number>
    </text:list-style>
    <text:list-style style:name="ML9">
      <text:list-level-style-number text:level="1" style:num-format="">
        <style:list-level-properties/>
        <style:text-properties style:use-window-font-color="true" fo:font-size="45%"/>
      </text:list-level-style-number>
      <text:list-level-style-bullet text:level="2" text:bullet-char="|">
        <style:list-level-properties text:space-before="0.3cm"/>
        <style:text-properties fo:font-family="OpenSymbol" style:font-style-name="Regular" fo:color="#9827b5" fo:font-size="100%"/>
      </text:list-level-style-bullet>
      <text:list-level-style-number text:level="3" style:num-format="">
        <style:list-level-properties text:space-before="0.3cm"/>
        <style:text-properties fo:color="#268dff" fo:font-size="45%"/>
      </text:list-level-style-number>
      <text:list-level-style-number text:level="4" style:num-format="">
        <style:list-level-properties text:space-before="0.3cm"/>
        <style:text-properties style:use-window-font-color="true" fo:font-size="75%"/>
      </text:list-level-style-number>
      <text:list-level-style-number text:level="5" style:num-format="">
        <style:list-level-properties text:space-before="0.3cm"/>
        <style:text-properties style:use-window-font-color="true" fo:font-size="45%"/>
      </text:list-level-style-number>
      <text:list-level-style-number text:level="6" style:num-format="">
        <style:list-level-properties text:space-before="0.3cm"/>
        <style:text-properties style:use-window-font-color="true" fo:font-size="45%"/>
      </text:list-level-style-number>
      <text:list-level-style-number text:level="7" style:num-format="">
        <style:list-level-properties text:space-before="0.3cm"/>
        <style:text-properties style:use-window-font-color="true" fo:font-size="45%"/>
      </text:list-level-style-number>
      <text:list-level-style-number text:level="8" style:num-format="">
        <style:list-level-properties text:space-before="0.3cm"/>
        <style:text-properties style:use-window-font-color="true" fo:font-size="45%"/>
      </text:list-level-style-number>
      <text:list-level-style-number text:level="9" style:num-format="">
        <style:list-level-properties text:space-before="0.3cm"/>
        <style:text-properties style:use-window-font-color="true" fo:font-size="45%"/>
      </text:list-level-style-number>
      <text:list-level-style-number text:level="10" style:num-format="">
        <style:list-level-properties text:space-before="0.3cm"/>
        <style:text-properties style:use-window-font-color="true" fo:font-size="45%"/>
      </text:list-level-style-number>
    </text:list-style>
    <text:list-style style:name="ML10">
      <text:list-level-style-number text:level="1" style:num-format="">
        <style:list-level-properties/>
        <style:text-properties style:use-window-font-color="true" fo:font-size="45%"/>
      </text:list-level-style-number>
      <text:list-level-style-bullet text:level="2" text:bullet-char="|">
        <style:list-level-properties text:space-before="0.3cm"/>
        <style:text-properties fo:font-family="OpenSymbol" style:font-style-name="Regular" fo:color="#9827b5" fo:font-size="100%"/>
      </text:list-level-style-bullet>
      <text:list-level-style-number text:level="3" style:num-format="">
        <style:list-level-properties text:space-before="0.3cm"/>
        <style:text-properties fo:color="#268dff" fo:font-size="45%"/>
      </text:list-level-style-number>
      <text:list-level-style-number text:level="4" style:num-format="">
        <style:list-level-properties text:space-before="0.3cm"/>
        <style:text-properties style:use-window-font-color="true" fo:font-size="75%"/>
      </text:list-level-style-number>
      <text:list-level-style-number text:level="5" style:num-format="">
        <style:list-level-properties text:space-before="0.3cm"/>
        <style:text-properties style:use-window-font-color="true" fo:font-size="45%"/>
      </text:list-level-style-number>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5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5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style:handout-master>
    <style:master-page style:name="Page_20_de_20_garde" style:display-name="Page de garde"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Title 1" presentation:style-name="Mpr1" draw:text-style-name="MP6" draw:layer="backgroundobjects" svg:width="15.586cm" svg:height="3.682cm" svg:x="1.914cm" svg:y="6.471cm" presentation:class="title" presentation:user-transformed="true">
        <draw:text-box>
          <text:p text:style-name="MP5">Click to edit Master title style</text:p>
        </draw:text-box>
      </draw:frame>
      <draw:frame draw:name="Graphic 9" draw:style-name="Mgr3" draw:text-style-name="MP7" draw:layer="backgroundobjects" svg:width="6.299cm" svg:height="2.104cm" svg:x="1.933cm" svg:y="1.581cm">
        <draw:image xlink:href="Pictures/1000255900002C0000000ECFE4AF7E9C.svg" xlink:type="simple" xlink:show="embed" xlink:actuate="onLoad" draw:mime-type="image/svg+xml">
          <text:p/>
        </draw:image>
        <draw:image xlink:href="Pictures/1000000100000214000000B355D5A2CE.png" xlink:type="simple" xlink:show="embed" xlink:actuate="onLoad" draw:mime-type="image/png"/>
      </draw:frame>
      <draw:frame presentation:style-name="Page_20_de_20_garde-outline1" draw:layer="backgroundobjects" svg:width="14.469cm" svg:height="2.232cm" svg:x="1.984cm" svg:y="10.582cm" presentation:class="outline" presentation:placeholder="true">
        <draw:text-box/>
      </draw:frame>
      <draw:g draw:style-name="Mgr4">
        <draw:polygon draw:style-name="Mgr5" draw:text-style-name="MP8" draw:layer="backgroundobjects" svg:width="7.672cm" svg:height="7.09cm" svg:x="18.452cm" svg:y="-0.438cm" svg:viewBox="0 0 7673 7091" draw:points="0,5144 7673,7091 3370,0 2802,516 2270,1074 1777,1671 1325,2305 918,2972 560,3669 252,4394">
          <text:p/>
        </draw:polygon>
        <draw:polygon draw:style-name="Mgr6" draw:text-style-name="MP9" draw:layer="backgroundobjects" svg:width="11.008cm" svg:height="12.472cm" svg:x="18.008cm" svg:y="6.022cm" svg:viewBox="0 0 11009 12473" draw:points="11009,12473 11009,2756 144,0 0,1252 14,2477 176,3667 476,4814 903,5911 1446,6951 2096,7925 2841,8825 3671,9644 4577,10375 5549,11010 6574,11541 7643,11961 8746,12260 9871,12434">
          <text:p/>
        </draw:polygon>
        <draw:polygon draw:style-name="Mgr7" draw:text-style-name="MP10" draw:layer="backgroundobjects" svg:width="6.387cm" svg:height="21.603cm" svg:x="22.958cm" svg:y="-3.106cm" svg:viewBox="0 0 6388 21604" draw:points="6188,0 5378,33 4556,122 3733,267 2920,471 2129,735 1371,1060 657,1448 321,1665 0,1898 6059,11885 6059,21600 6388,21604 6388,2">
          <text:p/>
        </draw:polygon>
      </draw:g>
      <draw:frame presentation:style-name="Mpr2" draw:text-style-name="MP12" draw:layer="backgroundobjects" svg:width="2.798cm" svg:height="0.652cm" svg:x="2cm" svg:y="13.5cm">
        <draw:text-box>
          <text:p text:style-name="MP11"><text:span text:style-name="MT2">22/10/2025</text:span></text:p>
        </draw:text-box>
      </draw:frame>
      <presentation:notes style:page-layout-name="PM0">
        <draw:page-thumbnail presentation:style-name="Page_20_de_20_garde-title" draw:layer="backgroundobjects" svg:width="19.6cm" svg:height="11.67cm" svg:x="0.7cm" svg:y="0.699cm" presentation:class="page"/>
        <draw:frame presentation:style-name="Mpr3" draw:text-style-name="MP13" draw:layer="backgroundobjects" svg:width="19.6cm" svg:height="16.562cm" svg:x="0.7cm" svg:y="12.599cm" presentation:class="notes">
          <draw:text-box>
            <text:p>Cliquez pour modifier le format des notes</text:p>
          </draw:text-box>
        </draw:frame>
        <draw:frame presentation:style-name="Mpr4" draw:text-style-name="MP15" draw:layer="backgroundobjects" svg:width="12.9cm" svg:height="0.6cm" svg:x="0cm" svg:y="0cm" presentation:class="header">
          <draw:text-box>
            <text:p text:style-name="MP14"><text:span text:style-name="MT3"><presentation:header/></text:span></text:p>
          </draw:text-box>
        </draw:frame>
        <draw:frame presentation:style-name="Mpr4" draw:text-style-name="MP17" draw:layer="backgroundobjects" svg:width="7.9cm" svg:height="0.6cm" svg:x="13.1cm" svg:y="0cm" presentation:class="date-time">
          <draw:text-box>
            <text:p text:style-name="MP16"><text:span text:style-name="MT3"><presentation:date-time/></text:span></text:p>
          </draw:text-box>
        </draw:frame>
        <draw:frame presentation:style-name="Mpr5" draw:text-style-name="MP15" draw:layer="backgroundobjects" svg:width="13.5cm" svg:height="0.726cm" svg:x="0cm" svg:y="28.973cm" presentation:class="footer">
          <draw:text-box>
            <text:p text:style-name="MP14"><text:span text:style-name="MT3"><presentation:footer/></text:span></text:p>
          </draw:text-box>
        </draw:frame>
        <draw:frame presentation:style-name="Mpr5"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Chapitre_20_B" style:display-name="Chapitre B" style:page-layout-name="PM1" draw:style-name="Mdp2">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g draw:style-name="Mgr8">
        <draw:polygon presentation:style-name="Mpr6" draw:text-style-name="MP18" draw:layer="backgroundobjects" svg:width="4.835cm" svg:height="5.732cm" draw:transform="rotate (0.056025068989018) translate (23.534574277035cm 7.89707270642162cm)" svg:viewBox="0 0 4836 5733" draw:points="4836,1314 4596,1186 4352,1065 4105,949 3857,839 3604,737 3350,641 3093,550 2834,466 2573,389 2311,319 2045,256 1780,198 1512,149 1244,105 975,69 704,39 433,16 161,0 0,3707 178,3717 355,3732 532,3752 708,3776 884,3805 1059,3837 1233,3874 1406,3916 1577,3962 1748,4012 1917,4067 2086,4126 2252,4189 2417,4256 2580,4327 2741,4403 2901,4483 3057,4566 3213,4654 3365,4746 3516,4841 3664,4940 3809,5042 3952,5149 4092,5259 4229,5372 4363,5490 4496,5610 4624,5733">
          <text:p/>
        </draw:polygon>
        <draw:polygon presentation:style-name="Mpr7" draw:text-style-name="MP19" draw:layer="backgroundobjects" svg:width="6.986cm" svg:height="5.918cm" draw:transform="rotate (0.0146607657167524) translate (15.2613825564559cm 8.22785563020109cm)" svg:viewBox="0 0 6987 5919" draw:points="6820,0 6543,32 6267,72 5993,119 5719,173 5447,234 5177,302 4908,377 4642,459 4378,547 4116,643 3857,745 3601,854 3346,970 3096,1092 2849,1220 2605,1355 2364,1496 2128,1644 1894,1797 1666,1956 1442,2122 1221,2293 1006,2470 795,2652 589,2839 388,3032 191,3231 0,3433 2440,5919 2565,5777 2695,5641 2827,5507 2963,5377 3103,5250 3245,5127 3391,5008 3539,4892 3691,4781 3845,4673 4003,4568 4163,4470 4325,4374 4491,4283 4658,4196 4826,4114 4998,4035 5172,3962 5346,3893 5523,3828 5702,3768 5882,3713 6064,3663 6247,3616 6430,3575 6615,3538 6801,3507 6987,3480">
          <text:p/>
        </draw:polygon>
        <draw:polygon presentation:style-name="Mpr8" draw:text-style-name="MP20" draw:layer="backgroundobjects" svg:width="3.76cm" svg:height="3.687cm" draw:transform="rotate (0.858178393205612) translate (12.1876593701971cm 15.4951996636cm)" svg:viewBox="0 0 3761 3688" draw:points="3498,0 3220,26 2943,58 2668,98 2393,145 2120,198 1847,260 1577,327 1309,403 1042,485 778,573 516,669 256,771 0,879 2463,3688 2645,3642 2830,3600 3014,3564 3200,3533 3386,3505 3574,3484 3761,3466">
          <text:p/>
        </draw:polygon>
        <draw:g draw:style-name="Mgr4">
          <draw:polygon presentation:style-name="Mpr9" draw:text-style-name="MP21" draw:layer="backgroundobjects" svg:width="6.735cm" svg:height="5.261cm" draw:transform="skewX (-0.00279252680319093) rotate (-3.077015471266) translate (5.97377773156134cm 7.36706436689431cm)" svg:viewBox="0 0 6736 5262" draw:points="6736,2548 6523,2374 6304,2207 6083,2043 5857,1886 5626,1735 5393,1588 5156,1448 4916,1315 4671,1186 4423,1065 4172,949 3919,840 3663,737 3404,641 3144,551 2880,467 2615,389 2348,320 2079,256 1809,198 1537,149 1265,105 990,69 716,39 441,16 165,0 0,3710 181,3720 361,3735 540,3754 719,3778 898,3806 1076,3840 1252,3876 1429,3918 1603,3964 1777,4015 1949,4069 2120,4128 2289,4192 2457,4259 2622,4331 2786,4406 2948,4485 3108,4570 3265,4657 3421,4749 3574,4844 3724,4942 3871,5045 4017,5152 4159,5262">
            <text:p/>
          </draw:polygon>
          <draw:polygon presentation:style-name="Mpr10" draw:text-style-name="MP22" draw:layer="backgroundobjects" svg:width="7.101cm" svg:height="5.919cm" draw:transform="skewX (-0.00122173047639603) rotate (-3.12954988175103) translate (14.1072558835088cm 7.22050869971732cm)" svg:viewBox="0 0 7102 5920" draw:points="6933,0 6652,32 6371,72 6092,119 5814,173 5537,233 5263,302 4990,376 4719,458 4451,546 4184,642 3920,744 3660,852 3402,969 3147,1091 2896,1219 2647,1354 2403,1496 2163,1642 1926,1796 1694,1955 1466,2121 1242,2292 1023,2469 809,2651 599,2838 394,3031 194,3229 0,3432 2480,5920 2607,5779 2739,5642 2874,5508 3012,5378 3154,5251 3298,5128 3446,5009 3598,4894 3752,4782 3909,4674 4069,4570 4231,4471 4396,4375 4564,4284 4734,4198 4906,4115 5081,4036 5257,3964 5435,3894 5614,3830 5796,3769 5979,3715 6164,3664 6349,3618 6537,3577 6723,3540 6913,3509 7102,3482">
            <text:p/>
          </draw:polygon>
          <draw:polygon presentation:style-name="Mpr8" draw:text-style-name="MP20" draw:layer="backgroundobjects" svg:width="3.787cm" svg:height="3.724cm" draw:transform="skewX (-0.0146607657167525) rotate (-2.32931641971163) translate (17.454714625878cm 0.101232288347253cm)" svg:viewBox="0 0 3788 3725" draw:points="3521,0 3241,26 2963,59 2685,99 2409,146 2134,201 1859,262 1587,330 1317,406 1049,489 784,578 519,674 258,778 0,887 2482,3725 2665,3679 2851,3637 3037,3600 3223,3568 3411,3541 3600,3519 3788,3502">
            <text:p/>
          </draw:polygon>
          <draw:polygon presentation:style-name="Mpr11" draw:text-style-name="MP23" draw:layer="backgroundobjects" svg:width="1.305cm" svg:height="1.894cm" draw:transform="skewX (0.0155334303427496) rotate (2.5249678288602) translate (-0.375819429744949cm 3.01865852830629cm)" svg:viewBox="0 0 1306 1895" draw:points="158,0 1134,1349 1306,1895 1123,1849 937,1807 751,1770 565,1738 377,1711 188,1689 0,1672">
            <text:p/>
          </draw:polygon>
        </draw:g>
      </draw:g>
      <draw:frame draw:name="Picture Placeholder 9" presentation:style-name="Mpr12" draw:layer="backgroundobjects" svg:width="20cm" svg:height="6.7cm" svg:x="3cm" svg:y="8.7cm" presentation:class="outline" presentation:user-transformed="tru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Chapitre_20_B-title" draw:layer="backgroundobjects" svg:width="10cm" svg:height="7cm" svg:x="3cm" svg:y="1.4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frame presentation:style-name="Mpr13" draw:text-style-name="MP26" draw:layer="backgroundobjects" svg:width="2.099cm" svg:height="0.652cm" svg:x="25.001cm" svg:y="14.548cm">
        <draw:text-box>
          <text:p text:style-name="MP25"><text:span text:style-name="MT4"><text:page-number>&lt;numéro&gt;</text:page-number></text:span></text:p>
        </draw:text-box>
      </draw:frame>
      <presentation:notes style:page-layout-name="PM0">
        <draw:page-thumbnail presentation:style-name="Chapitre_20_B-title" draw:layer="backgroundobjects" svg:width="19.6cm" svg:height="11.67cm" svg:x="0.7cm" svg:y="0.699cm" presentation:class="page"/>
        <draw:frame presentation:style-name="Mpr14" draw:text-style-name="MP13" draw:layer="backgroundobjects" svg:width="19.6cm" svg:height="16.562cm" svg:x="0.7cm" svg:y="12.599cm" presentation:class="notes">
          <draw:text-box>
            <text:p>Cliquez pour modifier le format des notes</text:p>
          </draw:text-box>
        </draw:frame>
        <draw:frame presentation:style-name="Mpr15" draw:text-style-name="MP15" draw:layer="backgroundobjects" svg:width="12.9cm" svg:height="0.6cm" svg:x="0cm" svg:y="0cm" presentation:class="header">
          <draw:text-box>
            <text:p text:style-name="MP14"><text:span text:style-name="MT3"><presentation:header/></text:span></text:p>
          </draw:text-box>
        </draw:frame>
        <draw:frame presentation:style-name="Mpr15" draw:text-style-name="MP17" draw:layer="backgroundobjects" svg:width="7.9cm" svg:height="0.6cm" svg:x="13.1cm" svg:y="0cm" presentation:class="date-time">
          <draw:text-box>
            <text:p text:style-name="MP16"><text:span text:style-name="MT3"><presentation:date-time/></text:span></text:p>
          </draw:text-box>
        </draw:frame>
        <draw:frame presentation:style-name="Mpr16" draw:text-style-name="MP15" draw:layer="backgroundobjects" svg:width="13.5cm" svg:height="0.726cm" svg:x="0cm" svg:y="28.973cm" presentation:class="footer">
          <draw:text-box>
            <text:p text:style-name="MP14"><text:span text:style-name="MT3"><presentation:footer/></text:span></text:p>
          </draw:text-box>
        </draw:frame>
        <draw:frame presentation:style-name="Mpr16"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Chapitre_20_V" style:display-name="Chapitre V" style:page-layout-name="PM1" draw:style-name="Mdp3">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g draw:style-name="Mgr4">
        <draw:polygon presentation:style-name="Mpr17" draw:text-style-name="MP27" draw:layer="backgroundobjects" svg:width="4.835cm" svg:height="5.732cm" draw:transform="rotate (0.056025068989018) translate (23.505574277035cm 7.89207270642162cm)" svg:viewBox="0 0 4836 5733" draw:points="4836,1314 4596,1186 4352,1065 4105,949 3857,839 3604,737 3350,641 3093,550 2834,466 2573,389 2311,319 2045,256 1780,198 1512,149 1244,105 975,69 704,39 433,16 161,0 0,3707 178,3717 355,3732 532,3752 708,3776 884,3805 1059,3837 1233,3874 1406,3916 1577,3962 1748,4012 1917,4067 2086,4126 2252,4189 2417,4256 2580,4327 2741,4403 2901,4483 3057,4566 3213,4654 3365,4746 3516,4841 3664,4940 3809,5042 3952,5149 4092,5259 4229,5372 4363,5490 4496,5610 4624,5733">
          <text:p/>
        </draw:polygon>
        <draw:polygon presentation:style-name="Mpr18" draw:text-style-name="MP28" draw:layer="backgroundobjects" svg:width="6.986cm" svg:height="5.918cm" draw:transform="rotate (0.0146607657167524) translate (15.2323825564559cm 8.22285563020109cm)" svg:viewBox="0 0 6987 5919" draw:points="6820,0 6543,32 6267,72 5993,119 5719,173 5447,234 5177,302 4908,377 4642,459 4378,547 4116,643 3857,745 3601,854 3346,970 3096,1092 2849,1220 2605,1355 2364,1496 2128,1644 1894,1797 1666,1956 1442,2122 1221,2293 1006,2470 795,2652 589,2839 388,3032 191,3231 0,3433 2440,5919 2565,5777 2695,5641 2827,5507 2963,5377 3103,5250 3245,5127 3391,5008 3539,4892 3691,4781 3845,4673 4003,4568 4163,4470 4325,4374 4491,4283 4658,4196 4826,4114 4998,4035 5172,3962 5346,3893 5523,3828 5702,3768 5882,3713 6064,3663 6247,3616 6430,3575 6615,3538 6801,3507 6987,3480">
          <text:p/>
        </draw:polygon>
        <draw:polygon presentation:style-name="Mpr19" draw:text-style-name="MP29" draw:layer="backgroundobjects" svg:width="3.76cm" svg:height="3.687cm" draw:transform="rotate (0.858178393205612) translate (12.1586593701971cm 15.4901996636cm)" svg:viewBox="0 0 3761 3688" draw:points="3498,0 3220,26 2943,58 2668,98 2393,145 2120,198 1847,260 1577,327 1309,403 1042,485 778,573 516,669 256,771 0,879 2463,3688 2645,3642 2830,3600 3014,3564 3200,3533 3386,3505 3574,3484 3761,3466">
          <text:p/>
        </draw:polygon>
        <draw:polygon presentation:style-name="Mpr20" draw:text-style-name="MP30" draw:layer="backgroundobjects" svg:width="6.735cm" svg:height="5.261cm" draw:transform="skewX (-0.00279252680319093) rotate (-3.077015471266) translate (6.01377773156134cm 7.36206436689431cm)" svg:viewBox="0 0 6736 5262" draw:points="6736,2548 6523,2374 6304,2207 6083,2043 5857,1886 5626,1735 5393,1588 5156,1448 4916,1315 4671,1186 4423,1065 4172,949 3919,840 3663,737 3404,641 3144,551 2880,467 2615,389 2348,320 2079,256 1809,198 1537,149 1265,105 990,69 716,39 441,16 165,0 0,3710 181,3720 361,3735 540,3754 719,3778 898,3806 1076,3840 1252,3876 1429,3918 1603,3964 1777,4015 1949,4069 2120,4128 2289,4192 2457,4259 2622,4331 2786,4406 2948,4485 3108,4570 3265,4657 3421,4749 3574,4844 3724,4942 3871,5045 4017,5152 4159,5262">
          <text:p/>
        </draw:polygon>
        <draw:polygon presentation:style-name="Mpr21" draw:text-style-name="MP31" draw:layer="backgroundobjects" svg:width="7.101cm" svg:height="5.919cm" draw:transform="skewX (-0.00122173047639603) rotate (-3.12954988175103) translate (14.1232558835088cm 7.21550869971739cm)" svg:viewBox="0 0 7102 5920" draw:points="6933,0 6652,32 6371,72 6092,119 5814,173 5537,233 5263,302 4990,376 4719,458 4451,546 4184,642 3920,744 3660,852 3402,969 3147,1091 2896,1219 2647,1354 2403,1496 2163,1642 1926,1796 1694,1955 1466,2121 1242,2292 1023,2469 809,2651 599,2838 394,3031 194,3229 0,3432 2480,5920 2607,5779 2739,5642 2874,5508 3012,5378 3154,5251 3298,5128 3446,5009 3598,4894 3752,4782 3909,4674 4069,4570 4231,4471 4396,4375 4564,4284 4734,4198 4906,4115 5081,4036 5257,3964 5435,3894 5614,3830 5796,3769 5979,3715 6164,3664 6349,3618 6537,3577 6723,3540 6913,3509 7102,3482">
          <text:p/>
        </draw:polygon>
        <draw:polygon presentation:style-name="Mpr22" draw:text-style-name="MP32" draw:layer="backgroundobjects" svg:width="3.787cm" svg:height="3.724cm" draw:transform="skewX (-0.0146607657167525) rotate (-2.32931641971163) translate (17.494714625878cm 0.0962322883472516cm)" svg:viewBox="0 0 3788 3725" draw:points="3521,0 3241,26 2963,59 2685,99 2409,146 2134,201 1859,262 1587,330 1317,406 1049,489 784,578 519,674 258,778 0,887 2482,3725 2665,3679 2851,3637 3037,3600 3223,3568 3411,3541 3600,3519 3788,3502">
          <text:p/>
        </draw:polygon>
        <draw:polygon presentation:style-name="Mpr22" draw:text-style-name="MP32" draw:layer="backgroundobjects" svg:width="1.305cm" svg:height="1.894cm" draw:transform="skewX (0.0155334303427496) rotate (2.5249678288602) translate (-0.335819429744949cm 3.01365852830629cm)" svg:viewBox="0 0 1306 1895" draw:points="158,0 1134,1349 1306,1895 1123,1849 937,1807 751,1770 565,1738 377,1711 188,1689 0,1672">
          <text:p/>
        </draw:polygon>
      </draw:g>
      <draw:frame draw:name="Picture Placeholder 9" presentation:style-name="Mpr23" draw:layer="backgroundobjects" svg:width="20cm" svg:height="6.7cm" svg:x="3cm" svg:y="8.7cm" presentation:class="outline" presentation:user-transformed="tru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Chapitre_20_V-title" draw:layer="backgroundobjects" svg:width="10cm" svg:height="7cm" svg:x="3cm" svg:y="1.4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frame presentation:style-name="Mpr24" draw:text-style-name="MP26" draw:layer="backgroundobjects" svg:width="2.099cm" svg:height="0.652cm" svg:x="25.001cm" svg:y="14.548cm">
        <draw:text-box>
          <text:p text:style-name="MP25"><text:span text:style-name="MT4"><text:page-number>&lt;numéro&gt;</text:page-number></text:span></text:p>
        </draw:text-box>
      </draw:frame>
      <presentation:notes style:page-layout-name="PM0">
        <draw:page-thumbnail presentation:style-name="Chapitre_20_V-title" draw:layer="backgroundobjects" svg:width="19.6cm" svg:height="11.67cm" svg:x="0.7cm" svg:y="0.699cm" presentation:class="page"/>
        <draw:frame presentation:style-name="Mpr25" draw:text-style-name="MP13" draw:layer="backgroundobjects" svg:width="19.6cm" svg:height="16.562cm" svg:x="0.7cm" svg:y="12.599cm" presentation:class="notes">
          <draw:text-box>
            <text:p>Cliquez pour modifier le format des notes</text:p>
          </draw:text-box>
        </draw:frame>
        <draw:frame presentation:style-name="Mpr26" draw:text-style-name="MP15" draw:layer="backgroundobjects" svg:width="12.9cm" svg:height="0.6cm" svg:x="0cm" svg:y="0cm" presentation:class="header">
          <draw:text-box>
            <text:p text:style-name="MP14"><text:span text:style-name="MT3"><presentation:header/></text:span></text:p>
          </draw:text-box>
        </draw:frame>
        <draw:frame presentation:style-name="Mpr26" draw:text-style-name="MP17" draw:layer="backgroundobjects" svg:width="7.9cm" svg:height="0.6cm" svg:x="13.1cm" svg:y="0cm" presentation:class="date-time">
          <draw:text-box>
            <text:p text:style-name="MP16"><text:span text:style-name="MT3"><presentation:date-time/></text:span></text:p>
          </draw:text-box>
        </draw:frame>
        <draw:frame presentation:style-name="Mpr27" draw:text-style-name="MP15" draw:layer="backgroundobjects" svg:width="13.5cm" svg:height="0.726cm" svg:x="0cm" svg:y="28.973cm" presentation:class="footer">
          <draw:text-box>
            <text:p text:style-name="MP14"><text:span text:style-name="MT3"><presentation:footer/></text:span></text:p>
          </draw:text-box>
        </draw:frame>
        <draw:frame presentation:style-name="Mpr27"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Chapitre_20_J" style:display-name="Chapitre J" style:page-layout-name="PM1" draw:style-name="Mdp4">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g draw:style-name="Mgr4">
        <draw:polygon presentation:style-name="Mpr28" draw:text-style-name="MP33" draw:layer="backgroundobjects" svg:width="4.835cm" svg:height="5.732cm" draw:transform="rotate (0.056025068989018) translate (23.506574277035cm 7.89207270642162cm)" svg:viewBox="0 0 4836 5733" draw:points="4836,1314 4596,1186 4352,1065 4105,949 3857,839 3604,737 3350,641 3093,550 2834,466 2573,389 2311,319 2045,256 1780,198 1512,149 1244,105 975,69 704,39 433,16 161,0 0,3707 178,3717 355,3732 532,3752 708,3776 884,3805 1059,3837 1233,3874 1406,3916 1577,3962 1748,4012 1917,4067 2086,4126 2252,4189 2417,4256 2580,4327 2741,4403 2901,4483 3057,4566 3213,4654 3365,4746 3516,4841 3664,4940 3809,5042 3952,5149 4092,5259 4229,5372 4363,5490 4496,5610 4624,5733">
          <text:p/>
        </draw:polygon>
        <draw:polygon presentation:style-name="Mpr29" draw:text-style-name="MP34" draw:layer="backgroundobjects" svg:width="6.986cm" svg:height="5.918cm" draw:transform="rotate (0.0146607657167524) translate (15.2333825564559cm 8.22285563020109cm)" svg:viewBox="0 0 6987 5919" draw:points="6820,0 6543,32 6267,72 5993,119 5719,173 5447,234 5177,302 4908,377 4642,459 4378,547 4116,643 3857,745 3601,854 3346,970 3096,1092 2849,1220 2605,1355 2364,1496 2128,1644 1894,1797 1666,1956 1442,2122 1221,2293 1006,2470 795,2652 589,2839 388,3032 191,3231 0,3433 2440,5919 2565,5777 2695,5641 2827,5507 2963,5377 3103,5250 3245,5127 3391,5008 3539,4892 3691,4781 3845,4673 4003,4568 4163,4470 4325,4374 4491,4283 4658,4196 4826,4114 4998,4035 5172,3962 5346,3893 5523,3828 5702,3768 5882,3713 6064,3663 6247,3616 6430,3575 6615,3538 6801,3507 6987,3480">
          <text:p/>
        </draw:polygon>
        <draw:polygon presentation:style-name="Mpr30" draw:text-style-name="MP35" draw:layer="backgroundobjects" svg:width="3.76cm" svg:height="3.687cm" draw:transform="rotate (0.858178393205612) translate (12.1596593701971cm 15.4901996636cm)" svg:viewBox="0 0 3761 3688" draw:points="3498,0 3220,26 2943,58 2668,98 2393,145 2120,198 1847,260 1577,327 1309,403 1042,485 778,573 516,669 256,771 0,879 2463,3688 2645,3642 2830,3600 3014,3564 3200,3533 3386,3505 3574,3484 3761,3466">
          <text:p/>
        </draw:polygon>
        <draw:polygon presentation:style-name="Mpr28" draw:text-style-name="MP33" draw:layer="backgroundobjects" svg:width="6.735cm" svg:height="5.261cm" draw:transform="skewX (-0.00279252680319093) rotate (-3.077015471266) translate (6.01477773156134cm 7.36206436689431cm)" svg:viewBox="0 0 6736 5262" draw:points="6736,2548 6523,2374 6304,2207 6083,2043 5857,1886 5626,1735 5393,1588 5156,1448 4916,1315 4671,1186 4423,1065 4172,949 3919,840 3663,737 3404,641 3144,551 2880,467 2615,389 2348,320 2079,256 1809,198 1537,149 1265,105 990,69 716,39 441,16 165,0 0,3710 181,3720 361,3735 540,3754 719,3778 898,3806 1076,3840 1252,3876 1429,3918 1603,3964 1777,4015 1949,4069 2120,4128 2289,4192 2457,4259 2622,4331 2786,4406 2948,4485 3108,4570 3265,4657 3421,4749 3574,4844 3724,4942 3871,5045 4017,5152 4159,5262">
          <text:p/>
        </draw:polygon>
        <draw:polygon presentation:style-name="Mpr29" draw:text-style-name="MP34" draw:layer="backgroundobjects" svg:width="7.101cm" svg:height="5.919cm" draw:transform="skewX (-0.00122173047639603) rotate (-3.12954988175103) translate (14.1482558835088cm 7.21550869971718cm)" svg:viewBox="0 0 7102 5920" draw:points="6933,0 6652,32 6371,72 6092,119 5814,173 5537,233 5263,302 4990,376 4719,458 4451,546 4184,642 3920,744 3660,852 3402,969 3147,1091 2896,1219 2647,1354 2403,1496 2163,1642 1926,1796 1694,1955 1466,2121 1242,2292 1023,2469 809,2651 599,2838 394,3031 194,3229 0,3432 2480,5920 2607,5779 2739,5642 2874,5508 3012,5378 3154,5251 3298,5128 3446,5009 3598,4894 3752,4782 3909,4674 4069,4570 4231,4471 4396,4375 4564,4284 4734,4198 4906,4115 5081,4036 5257,3964 5435,3894 5614,3830 5796,3769 5979,3715 6164,3664 6349,3618 6537,3577 6723,3540 6913,3509 7102,3482">
          <text:p/>
        </draw:polygon>
        <draw:polygon presentation:style-name="Mpr30" draw:text-style-name="MP35" draw:layer="backgroundobjects" svg:width="3.787cm" svg:height="3.724cm" draw:transform="skewX (-0.0146607657167525) rotate (-2.32931641971163) translate (17.495714625878cm 0.0962322883472807cm)" svg:viewBox="0 0 3788 3725" draw:points="3521,0 3241,26 2963,59 2685,99 2409,146 2134,201 1859,262 1587,330 1317,406 1049,489 784,578 519,674 258,778 0,887 2482,3725 2665,3679 2851,3637 3037,3600 3223,3568 3411,3541 3600,3519 3788,3502">
          <text:p/>
        </draw:polygon>
        <draw:polygon presentation:style-name="Mpr30" draw:text-style-name="MP35" draw:layer="backgroundobjects" svg:width="1.305cm" svg:height="1.894cm" draw:transform="skewX (0.0155334303427496) rotate (2.5249678288602) translate (-0.334819429744949cm 3.01365852830629cm)" svg:viewBox="0 0 1306 1895" draw:points="158,0 1134,1349 1306,1895 1123,1849 937,1807 751,1770 565,1738 377,1711 188,1689 0,1672">
          <text:p/>
        </draw:polygon>
      </draw:g>
      <draw:frame draw:name="Picture Placeholder 9" presentation:style-name="Mpr31" draw:layer="backgroundobjects" svg:width="20cm" svg:height="6.7cm" svg:x="3cm" svg:y="8.7cm" presentation:class="outline" presentation:user-transformed="tru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Chapitre_20_J-title" draw:layer="backgroundobjects" svg:width="10cm" svg:height="7cm" svg:x="3cm" svg:y="1.4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frame presentation:style-name="Mpr32" draw:text-style-name="MP26" draw:layer="backgroundobjects" svg:width="2.099cm" svg:height="0.652cm" svg:x="25.001cm" svg:y="14.548cm">
        <draw:text-box>
          <text:p text:style-name="MP25"><text:span text:style-name="MT4"><text:page-number>&lt;numéro&gt;</text:page-number></text:span></text:p>
        </draw:text-box>
      </draw:frame>
      <presentation:notes style:page-layout-name="PM0">
        <draw:page-thumbnail presentation:style-name="Chapitre_20_J-title" draw:layer="backgroundobjects" svg:width="19.6cm" svg:height="11.67cm" svg:x="0.7cm" svg:y="0.699cm" presentation:class="page"/>
        <draw:frame presentation:style-name="Mpr33" draw:text-style-name="MP13" draw:layer="backgroundobjects" svg:width="19.6cm" svg:height="16.562cm" svg:x="0.7cm" svg:y="12.599cm" presentation:class="notes">
          <draw:text-box>
            <text:p>Cliquez pour modifier le format des notes</text:p>
          </draw:text-box>
        </draw:frame>
        <draw:frame presentation:style-name="Mpr34" draw:text-style-name="MP15" draw:layer="backgroundobjects" svg:width="12.9cm" svg:height="0.6cm" svg:x="0cm" svg:y="0cm" presentation:class="header">
          <draw:text-box>
            <text:p text:style-name="MP14"><text:span text:style-name="MT3"><presentation:header/></text:span></text:p>
          </draw:text-box>
        </draw:frame>
        <draw:frame presentation:style-name="Mpr34" draw:text-style-name="MP17" draw:layer="backgroundobjects" svg:width="7.9cm" svg:height="0.6cm" svg:x="13.1cm" svg:y="0cm" presentation:class="date-time">
          <draw:text-box>
            <text:p text:style-name="MP16"><text:span text:style-name="MT3"><presentation:date-time/></text:span></text:p>
          </draw:text-box>
        </draw:frame>
        <draw:frame presentation:style-name="Mpr35" draw:text-style-name="MP15" draw:layer="backgroundobjects" svg:width="13.5cm" svg:height="0.726cm" svg:x="0cm" svg:y="28.973cm" presentation:class="footer">
          <draw:text-box>
            <text:p text:style-name="MP14"><text:span text:style-name="MT3"><presentation:footer/></text:span></text:p>
          </draw:text-box>
        </draw:frame>
        <draw:frame presentation:style-name="Mpr35"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Chapitre_20_T" style:display-name="Chapitre T"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g draw:style-name="Mgr4">
        <draw:polygon presentation:style-name="Mpr36" draw:text-style-name="MP36" draw:layer="backgroundobjects" svg:width="4.835cm" svg:height="5.732cm" draw:transform="rotate (0.056025068989018) translate (23.506574277035cm 7.86307270642162cm)" svg:viewBox="0 0 4836 5733" draw:points="4836,1314 4596,1186 4352,1065 4105,949 3857,839 3604,737 3350,641 3093,550 2834,466 2573,389 2311,319 2045,256 1780,198 1512,149 1244,105 975,69 704,39 433,16 161,0 0,3707 178,3717 355,3732 532,3752 708,3776 884,3805 1059,3837 1233,3874 1406,3916 1577,3962 1748,4012 1917,4067 2086,4126 2252,4189 2417,4256 2580,4327 2741,4403 2901,4483 3057,4566 3213,4654 3365,4746 3516,4841 3664,4940 3809,5042 3952,5149 4092,5259 4229,5372 4363,5490 4496,5610 4624,5733">
          <text:p/>
        </draw:polygon>
        <draw:polygon presentation:style-name="Mpr37" draw:text-style-name="MP37" draw:layer="backgroundobjects" svg:width="6.986cm" svg:height="5.918cm" draw:transform="rotate (0.0146607657167524) translate (15.2333825564559cm 8.19385563020109cm)" svg:viewBox="0 0 6987 5919" draw:points="6820,0 6543,32 6267,72 5993,119 5719,173 5447,234 5177,302 4908,377 4642,459 4378,547 4116,643 3857,745 3601,854 3346,970 3096,1092 2849,1220 2605,1355 2364,1496 2128,1644 1894,1797 1666,1956 1442,2122 1221,2293 1006,2470 795,2652 589,2839 388,3032 191,3231 0,3433 2440,5919 2565,5777 2695,5641 2827,5507 2963,5377 3103,5250 3245,5127 3391,5008 3539,4892 3691,4781 3845,4673 4003,4568 4163,4470 4325,4374 4491,4283 4658,4196 4826,4114 4998,4035 5172,3962 5346,3893 5523,3828 5702,3768 5882,3713 6064,3663 6247,3616 6430,3575 6615,3538 6801,3507 6987,3480">
          <text:p/>
        </draw:polygon>
        <draw:polygon presentation:style-name="Mpr38" draw:text-style-name="MP38" draw:layer="backgroundobjects" svg:width="3.76cm" svg:height="3.687cm" draw:transform="rotate (0.858178393205612) translate (12.1596593701971cm 15.4611996636cm)" svg:viewBox="0 0 3761 3688" draw:points="3498,0 3220,26 2943,58 2668,98 2393,145 2120,198 1847,260 1577,327 1309,403 1042,485 778,573 516,669 256,771 0,879 2463,3688 2645,3642 2830,3600 3014,3564 3200,3533 3386,3505 3574,3484 3761,3466">
          <text:p/>
        </draw:polygon>
        <draw:polygon presentation:style-name="Mpr36" draw:text-style-name="MP36" draw:layer="backgroundobjects" svg:width="6.735cm" svg:height="5.261cm" draw:transform="skewX (-0.00279252680319093) rotate (-3.077015471266) translate (6.01477773156134cm 7.33306436689431cm)" svg:viewBox="0 0 6736 5262" draw:points="6736,2548 6523,2374 6304,2207 6083,2043 5857,1886 5626,1735 5393,1588 5156,1448 4916,1315 4671,1186 4423,1065 4172,949 3919,840 3663,737 3404,641 3144,551 2880,467 2615,389 2348,320 2079,256 1809,198 1537,149 1265,105 990,69 716,39 441,16 165,0 0,3710 181,3720 361,3735 540,3754 719,3778 898,3806 1076,3840 1252,3876 1429,3918 1603,3964 1777,4015 1949,4069 2120,4128 2289,4192 2457,4259 2622,4331 2786,4406 2948,4485 3108,4570 3265,4657 3421,4749 3574,4844 3724,4942 3871,5045 4017,5152 4159,5262">
          <text:p/>
        </draw:polygon>
        <draw:polygon presentation:style-name="Mpr37" draw:text-style-name="MP37" draw:layer="backgroundobjects" svg:width="7.101cm" svg:height="5.919cm" draw:transform="skewX (-0.00122173047639603) rotate (-3.12954988175103) translate (14.1482558835088cm 7.18650869971724cm)" svg:viewBox="0 0 7102 5920" draw:points="6933,0 6652,32 6371,72 6092,119 5814,173 5537,233 5263,302 4990,376 4719,458 4451,546 4184,642 3920,744 3660,852 3402,969 3147,1091 2896,1219 2647,1354 2403,1496 2163,1642 1926,1796 1694,1955 1466,2121 1242,2292 1023,2469 809,2651 599,2838 394,3031 194,3229 0,3432 2480,5920 2607,5779 2739,5642 2874,5508 3012,5378 3154,5251 3298,5128 3446,5009 3598,4894 3752,4782 3909,4674 4069,4570 4231,4471 4396,4375 4564,4284 4734,4198 4906,4115 5081,4036 5257,3964 5435,3894 5614,3830 5796,3769 5979,3715 6164,3664 6349,3618 6537,3577 6723,3540 6913,3509 7102,3482">
          <text:p/>
        </draw:polygon>
        <draw:polygon presentation:style-name="Mpr38" draw:text-style-name="MP38" draw:layer="backgroundobjects" svg:width="3.787cm" svg:height="3.724cm" draw:transform="skewX (-0.0146607657167525) rotate (-2.32931641971163) translate (17.495714625878cm 0.0672322883472771cm)" svg:viewBox="0 0 3788 3725" draw:points="3521,0 3241,26 2963,59 2685,99 2409,146 2134,201 1859,262 1587,330 1317,406 1049,489 784,578 519,674 258,778 0,887 2482,3725 2665,3679 2851,3637 3037,3600 3223,3568 3411,3541 3600,3519 3788,3502">
          <text:p/>
        </draw:polygon>
        <draw:polygon presentation:style-name="Mpr38" draw:text-style-name="MP38" draw:layer="backgroundobjects" svg:width="1.305cm" svg:height="1.894cm" draw:transform="skewX (0.0155334303427496) rotate (2.5249678288602) translate (-0.334819429744949cm 2.98465852830629cm)" svg:viewBox="0 0 1306 1895" draw:points="158,0 1134,1349 1306,1895 1123,1849 937,1807 751,1770 565,1738 377,1711 188,1689 0,1672">
          <text:p/>
        </draw:polygon>
      </draw:g>
      <draw:frame draw:name="Picture Placeholder 9" presentation:style-name="Mpr39" draw:layer="backgroundobjects" svg:width="20cm" svg:height="6.7cm" svg:x="3cm" svg:y="8.7cm" presentation:class="outline" presentation:user-transformed="tru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Chapitre_20_T-title" draw:layer="backgroundobjects" svg:width="10cm" svg:height="7cm" svg:x="3cm" svg:y="1.4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frame presentation:style-name="Mpr40" draw:text-style-name="MP26" draw:layer="backgroundobjects" svg:width="2.099cm" svg:height="0.652cm" svg:x="25.001cm" svg:y="14.448cm">
        <draw:text-box>
          <text:p text:style-name="MP25"><text:span text:style-name="MT4"><text:page-number>&lt;numéro&gt;</text:page-number></text:span></text:p>
        </draw:text-box>
      </draw:frame>
      <presentation:notes style:page-layout-name="PM0">
        <draw:page-thumbnail presentation:style-name="Chapitre_20_T-title" draw:layer="backgroundobjects" svg:width="19.6cm" svg:height="11.67cm" svg:x="0.7cm" svg:y="0.699cm" presentation:class="page"/>
        <draw:frame presentation:style-name="Mpr41" draw:text-style-name="MP13" draw:layer="backgroundobjects" svg:width="19.6cm" svg:height="16.562cm" svg:x="0.7cm" svg:y="12.599cm" presentation:class="notes">
          <draw:text-box>
            <text:p>Cliquez pour modifier le format des notes</text:p>
          </draw:text-box>
        </draw:frame>
        <draw:frame presentation:style-name="Mpr42" draw:text-style-name="MP15" draw:layer="backgroundobjects" svg:width="12.9cm" svg:height="0.6cm" svg:x="0cm" svg:y="0cm" presentation:class="header">
          <draw:text-box>
            <text:p text:style-name="MP14"><text:span text:style-name="MT3"><presentation:header/></text:span></text:p>
          </draw:text-box>
        </draw:frame>
        <draw:frame presentation:style-name="Mpr42" draw:text-style-name="MP17" draw:layer="backgroundobjects" svg:width="7.9cm" svg:height="0.6cm" svg:x="13.1cm" svg:y="0cm" presentation:class="date-time">
          <draw:text-box>
            <text:p text:style-name="MP16"><text:span text:style-name="MT3"><presentation:date-time/></text:span></text:p>
          </draw:text-box>
        </draw:frame>
        <draw:frame presentation:style-name="Mpr43" draw:text-style-name="MP15" draw:layer="backgroundobjects" svg:width="13.5cm" svg:height="0.726cm" svg:x="0cm" svg:y="28.973cm" presentation:class="footer">
          <draw:text-box>
            <text:p text:style-name="MP14"><text:span text:style-name="MT3"><presentation:footer/></text:span></text:p>
          </draw:text-box>
        </draw:frame>
        <draw:frame presentation:style-name="Mpr43"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Sommaire"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Picture Placeholder 9" presentation:style-name="Mpr44" draw:layer="backgroundobjects" svg:width="25cm" svg:height="10.5cm" svg:x="1.2cm" svg:y="3.408cm" presentation:class="outline" presentation:user-transformed="tru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Sommaire-title" draw:layer="backgroundobjects" svg:width="25.101cm" svg:height="2.629cm" svg:x="1.199cm" svg:y="0.628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frame presentation:style-name="Mpr45" draw:text-style-name="MP26" draw:layer="backgroundobjects" svg:width="2.099cm" svg:height="0.652cm" svg:x="25.001cm" svg:y="14.548cm">
        <draw:text-box>
          <text:p text:style-name="MP25"><text:span text:style-name="MT4"><text:page-number>&lt;numéro&gt;</text:page-number></text:span></text:p>
        </draw:text-box>
      </draw:frame>
      <draw:frame presentation:style-name="Mpr45" draw:text-style-name="MP26" draw:layer="backgroundobjects" svg:width="19cm" svg:height="0.652cm" svg:x="6.803cm" svg:y="14.548cm">
        <draw:text-box>
          <text:p text:style-name="MP25"><text:span text:style-name="MT4"><text:s text:c="2"/></text:span><text:span text:style-name="MT4"><presentation:footer/></text:span></text:p>
        </draw:text-box>
      </draw:frame>
      <presentation:notes style:page-layout-name="PM0">
        <draw:page-thumbnail presentation:style-name="Sommaire-title" draw:layer="backgroundobjects" svg:width="19.6cm" svg:height="11.67cm" svg:x="0.7cm" svg:y="0.699cm" presentation:class="page"/>
        <draw:frame presentation:style-name="Mpr46" draw:text-style-name="MP13" draw:layer="backgroundobjects" svg:width="19.6cm" svg:height="16.562cm" svg:x="0.7cm" svg:y="12.599cm" presentation:class="notes">
          <draw:text-box>
            <text:p>Cliquez pour modifier le format des notes</text:p>
          </draw:text-box>
        </draw:frame>
        <draw:frame presentation:style-name="Mpr47" draw:text-style-name="MP15" draw:layer="backgroundobjects" svg:width="12.9cm" svg:height="0.6cm" svg:x="0cm" svg:y="0cm" presentation:class="header">
          <draw:text-box>
            <text:p text:style-name="MP14"><text:span text:style-name="MT3"><presentation:header/></text:span></text:p>
          </draw:text-box>
        </draw:frame>
        <draw:frame presentation:style-name="Mpr47" draw:text-style-name="MP17" draw:layer="backgroundobjects" svg:width="7.9cm" svg:height="0.6cm" svg:x="13.1cm" svg:y="0cm" presentation:class="date-time">
          <draw:text-box>
            <text:p text:style-name="MP16"><text:span text:style-name="MT3"><presentation:date-time/></text:span></text:p>
          </draw:text-box>
        </draw:frame>
        <draw:frame presentation:style-name="Mpr48" draw:text-style-name="MP15" draw:layer="backgroundobjects" svg:width="13.5cm" svg:height="0.726cm" svg:x="0cm" svg:y="28.973cm" presentation:class="footer">
          <draw:text-box>
            <text:p text:style-name="MP14"><text:span text:style-name="MT3"><presentation:footer/></text:span></text:p>
          </draw:text-box>
        </draw:frame>
        <draw:frame presentation:style-name="Mpr48"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Base_20_G2" style:display-name="Base G2"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Picture Placeholder 9" presentation:style-name="Mpr49" draw:text-style-name="MP39" draw:layer="backgroundobjects" svg:width="25.76cm" svg:height="10.5cm" svg:x="1.24cm" svg:y="3.72cm" presentation:class="outline" presentation:user-transformed="true">
        <draw:text-box>
          <text:list text:style-name="ML7">
            <text:list-item>
              <text:p text:style-name="MP39">Cliquez pour éditer le format du plan de texte</text:p>
              <text:list>
                <text:list-item>
                  <text:p text:style-name="MP39">Second niveau de plan</text:p>
                  <text:list>
                    <text:list-item>
                      <text:p text:style-name="MP39">Troisième niveau de plan</text:p>
                      <text:list>
                        <text:list-item>
                          <text:p text:style-name="MP39">Quatrième niveau de plan</text:p>
                          <text:list>
                            <text:list-item>
                              <text:p text:style-name="MP39">Cinquième niveau de plan</text:p>
                              <text:list>
                                <text:list-item>
                                  <text:p text:style-name="MP40"><text:span text:style-name="MT5">Sixième niveau de plan</text:span></text:p>
                                  <text:list>
                                    <text:list-item>
                                      <text:p>Septième niveau de plan</text:p>
                                    </text:list-item>
                                  </text:list>
                                </text:list-item>
                              </text:list>
                            </text:list-item>
                          </text:list>
                        </text:list-item>
                      </text:list>
                    </text:list-item>
                  </text:list>
                </text:list-item>
              </text:list>
            </text:list-item>
          </text:list>
        </draw:text-box>
      </draw:frame>
      <draw:frame presentation:style-name="Base_20_G2-title" draw:layer="backgroundobjects" svg:width="19.201cm" svg:height="2.629cm" svg:x="1.299cm" svg:y="0.628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g draw:style-name="Mgr4">
        <draw:polygon draw:style-name="Mgr10" draw:text-style-name="MP41" draw:layer="backgroundobjects" svg:width="3.256cm" svg:height="3.196cm" draw:transform="skewX (-0.000349065850398961) rotate (-0.303512756921815) translate (20.8696700740639cm 0.626165502311232cm)" svg:viewBox="0 0 3257 3197" draw:points="2550,3197 2141,2981 1753,2731 1388,2447 1048,2135 737,1795 457,1431 211,1044 0,638 1506,0 1842,460 2033,704 2240,945 2465,1172 2585,1278 2709,1377 2838,1468 2973,1550 3113,1622 3257,1681">
          <text:p/>
        </draw:polygon>
        <draw:polygon draw:style-name="Mgr11" draw:text-style-name="MP42" draw:layer="backgroundobjects" svg:width="3.178cm" svg:height="1.839cm" draw:transform="rotate (-0.303163691071415) translate (23.3382750627686cm 3.3635746069539cm)" svg:viewBox="0 0 3179 1840" draw:points="3179,1613 2793,1716 2398,1788 1998,1830 1595,1840 1190,1819 789,1768 391,1685 0,1572 490,0 739,51 999,95 1269,128 1543,146 1819,146 2092,125 2225,104 2358,77 2487,42 2615,0">
          <text:p/>
        </draw:polygon>
        <draw:polygon draw:style-name="Mgr12" draw:text-style-name="MP43" draw:layer="backgroundobjects" svg:width="2.278cm" svg:height="3.183cm" draw:transform="skewX (0.000698131700797717) rotate (-0.302814625221016) translate (26.7108729251817cm 2.57371152350939cm)" svg:viewBox="0 0 2279 3184" draw:points="2279,2119 2009,2380 1717,2618 1403,2832 1068,3022 712,3184 0,1687 151,1612 298,1529 439,1438 576,1339 707,1232 833,1118 1068,871 1278,600 1463,308 1619,0">
          <text:p/>
        </draw:polygon>
        <draw:polygon draw:style-name="Mgr12" draw:text-style-name="MP43" draw:layer="backgroundobjects" svg:width="1.775cm" svg:height="1.201cm" draw:transform="rotate (-0.302814625221016) translate (20.8674349636266cm -0.620204098816087cm)" svg:viewBox="0 0 1776 1202" draw:points="1601,0 1661,384 1776,767 221,1202 95,902 0,589">
          <text:p/>
        </draw:polygon>
      </draw:g>
      <draw:frame presentation:style-name="Mpr50" draw:text-style-name="MP26" draw:layer="backgroundobjects" svg:width="2.099cm" svg:height="0.652cm" svg:x="25.002cm" svg:y="14.548cm">
        <draw:text-box>
          <text:p text:style-name="MP25"><text:span text:style-name="MT4"><text:page-number>&lt;numéro&gt;</text:page-number></text:span></text:p>
        </draw:text-box>
      </draw:frame>
      <draw:frame presentation:style-name="Mpr50" draw:text-style-name="MP26" draw:layer="backgroundobjects" svg:width="19cm" svg:height="0.652cm" svg:x="6.803cm" svg:y="14.548cm">
        <draw:text-box>
          <text:p text:style-name="MP25"><text:span text:style-name="MT4"><text:s text:c="2"/></text:span><text:span text:style-name="MT4"><presentation:footer/></text:span></text:p>
        </draw:text-box>
      </draw:frame>
      <presentation:notes style:page-layout-name="PM0">
        <draw:page-thumbnail presentation:style-name="Base_20_G2-title" draw:layer="backgroundobjects" svg:width="19.6cm" svg:height="11.56cm" svg:x="0.7cm" svg:y="0.7cm" presentation:class="page"/>
        <draw:frame presentation:style-name="Mpr51" draw:text-style-name="MP13" draw:layer="backgroundobjects" svg:width="19.6cm" svg:height="16.562cm" svg:x="0.7cm" svg:y="12.599cm" presentation:class="notes">
          <draw:text-box>
            <text:p>Cliquez pour modifier le format des notes</text:p>
          </draw:text-box>
        </draw:frame>
        <draw:frame presentation:style-name="Mpr52" draw:text-style-name="MP15" draw:layer="backgroundobjects" svg:width="12.9cm" svg:height="0.6cm" svg:x="0cm" svg:y="0cm" presentation:class="header">
          <draw:text-box>
            <text:p text:style-name="MP14"><text:span text:style-name="MT3"><presentation:header/></text:span></text:p>
          </draw:text-box>
        </draw:frame>
        <draw:frame presentation:style-name="Mpr52" draw:text-style-name="MP17" draw:layer="backgroundobjects" svg:width="7.9cm" svg:height="0.6cm" svg:x="13.1cm" svg:y="0cm" presentation:class="date-time">
          <draw:text-box>
            <text:p text:style-name="MP16"><text:span text:style-name="MT3"><presentation:date-time/></text:span></text:p>
          </draw:text-box>
        </draw:frame>
        <draw:frame presentation:style-name="Mpr53" draw:text-style-name="MP15" draw:layer="backgroundobjects" svg:width="13.5cm" svg:height="0.726cm" svg:x="0cm" svg:y="28.973cm" presentation:class="footer">
          <draw:text-box>
            <text:p text:style-name="MP14"><text:span text:style-name="MT3"><presentation:footer/></text:span></text:p>
          </draw:text-box>
        </draw:frame>
        <draw:frame presentation:style-name="Mpr53"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Merci_5f_2" style:display-name="Merci_2"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Shape 15" draw:style-name="Mgr13" draw:text-style-name="MP44" draw:layer="backgroundobjects" svg:width="8cm" svg:height="12.25cm" svg:x="18.5cm" svg:y="3.5cm">
        <text:p/>
        <draw:enhanced-geometry draw:mirror-horizontal="false" draw:mirror-vertical="false" svg:viewBox="0 0 0 0" draw:glue-points="?f0 ?f1 ?f2 ?f3 ?f4 ?f5 ?f6 ?f7" drawooo:sub-view-size="2796013 5130149" draw:text-areas="0 0 ?f8 ?f9" draw:type="ooxml-non-primitive" draw:enhanced-path="M 0 0 L 2796013 0 2796013 5130150 0 5130150 Z N">
          <draw:equation draw:name="f0" draw:formula="0*logwidth/2796013"/>
          <draw:equation draw:name="f1" draw:formula="0*logheight/5130149"/>
          <draw:equation draw:name="f2" draw:formula="2796013*logwidth/2796013"/>
          <draw:equation draw:name="f3" draw:formula="0*logheight/5130149"/>
          <draw:equation draw:name="f4" draw:formula="2796013*logwidth/2796013"/>
          <draw:equation draw:name="f5" draw:formula="5130150*logheight/5130149"/>
          <draw:equation draw:name="f6" draw:formula="0*logwidth/2796013"/>
          <draw:equation draw:name="f7" draw:formula="5130150*logheight/5130149"/>
          <draw:equation draw:name="f8" draw:formula="logwidth"/>
          <draw:equation draw:name="f9" draw:formula="logheight"/>
        </draw:enhanced-geometry>
      </draw:custom-shape>
      <draw:custom-shape draw:name="Freeform: Shape 16" draw:style-name="Mgr14" draw:text-style-name="MP45" draw:layer="backgroundobjects" svg:width="8cm" svg:height="6.107cm" svg:x="10cm" svg:y="9.643cm">
        <text:p/>
        <draw:enhanced-geometry draw:mirror-horizontal="false" draw:mirror-vertical="false" svg:viewBox="0 0 0 0" draw:glue-points="?f0 ?f1 ?f2 ?f3 ?f4 ?f5 ?f6 ?f7" drawooo:sub-view-size="2796013 2660384" draw:text-areas="0 0 ?f8 ?f9" draw:type="ooxml-non-primitive" draw:enhanced-path="M 0 0 L 2796014 0 2796014 2660385 0 2660385 Z N">
          <draw:equation draw:name="f0" draw:formula="0*logwidth/2796013"/>
          <draw:equation draw:name="f1" draw:formula="0*logheight/2660384"/>
          <draw:equation draw:name="f2" draw:formula="2796014*logwidth/2796013"/>
          <draw:equation draw:name="f3" draw:formula="0*logheight/2660384"/>
          <draw:equation draw:name="f4" draw:formula="2796014*logwidth/2796013"/>
          <draw:equation draw:name="f5" draw:formula="2660385*logheight/2660384"/>
          <draw:equation draw:name="f6" draw:formula="0*logwidth/2796013"/>
          <draw:equation draw:name="f7" draw:formula="2660385*logheight/2660384"/>
          <draw:equation draw:name="f8" draw:formula="logwidth"/>
          <draw:equation draw:name="f9" draw:formula="logheight"/>
        </draw:enhanced-geometry>
      </draw:custom-shape>
      <draw:custom-shape draw:name="Freeform: Shape 17" draw:style-name="Mgr15" draw:text-style-name="MP46" draw:layer="backgroundobjects" svg:width="8cm" svg:height="9.25cm" svg:x="1.5cm" svg:y="6.5cm">
        <text:p/>
        <draw:enhanced-geometry draw:mirror-horizontal="false" draw:mirror-vertical="false" svg:viewBox="0 0 0 0" draw:glue-points="?f0 ?f1 ?f2 ?f3 ?f4 ?f5 ?f6 ?f7 ?f8 ?f9 ?f10 ?f11" drawooo:sub-view-size="2796013 2888069" draw:text-areas="0 0 ?f12 ?f13" draw:type="ooxml-non-primitive" draw:enhanced-path="M 0 2888070 L 207781 2888070 2796013 2888070 2796013 0 0 0 0 2888070 Z N">
          <draw:equation draw:name="f0" draw:formula="0*logwidth/2796013"/>
          <draw:equation draw:name="f1" draw:formula="2888070*logheight/2888069"/>
          <draw:equation draw:name="f2" draw:formula="207781*logwidth/2796013"/>
          <draw:equation draw:name="f3" draw:formula="2888070*logheight/2888069"/>
          <draw:equation draw:name="f4" draw:formula="2796013*logwidth/2796013"/>
          <draw:equation draw:name="f5" draw:formula="2888070*logheight/2888069"/>
          <draw:equation draw:name="f6" draw:formula="2796013*logwidth/2796013"/>
          <draw:equation draw:name="f7" draw:formula="0*logheight/2888069"/>
          <draw:equation draw:name="f8" draw:formula="0*logwidth/2796013"/>
          <draw:equation draw:name="f9" draw:formula="0*logheight/2888069"/>
          <draw:equation draw:name="f10" draw:formula="0*logwidth/2796013"/>
          <draw:equation draw:name="f11" draw:formula="2888070*logheight/2888069"/>
          <draw:equation draw:name="f12" draw:formula="logwidth"/>
          <draw:equation draw:name="f13" draw:formula="logheight"/>
        </draw:enhanced-geometry>
      </draw:custom-shape>
      <draw:frame presentation:style-name="Merci_5f_2-title" draw:layer="backgroundobjects" svg:width="14.1cm" svg:height="1.243cm" svg:x="6.95cm" svg:y="6.657cm" presentation:class="title" presentation:placeholder="true">
        <draw:text-box/>
      </draw:frame>
      <draw:frame presentation:style-name="Merci_5f_2-outline1" draw:layer="backgroundobjects" svg:width="7.5cm" svg:height="9.3cm" svg:x="1.7cm" svg:y="8cm" presentation:class="outline" presentation:placeholder="true">
        <draw:text-box/>
      </draw:frame>
      <draw:frame draw:name="Graphic 6" draw:style-name="Mgr3" draw:text-style-name="MP7" draw:layer="backgroundobjects" svg:width="5.803cm" svg:height="0.47cm" svg:x="11.099cm" svg:y="14.941cm">
        <draw:image xlink:href="Pictures/10003463000024E2000003033DE7702D.svg" xlink:type="simple" xlink:show="embed" xlink:actuate="onLoad" draw:mime-type="image/svg+xml">
          <text:p/>
        </draw:image>
        <draw:image xlink:href="Pictures/10000001000001BE00000024910235C1.png" xlink:type="simple" xlink:show="embed" xlink:actuate="onLoad" draw:mime-type="image/png"/>
      </draw:frame>
      <draw:frame draw:name="Graphic 17" draw:style-name="Mgr3" draw:text-style-name="MP7" draw:layer="backgroundobjects" svg:width="3.322cm" svg:height="1.111cm" svg:x="2.002cm" svg:y="14.255cm">
        <draw:image xlink:href="Pictures/100022CA00001795000007F864728E6F.svg" xlink:type="simple" xlink:show="embed" xlink:actuate="onLoad" draw:mime-type="image/svg+xml">
          <text:p/>
        </draw:image>
        <draw:image xlink:href="Pictures/100000010000011D0000006022A474DC.png" xlink:type="simple" xlink:show="embed" xlink:actuate="onLoad" draw:mime-type="image/png"/>
      </draw:frame>
      <presentation:notes style:page-layout-name="PM0">
        <office:forms form:automatic-focus="false" form:apply-design-mode="false"/>
        <draw:page-thumbnail presentation:style-name="Merci_5f_2-title" draw:layer="backgroundobjects" svg:width="19.6cm" svg:height="11.67cm" svg:x="0.7cm" svg:y="0.7cm" presentation:class="page"/>
        <draw:frame presentation:style-name="Merci_5f_2-notes" draw:layer="backgroundobjects" svg:width="19.6cm" svg:height="16.56cm" svg:x="0.7cm" svg:y="12.6cm" presentation:class="notes" presentation:placeholder="true">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éro&gt;</text:page-number></text:span></text:p>
          </draw:text-box>
        </draw:frame>
        <draw:frame presentation:style-name="Mpr55" draw:text-style-name="MP15" draw:layer="backgroundobjects" svg:width="12.9cm" svg:height="0.6cm" svg:x="0cm" svg:y="0cm">
          <draw:text-box>
            <text:p><text:span text:style-name="MT3"><presentation:header/></text:span></text:p>
          </draw:text-box>
        </draw:frame>
        <draw:frame presentation:style-name="Mpr55" draw:text-style-name="MP17" draw:layer="backgroundobjects" svg:width="7.9cm" svg:height="0.6cm" svg:x="13.1cm" svg:y="0cm">
          <draw:text-box>
            <text:p text:style-name="MP25"><text:span text:style-name="MT3"><presentation:date-time/></text:span></text:p>
          </draw:text-box>
        </draw:frame>
      </presentation:notes>
    </style:master-page>
    <style:master-page style:name="Edito_5f_2" style:display-name="Edito_2" style:page-layout-name="PM1" draw:style-name="Mdp6">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6" draw:text-style-name="MP47" draw:layer="backgroundobjects" svg:width="16cm" svg:height="5.622cm" svg:x="12cm" svg:y="10.128cm">
        <text:p/>
        <draw:enhanced-geometry svg:viewBox="0 0 21600 21600" draw:type="rectangle" draw:enhanced-path="M 0 0 L 21600 0 21600 21600 0 21600 0 0 Z N"/>
      </draw:custom-shape>
      <draw:frame presentation:style-name="Mpr57" draw:layer="backgroundobjects" svg:width="12.699cm" svg:height="0.97cm" svg:x="12.5cm" svg:y="10.5cm" presentation:class="title">
        <draw:text-box>
          <text:p><text:span text:style-name="MT1">Cliquez </text:span><text:span text:style-name="MT6">pour</text:span><text:span text:style-name="MT1"> éditer le format du texte-titre</text:span></text:p>
        </draw:text-box>
      </draw:frame>
      <draw:frame presentation:style-name="Mpr58" draw:text-style-name="MP39" draw:layer="backgroundobjects" svg:width="12.699cm" svg:height="3.372cm" svg:x="12.544cm" svg:y="11.628cm" presentation:class="outline">
        <draw:text-box>
          <text:list text:style-name="ML9">
            <text:list-item>
              <text:p text:style-name="MP39">Cliquez pour éditer le format du plan de texte</text:p>
              <text:list>
                <text:list-item>
                  <text:p text:style-name="MP39">Second niveau de plan</text:p>
                  <text:list>
                    <text:list-item>
                      <text:p text:style-name="MP39">Troisième niveau de plan</text:p>
                      <text:list>
                        <text:list-item>
                          <text:p text:style-name="MP39">Quatrième niveau de plan</text:p>
                          <text:list>
                            <text:list-item>
                              <text:p text:style-name="MP39">Cinquième niveau de plan</text:p>
                              <text:list>
                                <text:list-item>
                                  <text:p text:style-name="MP39">Sixième niveau de plan</text:p>
                                  <text:list>
                                    <text:list-item>
                                      <text:p text:style-name="MP39">Septième niveau de plan</text:p>
                                    </text:list-item>
                                  </text:list>
                                </text:list-item>
                              </text:list>
                            </text:list-item>
                          </text:list>
                        </text:list-item>
                      </text:list>
                    </text:list-item>
                  </text:list>
                </text:list-item>
              </text:list>
            </text:list-item>
          </text:list>
        </draw:text-box>
      </draw:frame>
      <draw:frame presentation:style-name="Mpr59" draw:text-style-name="MP26" draw:layer="backgroundobjects" svg:width="2.099cm" svg:height="0.652cm" svg:x="25.002cm" svg:y="14.548cm">
        <draw:text-box>
          <text:p text:style-name="MP25"><text:span text:style-name="MT4"><text:page-number>&lt;numéro&gt;</text:page-number></text:span></text:p>
        </draw:text-box>
      </draw:frame>
      <draw:frame draw:style-name="Mgr9" draw:text-style-name="MP24" draw:layer="backgroundobjects" svg:width="1.852cm" svg:height="0.463cm" svg:x="1.273cm" svg:y="14.576cm">
        <draw:image xlink:href="Pictures/100000010000008400000022C7B5F7F4.png" xlink:type="simple" xlink:show="embed" xlink:actuate="onLoad" draw:mime-type="image/png">
          <text:p/>
        </draw:image>
      </draw:frame>
      <presentation:notes style:page-layout-name="PM0">
        <draw:page-thumbnail presentation:style-name="Edito_5f_2-title" draw:layer="backgroundobjects" svg:width="19.6cm" svg:height="11.67cm" svg:x="0.7cm" svg:y="0.7cm" presentation:class="page"/>
        <draw:frame presentation:style-name="Edito_5f_2-notes" draw:layer="backgroundobjects" svg:width="19.6cm" svg:height="16.56cm" svg:x="0.7cm" svg:y="12.6cm" presentation:class="notes" presentation:placeholder="true">
          <draw:text-box/>
        </draw:frame>
        <draw:frame presentation:style-name="Mpr60" draw:text-style-name="MP15" draw:layer="backgroundobjects" svg:width="12.9cm" svg:height="0.6cm" svg:x="0cm" svg:y="0cm">
          <draw:text-box>
            <text:p><text:span text:style-name="MT3"><presentation:header/></text:span></text:p>
          </draw:text-box>
        </draw:frame>
        <draw:frame presentation:style-name="Mpr60" draw:text-style-name="MP17" draw:layer="backgroundobjects" svg:width="7.9cm" svg:height="0.6cm" svg:x="13.1cm" svg:y="0cm">
          <draw:text-box>
            <text:p text:style-name="MP25"><text:span text:style-name="MT3"><presentation:date-time/></text:span></text:p>
          </draw:text-box>
        </draw:frame>
        <draw:frame presentation:style-name="Mpr61" draw:text-style-name="MP15" draw:layer="backgroundobjects" svg:width="13.5cm" svg:height="0.726cm" svg:x="0cm" svg:y="28.973cm">
          <draw:text-box>
            <text:p><text:span text:style-name="MT3"><presentation:footer/></text:span></text:p>
          </draw:text-box>
        </draw:frame>
        <draw:frame presentation:style-name="Mpr61" draw:text-style-name="MP17" draw:layer="backgroundobjects" svg:width="6cm" svg:height="0.726cm" svg:x="15cm" svg:y="28.999cm">
          <draw:text-box>
            <text:p text:style-name="MP25"><text:span text:style-name="MT3"><text:page-number>&lt;numéro&gt;</text:page-number></text:span></text:p>
          </draw:text-box>
        </draw:frame>
      </presentation:notes>
    </style:master-page>
    <style:master-page style:name="Base_20_G1" style:display-name="Base G1"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Picture Placeholder 9" presentation:style-name="Mpr62" draw:text-style-name="MP39" draw:layer="backgroundobjects" svg:width="19.26cm" svg:height="10.5cm" svg:x="1.24cm" svg:y="3.72cm" presentation:class="outline" presentation:user-transformed="true">
        <draw:text-box>
          <text:list text:style-name="ML7">
            <text:list-item>
              <text:p text:style-name="MP39">Cliquez pour éditer le format du plan de texte</text:p>
              <text:list>
                <text:list-item>
                  <text:p text:style-name="MP39">Second niveau de plan</text:p>
                  <text:list>
                    <text:list-item>
                      <text:p text:style-name="MP39">Troisième niveau de plan</text:p>
                      <text:list>
                        <text:list-item>
                          <text:p text:style-name="MP39">Quatrième niveau de plan</text:p>
                          <text:list>
                            <text:list-item>
                              <text:p text:style-name="MP39">Cinquième niveau de plan</text:p>
                              <text:list>
                                <text:list-item>
                                  <text:p text:style-name="MP40"><text:span text:style-name="MT5">Sixième niveau de plan</text:span></text:p>
                                  <text:list>
                                    <text:list-item>
                                      <text:p>Septième niveau de plan</text:p>
                                    </text:list-item>
                                  </text:list>
                                </text:list-item>
                              </text:list>
                            </text:list-item>
                          </text:list>
                        </text:list-item>
                      </text:list>
                    </text:list-item>
                  </text:list>
                </text:list-item>
              </text:list>
            </text:list-item>
          </text:list>
        </draw:text-box>
      </draw:frame>
      <draw:frame presentation:style-name="Base_20_G1-title" draw:layer="backgroundobjects" svg:width="19.201cm" svg:height="2.629cm" svg:x="1.299cm" svg:y="0.628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g draw:style-name="Mgr4">
        <draw:polygon draw:style-name="Mgr11" draw:text-style-name="MP42" draw:layer="backgroundobjects" svg:width="2.95cm" svg:height="4.867cm" svg:x="20.712cm" svg:y="2.138cm" svg:viewBox="0 0 2951 4868" draw:points="815,4868 2951,3779 2840,3595 2745,3404 2666,3205 2599,3001 2547,2792 2505,2579 2450,2148 2428,1717 2427,1295 2453,519 186,0 66,615 5,1238 0,1864 52,2488 160,3106 324,3711 542,4300">
          <text:p/>
        </draw:polygon>
        <draw:polygon draw:style-name="Mgr5" draw:text-style-name="MP8" draw:layer="backgroundobjects" svg:width="4.343cm" svg:height="3.942cm" svg:x="22.011cm" svg:y="6.457cm" svg:viewBox="0 0 4344 3943" draw:points="3561,3943 4344,1719 4163,1662 3986,1595 3812,1518 3643,1432 3315,1235 3003,1012 2709,770 2434,516 2177,257 1941,0 0,1326 343,1766 720,2179 1129,2560 1568,2909 2034,3224 2522,3503 3033,3743">
          <text:p/>
        </draw:polygon>
        <draw:polygon draw:style-name="Mgr16" draw:text-style-name="MP48" draw:layer="backgroundobjects" svg:width="1.756cm" svg:height="2.407cm" svg:x="26.321cm" svg:y="8.392cm" svg:viewBox="0 0 1757 2408" draw:points="1757,70 1599,80 1443,85 1286,84 1131,78 976,66 821,50 668,28 515,0 0,2216 219,2266 439,2308 659,2343 879,2370 1098,2390 1318,2402 1537,2408 1757,2405">
          <text:p/>
        </draw:polygon>
        <draw:polygon draw:style-name="Mgr17" draw:text-style-name="MP49" draw:layer="backgroundobjects" svg:width="6.801cm" svg:height="2.309cm" svg:x="21.276cm" svg:y="-0.2cm" svg:viewBox="0 0 6802 2310" draw:points="670,0 556,181 449,366 350,553 261,744 182,937 111,1132 50,1330 0,1530 2144,2310 2286,1938 2461,1590 2665,1265 2897,963 3154,685 3435,432 3736,203 4056,0 6802,0">
          <text:p/>
        </draw:polygon>
      </draw:g>
      <draw:frame presentation:style-name="Mpr63" draw:text-style-name="MP26" draw:layer="backgroundobjects" svg:width="2.099cm" svg:height="0.652cm" svg:x="25.002cm" svg:y="14.548cm">
        <draw:text-box>
          <text:p text:style-name="MP25"><text:span text:style-name="MT4"><text:page-number>&lt;numéro&gt;</text:page-number></text:span></text:p>
        </draw:text-box>
      </draw:frame>
      <draw:frame presentation:style-name="Mpr63" draw:text-style-name="MP26" draw:layer="backgroundobjects" svg:width="19cm" svg:height="0.652cm" svg:x="6.803cm" svg:y="14.548cm">
        <draw:text-box>
          <text:p text:style-name="MP25"><text:span text:style-name="MT4"><text:s text:c="2"/></text:span><text:span text:style-name="MT4"><presentation:footer/></text:span></text:p>
        </draw:text-box>
      </draw:frame>
      <presentation:notes style:page-layout-name="PM0">
        <office:forms form:automatic-focus="false" form:apply-design-mode="false"/>
        <draw:page-thumbnail presentation:style-name="Base_20_G1-title" draw:layer="backgroundobjects" svg:width="19.6cm" svg:height="11.56cm" svg:x="0.7cm" svg:y="0.7cm" presentation:class="page"/>
        <draw:frame presentation:style-name="Mpr64" draw:text-style-name="MP13" draw:layer="backgroundobjects" svg:width="19.6cm" svg:height="16.562cm" svg:x="0.7cm" svg:y="12.599cm" presentation:class="notes">
          <draw:text-box>
            <text:p>Cliquez pour modifier le format des notes</text:p>
          </draw:text-box>
        </draw:frame>
        <draw:frame presentation:style-name="Mpr65" draw:text-style-name="MP15" draw:layer="backgroundobjects" svg:width="12.9cm" svg:height="0.6cm" svg:x="0cm" svg:y="0cm" presentation:class="header">
          <draw:text-box>
            <text:p text:style-name="MP14"><text:span text:style-name="MT3"><presentation:header/></text:span></text:p>
          </draw:text-box>
        </draw:frame>
        <draw:frame presentation:style-name="Mpr65" draw:text-style-name="MP17" draw:layer="backgroundobjects" svg:width="7.9cm" svg:height="0.6cm" svg:x="13.1cm" svg:y="0cm" presentation:class="date-time">
          <draw:text-box>
            <text:p text:style-name="MP16"><text:span text:style-name="MT3"><presentation:date-time/></text:span></text:p>
          </draw:text-box>
        </draw:frame>
        <draw:frame presentation:style-name="Mpr66" draw:text-style-name="MP15" draw:layer="backgroundobjects" svg:width="13.5cm" svg:height="0.726cm" svg:x="0cm" svg:y="28.973cm" presentation:class="footer">
          <draw:text-box>
            <text:p text:style-name="MP14"><text:span text:style-name="MT3"><presentation:footer/></text:span></text:p>
          </draw:text-box>
        </draw:frame>
        <draw:frame presentation:style-name="Mpr66"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Base"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Picture Placeholder 9" presentation:style-name="Mpr67" draw:text-style-name="MP39" draw:layer="backgroundobjects" svg:width="25.63cm" svg:height="11.78cm" svg:x="1.24cm" svg:y="2.22cm" presentation:class="outline" presentation:user-transformed="true">
        <draw:text-box>
          <text:list text:style-name="ML7">
            <text:list-item>
              <text:p text:style-name="MP39">Cliquez pour éditer le format du plan de texte</text:p>
              <text:list>
                <text:list-item>
                  <text:p text:style-name="MP39">Second niveau de plan</text:p>
                  <text:list>
                    <text:list-item>
                      <text:p text:style-name="MP39">Troisième niveau de plan</text:p>
                      <text:list>
                        <text:list-item>
                          <text:p text:style-name="MP39">Quatrième niveau de plan</text:p>
                          <text:list>
                            <text:list-item>
                              <text:p text:style-name="MP39">Cinquième niveau de plan</text:p>
                              <text:list>
                                <text:list-item>
                                  <text:p text:style-name="MP40"><text:span text:style-name="MT5">Sixième niveau de plan</text:span></text:p>
                                  <text:list>
                                    <text:list-item>
                                      <text:p>Septième niveau de plan</text:p>
                                    </text:list-item>
                                  </text:list>
                                </text:list-item>
                              </text:list>
                            </text:list-item>
                          </text:list>
                        </text:list-item>
                      </text:list>
                    </text:list-item>
                  </text:list>
                </text:list-item>
              </text:list>
            </text:list-item>
          </text:list>
        </draw:text-box>
      </draw:frame>
      <draw:frame presentation:style-name="Base-title" draw:layer="backgroundobjects" svg:width="25.701cm" svg:height="2.629cm" svg:x="1.299cm" svg:y="0.628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frame presentation:style-name="Mpr68" draw:text-style-name="MP26" draw:layer="backgroundobjects" svg:width="2.099cm" svg:height="0.652cm" svg:x="25.003cm" svg:y="14.548cm">
        <draw:text-box>
          <text:p text:style-name="MP25"><text:span text:style-name="MT4"><text:page-number>&lt;numéro&gt;</text:page-number></text:span></text:p>
        </draw:text-box>
      </draw:frame>
      <draw:frame presentation:style-name="Mpr68" draw:text-style-name="MP26" draw:layer="backgroundobjects" svg:width="19cm" svg:height="0.652cm" svg:x="6.803cm" svg:y="14.548cm">
        <draw:text-box>
          <text:p text:style-name="MP25"><text:span text:style-name="MT4"><text:s text:c="2"/></text:span><text:span text:style-name="MT4"><presentation:footer/></text:span></text:p>
        </draw:text-box>
      </draw:frame>
      <presentation:notes style:page-layout-name="PM0">
        <draw:page-thumbnail presentation:style-name="Base-title" draw:layer="backgroundobjects" svg:width="19.6cm" svg:height="11.56cm" svg:x="0.7cm" svg:y="0.7cm" presentation:class="page"/>
        <draw:frame presentation:style-name="Mpr69" draw:text-style-name="MP13" draw:layer="backgroundobjects" svg:width="19.6cm" svg:height="16.562cm" svg:x="0.7cm" svg:y="12.599cm" presentation:class="notes">
          <draw:text-box>
            <text:p>Cliquez pour modifier le format des notes</text:p>
          </draw:text-box>
        </draw:frame>
        <draw:frame presentation:style-name="Mpr70" draw:text-style-name="MP15" draw:layer="backgroundobjects" svg:width="12.9cm" svg:height="0.6cm" svg:x="0cm" svg:y="0cm" presentation:class="header">
          <draw:text-box>
            <text:p text:style-name="MP14"><text:span text:style-name="MT3"><presentation:header/></text:span></text:p>
          </draw:text-box>
        </draw:frame>
        <draw:frame presentation:style-name="Mpr70" draw:text-style-name="MP17" draw:layer="backgroundobjects" svg:width="7.9cm" svg:height="0.6cm" svg:x="13.1cm" svg:y="0cm" presentation:class="date-time">
          <draw:text-box>
            <text:p text:style-name="MP16"><text:span text:style-name="MT3"><presentation:date-time/></text:span></text:p>
          </draw:text-box>
        </draw:frame>
        <draw:frame presentation:style-name="Mpr71" draw:text-style-name="MP15" draw:layer="backgroundobjects" svg:width="13.5cm" svg:height="0.726cm" svg:x="0cm" svg:y="28.973cm" presentation:class="footer">
          <draw:text-box>
            <text:p text:style-name="MP14"><text:span text:style-name="MT3"><presentation:footer/></text:span></text:p>
          </draw:text-box>
        </draw:frame>
        <draw:frame presentation:style-name="Mpr71"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_31__5f_Base_20_G1" style:display-name="1_Base G1"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Picture Placeholder 9" presentation:style-name="Mpr72" draw:text-style-name="MP39" draw:layer="backgroundobjects" svg:width="19.26cm" svg:height="10.5cm" svg:x="1.24cm" svg:y="3.72cm" presentation:class="outline" presentation:user-transformed="true">
        <draw:text-box>
          <text:list text:style-name="ML7">
            <text:list-item>
              <text:p text:style-name="MP39">Cliquez pour éditer le format du plan de texte</text:p>
              <text:list>
                <text:list-item>
                  <text:p text:style-name="MP39">Second niveau de plan</text:p>
                  <text:list>
                    <text:list-item>
                      <text:p text:style-name="MP39">Troisième niveau de plan</text:p>
                      <text:list>
                        <text:list-item>
                          <text:p text:style-name="MP39">Quatrième niveau de plan</text:p>
                          <text:list>
                            <text:list-item>
                              <text:p text:style-name="MP39">Cinquième niveau de plan</text:p>
                              <text:list>
                                <text:list-item>
                                  <text:p text:style-name="MP40"><text:span text:style-name="MT5">Sixième niveau de plan</text:span></text:p>
                                  <text:list>
                                    <text:list-item>
                                      <text:p>Septième niveau de plan</text:p>
                                    </text:list-item>
                                  </text:list>
                                </text:list-item>
                              </text:list>
                            </text:list-item>
                          </text:list>
                        </text:list-item>
                      </text:list>
                    </text:list-item>
                  </text:list>
                </text:list-item>
              </text:list>
            </text:list-item>
          </text:list>
        </draw:text-box>
      </draw:frame>
      <draw:frame presentation:style-name="_31__5f_Base_20_G1-title" draw:layer="backgroundobjects" svg:width="19.201cm" svg:height="2.629cm" svg:x="1.299cm" svg:y="0.628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g draw:style-name="Mgr4">
        <draw:polygon draw:style-name="Mgr11" draw:text-style-name="MP42" draw:layer="backgroundobjects" svg:width="2.95cm" svg:height="4.867cm" svg:x="20.712cm" svg:y="2.138cm" svg:viewBox="0 0 2951 4868" draw:points="815,4868 2951,3779 2840,3595 2745,3404 2666,3205 2599,3001 2547,2792 2505,2579 2450,2148 2428,1717 2427,1295 2453,519 186,0 66,615 5,1238 0,1864 52,2488 160,3106 324,3711 542,4300">
          <text:p/>
        </draw:polygon>
        <draw:polygon draw:style-name="Mgr5" draw:text-style-name="MP8" draw:layer="backgroundobjects" svg:width="4.343cm" svg:height="3.942cm" svg:x="22.011cm" svg:y="6.457cm" svg:viewBox="0 0 4344 3943" draw:points="3561,3943 4344,1719 4163,1662 3986,1595 3812,1518 3643,1432 3315,1235 3003,1012 2709,770 2434,516 2177,257 1941,0 0,1326 343,1766 720,2179 1129,2560 1568,2909 2034,3224 2522,3503 3033,3743">
          <text:p/>
        </draw:polygon>
        <draw:polygon draw:style-name="Mgr16" draw:text-style-name="MP48" draw:layer="backgroundobjects" svg:width="1.756cm" svg:height="2.407cm" svg:x="26.321cm" svg:y="8.392cm" svg:viewBox="0 0 1757 2408" draw:points="1757,70 1599,80 1443,85 1286,84 1131,78 976,66 821,50 668,28 515,0 0,2216 219,2266 439,2308 659,2343 879,2370 1098,2390 1318,2402 1537,2408 1757,2405">
          <text:p/>
        </draw:polygon>
        <draw:polygon draw:style-name="Mgr17" draw:text-style-name="MP49" draw:layer="backgroundobjects" svg:width="6.801cm" svg:height="2.309cm" svg:x="21.276cm" svg:y="-0.2cm" svg:viewBox="0 0 6802 2310" draw:points="670,0 556,181 449,366 350,553 261,744 182,937 111,1132 50,1330 0,1530 2144,2310 2286,1938 2461,1590 2665,1265 2897,963 3154,685 3435,432 3736,203 4056,0 6802,0">
          <text:p/>
        </draw:polygon>
      </draw:g>
      <draw:frame presentation:style-name="Mpr73" draw:text-style-name="MP26" draw:layer="backgroundobjects" svg:width="2.099cm" svg:height="0.652cm" svg:x="25.002cm" svg:y="14.548cm">
        <draw:text-box>
          <text:p text:style-name="MP25"><text:span text:style-name="MT4"><text:page-number>&lt;numéro&gt;</text:page-number></text:span></text:p>
        </draw:text-box>
      </draw:frame>
      <draw:frame presentation:style-name="Mpr73" draw:text-style-name="MP26" draw:layer="backgroundobjects" svg:width="19cm" svg:height="0.652cm" svg:x="6.803cm" svg:y="14.548cm">
        <draw:text-box>
          <text:p text:style-name="MP25"><text:span text:style-name="MT4"><text:s text:c="2"/></text:span><text:span text:style-name="MT4"><presentation:footer/></text:span></text:p>
        </draw:text-box>
      </draw:frame>
      <presentation:notes style:page-layout-name="PM0">
        <office:forms form:automatic-focus="false" form:apply-design-mode="false"/>
        <draw:page-thumbnail presentation:style-name="_31__5f_Base_20_G1-title" draw:layer="backgroundobjects" svg:width="19.6cm" svg:height="11.56cm" svg:x="0.7cm" svg:y="0.7cm" presentation:class="page"/>
        <draw:frame presentation:style-name="Mpr74" draw:text-style-name="MP13" draw:layer="backgroundobjects" svg:width="19.6cm" svg:height="16.562cm" svg:x="0.7cm" svg:y="12.599cm" presentation:class="notes">
          <draw:text-box>
            <text:p>Cliquez pour modifier le format des notes</text:p>
          </draw:text-box>
        </draw:frame>
        <draw:frame presentation:style-name="Mpr75" draw:text-style-name="MP15" draw:layer="backgroundobjects" svg:width="12.9cm" svg:height="0.6cm" svg:x="0cm" svg:y="0cm" presentation:class="header">
          <draw:text-box>
            <text:p text:style-name="MP14"><text:span text:style-name="MT3"><presentation:header/></text:span></text:p>
          </draw:text-box>
        </draw:frame>
        <draw:frame presentation:style-name="Mpr75" draw:text-style-name="MP17" draw:layer="backgroundobjects" svg:width="7.9cm" svg:height="0.6cm" svg:x="13.1cm" svg:y="0cm" presentation:class="date-time">
          <draw:text-box>
            <text:p text:style-name="MP16"><text:span text:style-name="MT3"><presentation:date-time/></text:span></text:p>
          </draw:text-box>
        </draw:frame>
        <draw:frame presentation:style-name="Mpr76" draw:text-style-name="MP15" draw:layer="backgroundobjects" svg:width="13.5cm" svg:height="0.726cm" svg:x="0cm" svg:y="28.973cm" presentation:class="footer">
          <draw:text-box>
            <text:p text:style-name="MP14"><text:span text:style-name="MT3"><presentation:footer/></text:span></text:p>
          </draw:text-box>
        </draw:frame>
        <draw:frame presentation:style-name="Mpr76"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_32__5f_Base_20_G1" style:display-name="2_Base G1"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Picture Placeholder 9" presentation:style-name="Mpr77" draw:text-style-name="MP39" draw:layer="backgroundobjects" svg:width="19.26cm" svg:height="10.5cm" svg:x="1.24cm" svg:y="3.72cm" presentation:class="outline" presentation:user-transformed="true">
        <draw:text-box>
          <text:list text:style-name="ML7">
            <text:list-item>
              <text:p text:style-name="MP39">Cliquez pour éditer le format du plan de texte</text:p>
              <text:list>
                <text:list-item>
                  <text:p text:style-name="MP39">Second niveau de plan</text:p>
                  <text:list>
                    <text:list-item>
                      <text:p text:style-name="MP39">Troisième niveau de plan</text:p>
                      <text:list>
                        <text:list-item>
                          <text:p text:style-name="MP39">Quatrième niveau de plan</text:p>
                          <text:list>
                            <text:list-item>
                              <text:p text:style-name="MP39">Cinquième niveau de plan</text:p>
                              <text:list>
                                <text:list-item>
                                  <text:p text:style-name="MP40"><text:span text:style-name="MT5">Sixième niveau de plan</text:span></text:p>
                                  <text:list>
                                    <text:list-item>
                                      <text:p>Septième niveau de plan</text:p>
                                    </text:list-item>
                                  </text:list>
                                </text:list-item>
                              </text:list>
                            </text:list-item>
                          </text:list>
                        </text:list-item>
                      </text:list>
                    </text:list-item>
                  </text:list>
                </text:list-item>
              </text:list>
            </text:list-item>
          </text:list>
        </draw:text-box>
      </draw:frame>
      <draw:frame presentation:style-name="_32__5f_Base_20_G1-title" draw:layer="backgroundobjects" svg:width="19.201cm" svg:height="2.629cm" svg:x="1.299cm" svg:y="0.628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g draw:style-name="Mgr4">
        <draw:polygon draw:style-name="Mgr11" draw:text-style-name="MP42" draw:layer="backgroundobjects" svg:width="2.95cm" svg:height="4.867cm" svg:x="20.712cm" svg:y="2.138cm" svg:viewBox="0 0 2951 4868" draw:points="815,4868 2951,3779 2840,3595 2745,3404 2666,3205 2599,3001 2547,2792 2505,2579 2450,2148 2428,1717 2427,1295 2453,519 186,0 66,615 5,1238 0,1864 52,2488 160,3106 324,3711 542,4300">
          <text:p/>
        </draw:polygon>
        <draw:polygon draw:style-name="Mgr5" draw:text-style-name="MP8" draw:layer="backgroundobjects" svg:width="4.343cm" svg:height="3.942cm" svg:x="22.011cm" svg:y="6.457cm" svg:viewBox="0 0 4344 3943" draw:points="3561,3943 4344,1719 4163,1662 3986,1595 3812,1518 3643,1432 3315,1235 3003,1012 2709,770 2434,516 2177,257 1941,0 0,1326 343,1766 720,2179 1129,2560 1568,2909 2034,3224 2522,3503 3033,3743">
          <text:p/>
        </draw:polygon>
        <draw:polygon draw:style-name="Mgr16" draw:text-style-name="MP48" draw:layer="backgroundobjects" svg:width="1.756cm" svg:height="2.407cm" svg:x="26.321cm" svg:y="8.392cm" svg:viewBox="0 0 1757 2408" draw:points="1757,70 1599,80 1443,85 1286,84 1131,78 976,66 821,50 668,28 515,0 0,2216 219,2266 439,2308 659,2343 879,2370 1098,2390 1318,2402 1537,2408 1757,2405">
          <text:p/>
        </draw:polygon>
        <draw:polygon draw:style-name="Mgr17" draw:text-style-name="MP49" draw:layer="backgroundobjects" svg:width="6.801cm" svg:height="2.309cm" svg:x="21.276cm" svg:y="-0.2cm" svg:viewBox="0 0 6802 2310" draw:points="670,0 556,181 449,366 350,553 261,744 182,937 111,1132 50,1330 0,1530 2144,2310 2286,1938 2461,1590 2665,1265 2897,963 3154,685 3435,432 3736,203 4056,0 6802,0">
          <text:p/>
        </draw:polygon>
      </draw:g>
      <draw:frame presentation:style-name="Mpr78" draw:text-style-name="MP26" draw:layer="backgroundobjects" svg:width="2.099cm" svg:height="0.652cm" svg:x="25.002cm" svg:y="14.548cm">
        <draw:text-box>
          <text:p text:style-name="MP25"><text:span text:style-name="MT4"><text:page-number>&lt;numéro&gt;</text:page-number></text:span></text:p>
        </draw:text-box>
      </draw:frame>
      <draw:frame presentation:style-name="Mpr78" draw:text-style-name="MP26" draw:layer="backgroundobjects" svg:width="19cm" svg:height="0.652cm" svg:x="6.803cm" svg:y="14.548cm">
        <draw:text-box>
          <text:p text:style-name="MP25"><text:span text:style-name="MT4"><text:s text:c="2"/></text:span><text:span text:style-name="MT4"><presentation:footer/></text:span></text:p>
        </draw:text-box>
      </draw:frame>
      <presentation:notes style:page-layout-name="PM0">
        <office:forms form:automatic-focus="false" form:apply-design-mode="false"/>
        <draw:page-thumbnail presentation:style-name="_32__5f_Base_20_G1-title" draw:layer="backgroundobjects" svg:width="19.6cm" svg:height="11.56cm" svg:x="0.7cm" svg:y="0.7cm" presentation:class="page"/>
        <draw:frame presentation:style-name="Mpr79" draw:text-style-name="MP13" draw:layer="backgroundobjects" svg:width="19.6cm" svg:height="16.562cm" svg:x="0.7cm" svg:y="12.599cm" presentation:class="notes">
          <draw:text-box>
            <text:p>Cliquez pour modifier le format des notes</text:p>
          </draw:text-box>
        </draw:frame>
        <draw:frame presentation:style-name="Mpr80" draw:text-style-name="MP15" draw:layer="backgroundobjects" svg:width="12.9cm" svg:height="0.6cm" svg:x="0cm" svg:y="0cm" presentation:class="header">
          <draw:text-box>
            <text:p text:style-name="MP14"><text:span text:style-name="MT3"><presentation:header/></text:span></text:p>
          </draw:text-box>
        </draw:frame>
        <draw:frame presentation:style-name="Mpr80" draw:text-style-name="MP17" draw:layer="backgroundobjects" svg:width="7.9cm" svg:height="0.6cm" svg:x="13.1cm" svg:y="0cm" presentation:class="date-time">
          <draw:text-box>
            <text:p text:style-name="MP16"><text:span text:style-name="MT3"><presentation:date-time/></text:span></text:p>
          </draw:text-box>
        </draw:frame>
        <draw:frame presentation:style-name="Mpr81" draw:text-style-name="MP15" draw:layer="backgroundobjects" svg:width="13.5cm" svg:height="0.726cm" svg:x="0cm" svg:y="28.973cm" presentation:class="footer">
          <draw:text-box>
            <text:p text:style-name="MP14"><text:span text:style-name="MT3"><presentation:footer/></text:span></text:p>
          </draw:text-box>
        </draw:frame>
        <draw:frame presentation:style-name="Mpr81"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style:master-page style:name="_33__5f_Base_20_G1" style:display-name="3_Base G1" style:page-layout-name="PM1" draw:style-name="Mdp1">
      <loext:theme loext:name="Version Sombre">
        <loext:theme-colors loext:name="INSEE">
          <loext:color loext:name="dark1" loext:color="#000000"/>
          <loext:color loext:name="light1" loext:color="#ffffff"/>
          <loext:color loext:name="dark2" loext:color="#000000"/>
          <loext:color loext:name="light2" loext:color="#248bff"/>
          <loext:color loext:name="accent1" loext:color="#07bab7"/>
          <loext:color loext:name="accent2" loext:color="#5e1972"/>
          <loext:color loext:name="accent3" loext:color="#8a5400"/>
          <loext:color loext:name="accent4" loext:color="#0f9ed5"/>
          <loext:color loext:name="accent5" loext:color="#a02b93"/>
          <loext:color loext:name="accent6" loext:color="#042f80"/>
          <loext:color loext:name="hyperlink" loext:color="#5e1972"/>
          <loext:color loext:name="followed-hyperlink" loext:color="#7f7f7f"/>
        </loext:theme-colors>
      </loext:theme>
      <draw:frame draw:name="Picture Placeholder 9" presentation:style-name="Mpr82" draw:text-style-name="MP39" draw:layer="backgroundobjects" svg:width="19.26cm" svg:height="10.5cm" svg:x="1.24cm" svg:y="3.72cm" presentation:class="outline" presentation:user-transformed="true">
        <draw:text-box>
          <text:list text:style-name="ML7">
            <text:list-item>
              <text:p text:style-name="MP39">Cliquez pour éditer le format du plan de texte</text:p>
              <text:list>
                <text:list-item>
                  <text:p text:style-name="MP39">Second niveau de plan</text:p>
                  <text:list>
                    <text:list-item>
                      <text:p text:style-name="MP39">Troisième niveau de plan</text:p>
                      <text:list>
                        <text:list-item>
                          <text:p text:style-name="MP39">Quatrième niveau de plan</text:p>
                          <text:list>
                            <text:list-item>
                              <text:p text:style-name="MP39">Cinquième niveau de plan</text:p>
                              <text:list>
                                <text:list-item>
                                  <text:p text:style-name="MP40"><text:span text:style-name="MT5">Sixième niveau de plan</text:span></text:p>
                                  <text:list>
                                    <text:list-item>
                                      <text:p>Septième niveau de plan</text:p>
                                    </text:list-item>
                                  </text:list>
                                </text:list-item>
                              </text:list>
                            </text:list-item>
                          </text:list>
                        </text:list-item>
                      </text:list>
                    </text:list-item>
                  </text:list>
                </text:list-item>
              </text:list>
            </text:list-item>
          </text:list>
        </draw:text-box>
      </draw:frame>
      <draw:frame presentation:style-name="_33__5f_Base_20_G1-title" draw:layer="backgroundobjects" svg:width="19.201cm" svg:height="2.629cm" svg:x="1.299cm" svg:y="0.628cm" presentation:class="title" presentation:placeholder="true">
        <draw:text-box/>
      </draw:frame>
      <draw:frame draw:style-name="Mgr9" draw:text-style-name="MP24" draw:layer="backgroundobjects" svg:width="1.852cm" svg:height="0.463cm" svg:x="1.273cm" svg:y="14.575cm">
        <draw:image xlink:href="Pictures/100000010000008400000022C7B5F7F4.png" xlink:type="simple" xlink:show="embed" xlink:actuate="onLoad" draw:mime-type="image/png">
          <text:p/>
        </draw:image>
      </draw:frame>
      <draw:g draw:style-name="Mgr4">
        <draw:polygon draw:style-name="Mgr11" draw:text-style-name="MP42" draw:layer="backgroundobjects" svg:width="2.95cm" svg:height="4.867cm" svg:x="20.712cm" svg:y="2.138cm" svg:viewBox="0 0 2951 4868" draw:points="815,4868 2951,3779 2840,3595 2745,3404 2666,3205 2599,3001 2547,2792 2505,2579 2450,2148 2428,1717 2427,1295 2453,519 186,0 66,615 5,1238 0,1864 52,2488 160,3106 324,3711 542,4300">
          <text:p/>
        </draw:polygon>
        <draw:polygon draw:style-name="Mgr5" draw:text-style-name="MP8" draw:layer="backgroundobjects" svg:width="4.343cm" svg:height="3.942cm" svg:x="22.011cm" svg:y="6.457cm" svg:viewBox="0 0 4344 3943" draw:points="3561,3943 4344,1719 4163,1662 3986,1595 3812,1518 3643,1432 3315,1235 3003,1012 2709,770 2434,516 2177,257 1941,0 0,1326 343,1766 720,2179 1129,2560 1568,2909 2034,3224 2522,3503 3033,3743">
          <text:p/>
        </draw:polygon>
        <draw:polygon draw:style-name="Mgr16" draw:text-style-name="MP48" draw:layer="backgroundobjects" svg:width="1.756cm" svg:height="2.407cm" svg:x="26.321cm" svg:y="8.392cm" svg:viewBox="0 0 1757 2408" draw:points="1757,70 1599,80 1443,85 1286,84 1131,78 976,66 821,50 668,28 515,0 0,2216 219,2266 439,2308 659,2343 879,2370 1098,2390 1318,2402 1537,2408 1757,2405">
          <text:p/>
        </draw:polygon>
        <draw:polygon draw:style-name="Mgr17" draw:text-style-name="MP49" draw:layer="backgroundobjects" svg:width="6.801cm" svg:height="2.309cm" svg:x="21.276cm" svg:y="-0.2cm" svg:viewBox="0 0 6802 2310" draw:points="670,0 556,181 449,366 350,553 261,744 182,937 111,1132 50,1330 0,1530 2144,2310 2286,1938 2461,1590 2665,1265 2897,963 3154,685 3435,432 3736,203 4056,0 6802,0">
          <text:p/>
        </draw:polygon>
      </draw:g>
      <draw:frame presentation:style-name="Mpr83" draw:text-style-name="MP26" draw:layer="backgroundobjects" svg:width="2.099cm" svg:height="0.652cm" svg:x="25.002cm" svg:y="14.548cm">
        <draw:text-box>
          <text:p text:style-name="MP25"><text:span text:style-name="MT4"><text:page-number>&lt;numéro&gt;</text:page-number></text:span></text:p>
        </draw:text-box>
      </draw:frame>
      <draw:frame presentation:style-name="Mpr83" draw:text-style-name="MP26" draw:layer="backgroundobjects" svg:width="19cm" svg:height="0.652cm" svg:x="6.803cm" svg:y="14.548cm">
        <draw:text-box>
          <text:p text:style-name="MP25"><text:span text:style-name="MT4"><text:s text:c="2"/></text:span><text:span text:style-name="MT4"><presentation:footer/></text:span></text:p>
        </draw:text-box>
      </draw:frame>
      <presentation:notes style:page-layout-name="PM0">
        <office:forms form:automatic-focus="false" form:apply-design-mode="false"/>
        <draw:page-thumbnail presentation:style-name="_33__5f_Base_20_G1-title" draw:layer="backgroundobjects" svg:width="19.6cm" svg:height="11.56cm" svg:x="0.7cm" svg:y="0.7cm" presentation:class="page"/>
        <draw:frame presentation:style-name="Mpr84" draw:text-style-name="MP13" draw:layer="backgroundobjects" svg:width="19.6cm" svg:height="16.562cm" svg:x="0.7cm" svg:y="12.599cm" presentation:class="notes">
          <draw:text-box>
            <text:p>Cliquez pour modifier le format des notes</text:p>
          </draw:text-box>
        </draw:frame>
        <draw:frame presentation:style-name="Mpr85" draw:text-style-name="MP15" draw:layer="backgroundobjects" svg:width="12.9cm" svg:height="0.6cm" svg:x="0cm" svg:y="0cm" presentation:class="header">
          <draw:text-box>
            <text:p text:style-name="MP14"><text:span text:style-name="MT3"><presentation:header/></text:span></text:p>
          </draw:text-box>
        </draw:frame>
        <draw:frame presentation:style-name="Mpr85" draw:text-style-name="MP17" draw:layer="backgroundobjects" svg:width="7.9cm" svg:height="0.6cm" svg:x="13.1cm" svg:y="0cm" presentation:class="date-time">
          <draw:text-box>
            <text:p text:style-name="MP16"><text:span text:style-name="MT3"><presentation:date-time/></text:span></text:p>
          </draw:text-box>
        </draw:frame>
        <draw:frame presentation:style-name="Mpr86" draw:text-style-name="MP15" draw:layer="backgroundobjects" svg:width="13.5cm" svg:height="0.726cm" svg:x="0cm" svg:y="28.973cm" presentation:class="footer">
          <draw:text-box>
            <text:p text:style-name="MP14"><text:span text:style-name="MT3"><presentation:footer/></text:span></text:p>
          </draw:text-box>
        </draw:frame>
        <draw:frame presentation:style-name="Mpr86" draw:text-style-name="MP17" draw:layer="backgroundobjects" svg:width="6cm" svg:height="0.726cm" svg:x="15cm" svg:y="28.999cm" presentation:class="page-number">
          <draw:text-box>
            <text:p text:style-name="MP16"><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editing-cycles>8</meta:editing-cycles>
    <meta:creation-date>2026-07-20T09:58:08.261357700</meta:creation-date>
    <meta:editing-duration>PT4H31M32S</meta:editing-duration>
    <meta:generator>LibreOffice/25.8.5.2$Windows_X86_64 LibreOffice_project/580$Build-2</meta:generator>
    <meta:initial-creator>Alice Lambois</meta:initial-creator>
    <dc:date>2026-07-22T15:16:58.244456500</dc:date>
    <dc:creator>Alice Lambois</dc:creator>
    <meta:print-date>2026-07-21T14:49:53.777828900</meta:print-date>
    <meta:printed-by>Fichiers PDF: Alice Lambois</meta:printed-by>
    <meta:document-statistic meta:object-count="354"/>
  </office:meta>
</office:document-meta>
</file>